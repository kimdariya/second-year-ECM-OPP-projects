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elvetica" svg:font-family="Helvetic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15.7cm" table:align="left" style:writing-mode="lr-tb"/>
    </style:style>
    <style:style style:name="Table1.A" style:family="table-column">
      <style:table-column-properties style:column-width="3.2cm"/>
    </style:style>
    <style:style style:name="Table1.B" style:family="table-column">
      <style:table-column-properties style:column-width="4.001cm"/>
    </style:style>
    <style:style style:name="Table1.C" style:family="table-column">
      <style:table-column-properties style:column-width="4.2cm"/>
    </style:style>
    <style:style style:name="Table1.D" style:family="table-column">
      <style:table-column-properties style:column-width="4.3cm"/>
    </style:style>
    <style:style style:name="Table1.1" style:family="table-row">
      <style:table-row-properties style:min-row-height="1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6">
      <style:paragraph-properties fo:margin-top="0.212cm" fo:margin-bottom="0cm" style:contextual-spacing="false"/>
    </style:style>
    <style:style style:name="P2" style:family="paragraph" style:parent-style-name="Heading_20_6">
      <style:paragraph-properties fo:margin-top="0.212cm" fo:margin-bottom="0cm" style:contextual-spacing="false"/>
      <style:text-properties fo:font-size="12pt" style:font-size-asian="12pt"/>
    </style:style>
    <style:style style:name="P3" style:family="paragraph" style:parent-style-name="Heading_20_6">
      <style:paragraph-properties fo:margin-top="0.106cm" fo:margin-bottom="0.106cm" style:contextual-spacing="false"/>
      <style:text-properties fo:font-size="12pt" style:font-size-asian="12pt"/>
    </style:style>
    <style:style style:name="P4" style:family="paragraph" style:parent-style-name="Standard">
      <style:paragraph-properties fo:margin-right="0cm" fo:text-align="center" style:justify-single-word="false" fo:text-indent="0cm" style:auto-text-indent="false"/>
      <style:text-properties fo:font-size="12pt" fo:font-weight="bold" style:font-size-asian="12pt" style:font-weight-asian="bold" style:font-weight-complex="bold"/>
    </style:style>
    <style:style style:name="P5" style:family="paragraph" style:parent-style-name="Standard">
      <style:text-properties fo:font-size="12pt" fo:font-weight="bold" style:font-size-asian="12pt" style:font-weight-asian="bold" style:font-weight-complex="bold"/>
    </style:style>
    <style:style style:name="P6" style:family="paragraph" style:parent-style-name="Нумерованный_20_список2">
      <style:paragraph-properties fo:margin-top="0cm" fo:margin-bottom="0cm" style:contextual-spacing="false"/>
      <style:text-properties fo:font-size="12pt" fo:font-weight="bold" style:font-size-asian="12pt" style:font-weight-asian="bold" style:font-weight-complex="bold"/>
    </style:style>
    <style:style style:name="P7" style:family="paragraph" style:parent-style-name="Heading_20_7">
      <style:paragraph-properties fo:margin-right="0cm" fo:text-indent="0cm" style:auto-text-indent="false"/>
      <style:text-properties fo:font-size="12pt" style:font-size-asian="12pt"/>
    </style:style>
    <style:style style:name="P8" style:family="paragraph" style:parent-style-name="Heading_20_7">
      <style:paragraph-properties fo:margin-right="0cm" fo:margin-top="0.423cm" fo:margin-bottom="0cm" style:contextual-spacing="false" fo:text-indent="0cm" style:auto-text-indent="false"/>
      <style:text-properties fo:font-size="12pt" style:font-size-asian="12pt"/>
    </style:style>
    <style:style style:name="P9" style:family="paragraph" style:parent-style-name="Standard">
      <style:paragraph-properties fo:margin-right="0cm" fo:text-align="center" style:justify-single-word="false" fo:text-indent="0cm" style:auto-text-indent="false"/>
      <style:text-properties fo:font-size="12pt" style:font-size-asian="12pt"/>
    </style:style>
    <style:style style:name="P10" style:family="paragraph" style:parent-style-name="Standard">
      <style:paragraph-properties fo:margin-right="0cm" fo:text-align="center" style:justify-single-word="false" fo:text-indent="0cm" style:auto-text-indent="false"/>
    </style:style>
    <style:style style:name="P11" style:family="paragraph" style:parent-style-name="Body_20_Text_20_3">
      <style:paragraph-properties fo:line-height="100%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fo:margin-right="0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13" style:family="paragraph" style:parent-style-name="Standard">
      <style:paragraph-properties fo:margin-right="0cm" fo:margin-top="0.212cm" fo:margin-bottom="0cm" style:contextual-spacing="false" fo:text-align="center" style:justify-single-word="false" fo:text-indent="0cm" style:auto-text-indent="false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paragraph-properties fo:margin-left="7.502cm" fo:margin-right="0cm"/>
    </style:style>
    <style:style style:name="P16" style:family="paragraph" style:parent-style-name="Standard">
      <style:paragraph-properties fo:margin-top="0cm" fo:margin-bottom="0.212cm" style:contextual-spacing="false"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17" style:family="paragraph" style:parent-style-name="Contents_20_1">
      <style:paragraph-properties fo:line-height="150%">
        <style:tab-stops>
          <style:tab-stop style:position="16.484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line-height="150%"/>
      <style:text-properties style:font-name="Calibri" fo:font-size="11pt" fo:language="none" fo:country="none" fo:font-weight="bold" style:font-size-asian="11pt" style:language-asian="none" style:country-asian="none" style:font-weight-asian="bold" style:font-name-complex="Calibri" style:font-size-complex="11pt" style:font-weight-complex="bold"/>
    </style:style>
    <style:style style:name="P19" style:family="paragraph" style:parent-style-name="Default">
      <style:paragraph-properties fo:margin-top="0cm" fo:margin-bottom="0.347cm" style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Default">
      <style:paragraph-properties fo:margin-top="0cm" fo:margin-bottom="0.347cm" style:contextual-spacing="false" fo:text-align="justify" style:justify-single-word="false"/>
      <style:text-properties fo:font-style="normal" officeooo:rsid="001f943e" officeooo:paragraph-rsid="001f943e" style:font-style-asian="normal" style:font-style-complex="normal"/>
    </style:style>
    <style:style style:name="P22" style:family="paragraph" style:parent-style-name="Default">
      <style:paragraph-properties fo:margin-top="0cm" fo:margin-bottom="0.347cm" style:contextual-spacing="false"/>
      <style:text-properties fo:font-size="14pt" fo:font-style="italic" style:font-size-asian="14pt" style:font-style-asian="italic" style:font-size-complex="14pt"/>
    </style:style>
    <style:style style:name="P23" style:family="paragraph" style:parent-style-name="Default">
      <style:paragraph-properties fo:margin-top="0cm" fo:margin-bottom="0.347cm" style:contextual-spacing="false"/>
    </style:style>
    <style:style style:name="P24" style:family="paragraph" style:parent-style-name="Default">
      <style:paragraph-properties fo:margin-top="0cm" fo:margin-bottom="0.347cm" style:contextual-spacing="false" fo:text-align="justify" style:justify-single-word="false"/>
      <style:text-properties fo:font-size="14pt" fo:font-style="normal" officeooo:rsid="0004ffdf" officeooo:paragraph-rsid="000d3f8d" style:font-size-asian="14pt" style:font-style-asian="normal" style:font-size-complex="14pt" style:font-style-complex="normal"/>
    </style:style>
    <style:style style:name="P25" style:family="paragraph" style:parent-style-name="Standard">
      <style:paragraph-properties fo:text-align="justify" style:justify-single-word="false" fo:text-indent="0cm" style:auto-text-indent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indent="0cm" style:auto-text-indent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italic" style:font-style-asian="italic" style:font-style-complex="italic"/>
    </style:style>
    <style:style style:name="P28" style:family="paragraph" style:parent-style-name="Standard">
      <style:text-properties fo:font-size="14pt" fo:font-style="italic" style:font-size-asian="14pt" style:font-style-asian="italic" style:font-size-complex="14pt"/>
    </style:style>
    <style:style style:name="P29" style:family="paragraph">
      <loext:graphic-properties draw:fill-color="#ffffff"/>
    </style:style>
    <style:style style:name="P3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3bf3d"/>
    </style:style>
    <style:style style:name="P32" style:family="paragraph" style:parent-style-name="Standard">
      <style:text-properties style:use-window-font-color="true" loext:opacity="0%" style:font-name="Helvetica" fo:font-size="12pt" fo:font-style="italic" style:font-size-asian="12pt" style:font-style-asian="italic" style:font-size-complex="14pt"/>
    </style:style>
    <style:style style:name="P33" style:family="paragraph" style:parent-style-name="Default">
      <style:paragraph-properties fo:margin-top="0cm" fo:margin-bottom="0.347cm" style:contextual-spacing="false" fo:text-align="justify" style:justify-single-word="false"/>
      <style:text-properties fo:font-size="14pt" fo:font-style="normal" officeooo:rsid="000652c8" officeooo:paragraph-rsid="000652c8" style:font-size-asian="14pt" style:font-style-asian="normal" style:font-size-complex="14pt" style:font-style-complex="normal"/>
    </style:style>
    <style:style style:name="P34" style:family="paragraph" style:parent-style-name="Default" style:list-style-name="L1">
      <style:paragraph-properties fo:margin-top="0cm" fo:margin-bottom="0.347cm" style:contextual-spacing="false" fo:text-align="justify" style:justify-single-word="false"/>
      <style:text-properties fo:font-size="14pt" fo:font-style="normal" officeooo:rsid="000652c8" officeooo:paragraph-rsid="000652c8" style:font-size-asian="14pt" style:font-style-asian="normal" style:font-size-complex="14pt" style:font-style-complex="normal"/>
    </style:style>
    <style:style style:name="P35" style:family="paragraph" style:parent-style-name="Default">
      <style:paragraph-properties fo:margin-top="0cm" fo:margin-bottom="0.347cm" style:contextual-spacing="false" fo:text-align="justify" style:justify-single-word="false"/>
      <style:text-properties fo:font-size="14pt" fo:font-style="normal" officeooo:rsid="000765af" officeooo:paragraph-rsid="000765af" style:font-size-asian="14pt" style:font-style-asian="normal" style:font-size-complex="14pt" style:font-style-complex="normal"/>
    </style:style>
    <style:style style:name="P36" style:family="paragraph" style:parent-style-name="Default">
      <style:paragraph-properties fo:margin-top="0cm" fo:margin-bottom="0.347cm" style:contextual-spacing="false"/>
      <style:text-properties fo:font-size="14pt" fo:font-style="normal" officeooo:rsid="000765af" officeooo:paragraph-rsid="000765af" style:font-size-asian="14pt" style:font-style-asian="normal" style:font-size-complex="14pt" style:font-style-complex="normal"/>
    </style:style>
    <style:style style:name="P3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tyle="normal" officeooo:paragraph-rsid="00163509" style:font-style-asian="normal" style:font-style-complex="normal"/>
    </style:style>
    <style:style style:name="P3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fo:font-style="normal" fo:font-weight="bold" officeooo:paragraph-rsid="00163509" style:font-size-asian="12pt" style:font-style-asian="normal" style:font-weight-asian="bold" style:font-style-complex="normal" style:font-weight-complex="bold"/>
    </style:style>
    <style:style style:name="P39" style:family="paragraph" style:parent-style-name="Standard">
      <style:text-properties style:use-window-font-color="true" loext:opacity="0%" style:font-name="Helvetica" fo:font-size="12pt" fo:font-style="normal" officeooo:paragraph-rsid="00163509" style:font-size-asian="12pt" style:font-style-asian="normal" style:font-size-complex="14pt" style:font-style-complex="normal"/>
    </style:style>
    <style:style style:name="P40" style:family="paragraph" style:parent-style-name="Default">
      <style:paragraph-properties fo:margin-top="0cm" fo:margin-bottom="0.347cm" style:contextual-spacing="false"/>
      <style:text-properties fo:font-style="normal" officeooo:paragraph-rsid="000765af" style:font-style-asian="normal" style:font-style-complex="normal"/>
    </style:style>
    <style:style style:name="P41" style:family="paragraph" style:parent-style-name="Default">
      <style:paragraph-properties fo:margin-top="0cm" fo:margin-bottom="0.347cm" style:contextual-spacing="false" fo:text-align="justify" style:justify-single-word="false"/>
      <style:text-properties fo:font-size="14pt" fo:font-style="normal" officeooo:paragraph-rsid="000765af" style:font-size-asian="14pt" style:font-style-asian="normal" style:font-size-complex="14pt" style:font-style-complex="normal"/>
    </style:style>
    <style:style style:name="P42" style:family="paragraph" style:parent-style-name="Default" style:list-style-name="L2">
      <style:paragraph-properties fo:margin-top="0cm" fo:margin-bottom="0.347cm" style:contextual-spacing="false" fo:text-align="justify" style:justify-single-word="false"/>
      <style:text-properties fo:font-style="normal" officeooo:paragraph-rsid="000765af" style:font-style-asian="normal" style:font-style-complex="normal"/>
    </style:style>
    <style:style style:name="P43" style:family="paragraph" style:parent-style-name="Default" style:list-style-name="L2">
      <style:paragraph-properties fo:margin-top="0cm" fo:margin-bottom="0.347cm" style:contextual-spacing="false" fo:text-align="justify" style:justify-single-word="false"/>
      <style:text-properties fo:font-style="normal" officeooo:paragraph-rsid="0016967a" style:font-style-asian="normal" style:font-style-complex="normal"/>
    </style:style>
    <style:style style:name="P44" style:family="paragraph" style:parent-style-name="Default">
      <style:paragraph-properties fo:margin-top="0cm" fo:margin-bottom="0.347cm" style:contextual-spacing="false"/>
      <style:text-properties fo:font-style="normal" officeooo:rsid="000831dd" officeooo:paragraph-rsid="000831dd" style:font-style-asian="normal" style:font-style-complex="normal"/>
    </style:style>
    <style:style style:name="P45" style:family="paragraph" style:parent-style-name="Default">
      <style:paragraph-properties fo:margin-top="0cm" fo:margin-bottom="0.347cm" style:contextual-spacing="false"/>
      <style:text-properties officeooo:rsid="000831dd" officeooo:paragraph-rsid="000831dd"/>
    </style:style>
    <style:style style:name="P46" style:family="paragraph" style:parent-style-name="Default">
      <style:paragraph-properties fo:margin-top="0cm" fo:margin-bottom="0.347cm" style:contextual-spacing="false" fo:text-align="justify" style:justify-single-word="false"/>
      <style:text-properties fo:font-style="normal" officeooo:rsid="000831dd" officeooo:paragraph-rsid="000831dd" style:font-style-asian="normal" style:font-style-complex="normal"/>
    </style:style>
    <style:style style:name="P47" style:family="paragraph" style:parent-style-name="Default">
      <style:paragraph-properties fo:margin-top="0cm" fo:margin-bottom="0.347cm" style:contextual-spacing="false"/>
      <style:text-properties officeooo:rsid="0019260a" officeooo:paragraph-rsid="0019260a"/>
    </style:style>
    <style:style style:name="P4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/>
    </style:style>
    <style:style style:name="P4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9717c"/>
    </style:style>
    <style:style style:name="P5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rsid="0019717c" officeooo:paragraph-rsid="0019717c"/>
    </style:style>
    <style:style style:name="P51" style:family="paragraph" style:parent-style-name="Standard">
      <style:paragraph-properties fo:margin-top="0cm" fo:margin-bottom="0.347cm" style:contextual-spacing="false"/>
      <style:text-properties officeooo:rsid="000831dd" officeooo:paragraph-rsid="000831dd"/>
    </style:style>
    <style:style style:name="P52" style:family="paragraph" style:parent-style-name="Standard">
      <style:paragraph-properties fo:margin-top="0cm" fo:margin-bottom="0.347cm" style:contextual-spacing="false"/>
      <style:text-properties officeooo:rsid="0019717c" officeooo:paragraph-rsid="0019717c"/>
    </style:style>
    <style:style style:name="P53" style:family="paragraph" style:parent-style-name="Default">
      <style:paragraph-properties fo:margin-top="0cm" fo:margin-bottom="0.347cm" style:contextual-spacing="false" fo:text-align="justify" style:justify-single-word="false"/>
      <style:text-properties fo:font-size="14pt" fo:font-style="normal" officeooo:rsid="000831dd" officeooo:paragraph-rsid="000831dd" style:font-size-asian="14pt" style:font-style-asian="normal" style:font-size-complex="14pt" style:font-style-complex="normal"/>
    </style:style>
    <style:style style:name="P5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b5fee"/>
    </style:style>
    <style:style style:name="P55" style:family="paragraph" style:parent-style-name="Standard">
      <style:paragraph-properties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63509"/>
    </style:style>
    <style:style style:name="P5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63509"/>
    </style:style>
    <style:style style:name="P57" style:family="paragraph" style:parent-style-name="Default" style:list-style-name="WW8Num1">
      <style:paragraph-properties fo:margin-top="0cm" fo:margin-bottom="0.347cm" style:contextual-spacing="false"/>
      <style:text-properties fo:font-size="14pt" fo:font-style="italic" style:font-size-asian="14pt" style:font-style-asian="italic" style:font-size-complex="14pt"/>
    </style:style>
    <style:style style:name="P58" style:family="paragraph" style:parent-style-name="Default" style:list-style-name="WW8Num1">
      <style:paragraph-properties fo:margin-top="0cm" fo:margin-bottom="0.347cm" style:contextual-spacing="false"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59" style:family="paragraph" style:parent-style-name="Default">
      <style:paragraph-properties fo:margin-top="0cm" fo:margin-bottom="0.347cm" style:contextual-spacing="false" fo:text-align="justify" style:justify-single-word="false"/>
      <style:text-properties fo:font-size="14pt" fo:font-style="normal" officeooo:rsid="0009b8df" officeooo:paragraph-rsid="000b819a" style:font-size-asian="14pt" style:font-style-asian="normal" style:font-size-complex="14pt" style:font-style-complex="normal"/>
    </style:style>
    <style:style style:name="P60" style:family="paragraph" style:parent-style-name="Default">
      <style:paragraph-properties fo:margin-top="0cm" fo:margin-bottom="0.347cm" style:contextual-spacing="false" fo:text-align="justify" style:justify-single-word="false"/>
      <style:text-properties fo:font-size="14pt" fo:font-style="normal" officeooo:rsid="0009b8df" officeooo:paragraph-rsid="0009b8df" style:font-size-asian="14pt" style:font-style-asian="normal" style:font-size-complex="14pt" style:font-style-complex="normal"/>
    </style:style>
    <style:style style:name="P61" style:family="paragraph" style:parent-style-name="Default">
      <style:paragraph-properties fo:margin-top="0cm" fo:margin-bottom="0.347cm" style:contextual-spacing="false" fo:text-align="justify" style:justify-single-word="false"/>
      <style:text-properties fo:font-size="14pt" fo:font-style="normal" officeooo:rsid="000b819a" officeooo:paragraph-rsid="000b819a" style:font-size-asian="14pt" style:font-style-asian="normal" style:font-size-complex="14pt" style:font-style-complex="normal"/>
    </style:style>
    <style:style style:name="P62" style:family="paragraph" style:parent-style-name="Default">
      <style:paragraph-properties fo:margin-top="0cm" fo:margin-bottom="0.347cm" style:contextual-spacing="false" fo:text-align="justify" style:justify-single-word="false"/>
      <style:text-properties fo:font-size="14pt" fo:font-style="normal" officeooo:rsid="000d3f8d" officeooo:paragraph-rsid="000d3f8d" style:font-size-asian="14pt" style:font-style-asian="normal" style:font-size-complex="14pt" style:font-style-complex="normal"/>
    </style:style>
    <style:style style:name="P63" style:family="paragraph" style:parent-style-name="Default" style:list-style-name="L3">
      <style:paragraph-properties fo:margin-top="0cm" fo:margin-bottom="0.347cm" style:contextual-spacing="false" fo:text-align="justify" style:justify-single-word="false"/>
      <style:text-properties fo:font-size="14pt" fo:font-style="normal" officeooo:rsid="000b819a" officeooo:paragraph-rsid="000b819a" style:font-size-asian="14pt" style:font-style-asian="normal" style:font-size-complex="14pt" style:font-style-complex="normal"/>
    </style:style>
    <style:style style:name="P64" style:family="paragraph" style:parent-style-name="Default" style:list-style-name="L4">
      <style:paragraph-properties fo:margin-top="0cm" fo:margin-bottom="0.347cm" style:contextual-spacing="false" fo:text-align="justify" style:justify-single-word="false"/>
      <style:text-properties fo:font-style="normal" officeooo:paragraph-rsid="000d3f8d" style:font-style-asian="normal" style:font-style-complex="normal"/>
    </style:style>
    <style:style style:name="P65" style:family="paragraph" style:parent-style-name="Default" style:list-style-name="L4">
      <style:paragraph-properties fo:margin-top="0cm" fo:margin-bottom="0.347cm" style:contextual-spacing="false" fo:text-align="justify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0d3f8d" officeooo:paragraph-rsid="000b819a" style:font-size-asian="14pt" style:font-style-asian="normal" style:font-size-complex="14pt" style:font-style-complex="normal"/>
    </style:style>
    <style:style style:name="P66" style:family="paragraph" style:parent-style-name="Default">
      <style:paragraph-properties fo:margin-top="0cm" fo:margin-bottom="0.347cm" style:contextual-spacing="false" fo:text-align="justify" style:justify-single-word="false"/>
      <style:text-properties officeooo:paragraph-rsid="000b819a"/>
    </style:style>
    <style:style style:name="P67" style:family="paragraph" style:parent-style-name="Default">
      <style:paragraph-properties fo:margin-top="0cm" fo:margin-bottom="0.347cm" style:contextual-spacing="false"/>
      <style:text-properties officeooo:paragraph-rsid="000b819a"/>
    </style:style>
    <style:style style:name="P68" style:family="paragraph" style:parent-style-name="Default">
      <style:paragraph-properties fo:margin-top="0cm" fo:margin-bottom="0.347cm" style:contextual-spacing="false" fo:text-align="justify" style:justify-single-word="false"/>
      <style:text-properties fo:font-style="normal" style:text-underline-style="solid" style:text-underline-width="auto" style:text-underline-color="font-color" officeooo:paragraph-rsid="000b819a" style:font-style-asian="normal" style:font-style-complex="normal"/>
    </style:style>
    <style:style style:name="P6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6967a"/>
    </style:style>
    <style:style style:name="P70" style:family="paragraph" style:parent-style-name="Standard">
      <style:paragraph-properties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rsid="0016967a" officeooo:paragraph-rsid="0016967a"/>
    </style:style>
    <style:style style:name="P71" style:family="paragraph" style:parent-style-name="Default">
      <style:paragraph-properties fo:margin-top="0cm" fo:margin-bottom="0.347cm" style:contextual-spacing="false"/>
      <style:text-properties fo:font-size="14pt" fo:font-style="italic" officeooo:paragraph-rsid="000f037c" style:font-size-asian="14pt" style:font-style-asian="italic" style:font-size-complex="14pt"/>
    </style:style>
    <style:style style:name="P72" style:family="paragraph" style:parent-style-name="Default" style:list-style-name="L5">
      <style:paragraph-properties fo:margin-top="0cm" fo:margin-bottom="0.347cm" style:contextual-spacing="false" fo:text-align="justify" style:justify-single-word="false"/>
      <style:text-properties fo:font-size="14pt" fo:font-style="normal" officeooo:rsid="000f037c" officeooo:paragraph-rsid="000f037c" style:font-size-asian="14pt" style:font-style-asian="normal" style:font-size-complex="14pt" style:font-style-complex="normal"/>
    </style:style>
    <style:style style:name="P73" style:family="paragraph" style:parent-style-name="Default">
      <style:paragraph-properties fo:margin-top="0cm" fo:margin-bottom="0.347cm" style:contextual-spacing="false"/>
      <style:text-properties fo:font-size="14pt" fo:font-style="normal" officeooo:rsid="000f037c" officeooo:paragraph-rsid="000f037c" style:font-size-asian="14pt" style:font-style-asian="normal" style:font-size-complex="14pt" style:font-style-complex="normal"/>
    </style:style>
    <style:style style:name="P74" style:family="paragraph" style:parent-style-name="Default">
      <style:paragraph-properties fo:margin-top="0cm" fo:margin-bottom="0.347cm" style:contextual-spacing="false"/>
      <style:text-properties fo:font-size="14pt" fo:font-style="italic" officeooo:rsid="000f037c" officeooo:paragraph-rsid="000f037c" style:font-size-asian="14pt" style:font-style-asian="italic" style:font-size-complex="14pt"/>
    </style:style>
    <style:style style:name="P75" style:family="paragraph" style:parent-style-name="Default">
      <style:paragraph-properties fo:margin-top="0cm" fo:margin-bottom="0.347cm" style:contextual-spacing="false" fo:text-align="justify" style:justify-single-word="false"/>
      <style:text-properties fo:font-size="14pt" fo:font-style="normal" style:text-underline-style="solid" style:text-underline-width="auto" style:text-underline-color="font-color" officeooo:rsid="000f037c" officeooo:paragraph-rsid="000f037c" style:font-size-asian="14pt" style:font-style-asian="normal" style:font-size-complex="14pt" style:font-style-complex="normal"/>
    </style:style>
    <style:style style:name="P76" style:family="paragraph" style:parent-style-name="Default" style:list-style-name="L6">
      <style:paragraph-properties fo:margin-top="0cm" fo:margin-bottom="0.347cm" style:contextual-spacing="false" fo:text-align="justify" style:justify-single-word="false"/>
      <style:text-properties fo:font-size="14pt" fo:font-style="normal" officeooo:rsid="000f037c" officeooo:paragraph-rsid="000f037c" style:font-size-asian="14pt" style:font-style-asian="normal" style:font-size-complex="14pt" style:font-style-complex="normal"/>
    </style:style>
    <style:style style:name="P77" style:family="paragraph" style:parent-style-name="Default" style:list-style-name="L7">
      <style:paragraph-properties fo:margin-top="0cm" fo:margin-bottom="0.347cm" style:contextual-spacing="false" fo:text-align="justify" style:justify-single-word="false"/>
      <style:text-properties fo:font-size="14pt" fo:font-style="normal" officeooo:rsid="000f037c" officeooo:paragraph-rsid="000f037c" style:font-size-asian="14pt" style:font-style-asian="normal" style:font-size-complex="14pt" style:font-style-complex="normal"/>
    </style:style>
    <style:style style:name="P78" style:family="paragraph" style:parent-style-name="Default">
      <style:paragraph-properties fo:margin-top="0cm" fo:margin-bottom="0.347cm" style:contextual-spacing="false" fo:text-align="justify" style:justify-single-word="false"/>
      <style:text-properties fo:font-size="14pt" fo:font-style="normal" officeooo:rsid="000f037c" officeooo:paragraph-rsid="000f037c" style:font-size-asian="14pt" style:font-style-asian="normal" style:font-size-complex="14pt" style:font-style-complex="normal"/>
    </style:style>
    <style:style style:name="P79" style:family="paragraph" style:parent-style-name="Table_20_Contents">
      <style:paragraph-properties fo:text-align="center" style:justify-single-word="false" fo:text-indent="0cm" style:auto-text-indent="false"/>
      <style:text-properties fo:font-style="normal" style:font-style-asian="normal" style:font-style-complex="normal"/>
    </style:style>
    <style:style style:name="P80" style:family="paragraph" style:parent-style-name="Table_20_Contents">
      <style:paragraph-properties fo:text-align="center" style:justify-single-word="false" fo:text-indent="0cm" style:auto-text-indent="false"/>
      <style:text-properties fo:font-style="normal" officeooo:rsid="000f037c" officeooo:paragraph-rsid="000f037c" style:font-style-asian="normal" style:font-style-complex="normal"/>
    </style:style>
    <style:style style:name="P81" style:family="paragraph" style:parent-style-name="Table_20_Contents">
      <style:text-properties fo:font-style="normal" officeooo:rsid="000f037c" officeooo:paragraph-rsid="000f037c" style:font-style-asian="normal" style:font-style-complex="normal"/>
    </style:style>
    <style:style style:name="P82" style:family="paragraph" style:parent-style-name="Table_20_Contents">
      <style:paragraph-properties fo:text-align="start" style:justify-single-word="false" fo:text-indent="0cm" style:auto-text-indent="false"/>
      <style:text-properties fo:font-style="normal" officeooo:rsid="000f61f4" officeooo:paragraph-rsid="000f61f4" style:font-style-asian="normal" style:font-style-complex="normal"/>
    </style:style>
    <style:style style:name="P83" style:family="paragraph" style:parent-style-name="Table_20_Contents">
      <style:paragraph-properties fo:text-align="start" style:justify-single-word="false" fo:text-indent="0cm" style:auto-text-indent="false"/>
      <style:text-properties fo:font-style="normal" officeooo:paragraph-rsid="000f61f4" style:font-style-asian="normal" style:font-style-complex="normal"/>
    </style:style>
    <style:style style:name="P84" style:family="paragraph" style:parent-style-name="Default">
      <style:paragraph-properties fo:margin-top="0cm" fo:margin-bottom="0.347cm" style:contextual-spacing="false" fo:text-align="justify" style:justify-single-word="false"/>
      <style:text-properties fo:font-size="14pt" fo:font-style="normal" officeooo:rsid="000f037c" officeooo:paragraph-rsid="001890e2" style:font-size-asian="14pt" style:font-style-asian="normal" style:font-size-complex="14pt" style:font-style-complex="normal"/>
    </style:style>
    <style:style style:name="P85" style:family="paragraph" style:parent-style-name="Default">
      <style:paragraph-properties fo:margin-top="0cm" fo:margin-bottom="0.347cm" style:contextual-spacing="false" fo:text-align="justify" style:justify-single-word="false"/>
      <style:text-properties fo:font-size="14pt" fo:font-style="normal" officeooo:rsid="001890e2" officeooo:paragraph-rsid="0019260a" style:font-size-asian="14pt" style:font-style-asian="normal" style:font-size-complex="14pt" style:font-style-complex="normal"/>
    </style:style>
    <style:style style:name="P86" style:family="paragraph" style:parent-style-name="Default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7" style:family="paragraph" style:parent-style-name="Standard">
      <style:paragraph-properties fo:margin-right="0cm" fo:text-align="justify" style:justify-single-word="false" fo:text-indent="0cm" style:auto-text-indent="false"/>
      <style:text-properties fo:font-size="14pt" fo:font-style="normal" style:font-size-asian="14pt" style:font-style-asian="normal" style:font-size-complex="14pt" style:font-style-complex="normal"/>
    </style:style>
    <style:style style:name="T1" style:family="text">
      <style:text-properties fo:font-size="12pt" style:font-size-asian="12pt"/>
    </style:style>
    <style:style style:name="T2" style:family="text">
      <style:text-properties officeooo:rsid="0004ffdf"/>
    </style:style>
    <style:style style:name="T3" style:family="text">
      <style:text-properties fo:language="none" fo:country="none" style:language-asian="none" style:country-asian="none"/>
    </style:style>
    <style:style style:name="T4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5" style:family="text">
      <style:text-properties fo:language="none" fo:country="none" officeooo:rsid="001b5fee" style:language-asian="none" style:country-asian="none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use-window-font-color="true" loext:opacity="0%" style:font-name="Times New Roman" fo:font-size="14pt" style:font-size-asian="12.25pt" style:font-size-complex="14pt"/>
    </style:style>
    <style:style style:name="T8" style:family="text">
      <style:text-properties style:use-window-font-color="true" loext:opacity="0%" style:font-name="Helvetica" fo:font-size="12pt" style:font-size-asian="12pt"/>
    </style:style>
    <style:style style:name="T9" style:family="text">
      <style:text-properties style:use-window-font-color="true" loext:opacity="0%" style:font-name="Times New Roman" fo:font-size="14pt" style:font-size-asian="14pt" style:font-size-complex="14pt"/>
    </style:style>
    <style:style style:name="T10" style:family="text">
      <style:text-properties fo:font-size="14pt" fo:font-style="italic" style:font-size-asian="14pt" style:font-style-asian="italic" style:font-size-complex="14pt"/>
    </style:style>
    <style:style style:name="T11" style:family="text">
      <style:text-properties officeooo:rsid="000d3f8d"/>
    </style:style>
    <style:style style:name="T12" style:family="text">
      <style:text-properties style:use-window-font-color="true" loext:opacity="0%" style:font-name="Times New Roman" officeooo:rsid="000d3f8d"/>
    </style:style>
    <style:style style:name="T13" style:family="text">
      <style:text-properties officeooo:rsid="001193e5"/>
    </style:style>
    <style:style style:name="T14" style:family="text">
      <style:text-properties style:use-window-font-color="true" loext:opacity="0%" style:font-name="Helvetica" fo:font-size="12pt" officeooo:rsid="00151d0a" style:font-size-asian="12pt"/>
    </style:style>
    <style:style style:name="T15" style:family="text">
      <style:text-properties style:use-window-font-color="true" loext:opacity="0%" style:font-name="Helvetica" fo:font-size="12pt" officeooo:rsid="0013bf3d" style:font-size-asian="12pt"/>
    </style:style>
    <style:style style:name="T16" style:family="text">
      <style:text-properties officeooo:rsid="00127cd1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193e5" style:font-style-asian="italic" style:font-style-complex="italic"/>
    </style:style>
    <style:style style:name="T19" style:family="text">
      <style:text-properties officeooo:rsid="00163509"/>
    </style:style>
    <style:style style:name="T20" style:family="text">
      <style:text-properties fo:font-size="14pt" officeooo:rsid="000831dd" style:font-size-asian="14pt" style:font-size-complex="14pt"/>
    </style:style>
    <style:style style:name="T21" style:family="text">
      <style:text-properties style:use-window-font-color="true" loext:opacity="0%" style:font-name="Times New Roman" fo:font-size="14pt" officeooo:rsid="00090cbe" style:font-size-asian="14pt" style:font-size-complex="14pt"/>
    </style:style>
    <style:style style:name="T22" style:family="text">
      <style:text-properties fo:font-size="14pt" officeooo:rsid="00090cbe" style:font-size-asian="14pt" style:font-size-complex="14pt"/>
    </style:style>
    <style:style style:name="T23" style:family="text">
      <style:text-properties fo:font-size="14pt" officeooo:rsid="0019260a" style:font-size-asian="14pt" style:font-size-complex="14pt"/>
    </style:style>
    <style:style style:name="T24" style:family="text">
      <style:text-properties style:use-window-font-color="true" loext:opacity="0%" fo:font-size="14pt" fo:font-style="italic" style:font-size-asian="14pt" style:font-style-asian="italic" style:font-size-complex="14pt"/>
    </style:style>
    <style:style style:name="T25" style:family="text">
      <style:text-properties style:use-window-font-color="true" loext:opacity="0%" fo:font-size="14pt" fo:font-style="italic" officeooo:rsid="0019717c" style:font-size-asian="14pt" style:font-style-asian="italic" style:font-size-complex="14pt"/>
    </style:style>
    <style:style style:name="T26" style:family="text">
      <style:text-properties style:use-window-font-color="true" loext:opacity="0%" style:font-name="Helvetica" fo:font-size="12pt" fo:font-style="italic" style:font-size-asian="12pt" style:font-style-asian="italic" style:font-size-complex="14pt"/>
    </style:style>
    <style:style style:name="T27" style:family="text">
      <style:text-properties style:use-window-font-color="true" loext:opacity="0%" style:font-name="Helvetica" fo:font-size="12pt" officeooo:rsid="0019717c" style:font-size-asian="12pt"/>
    </style:style>
    <style:style style:name="T28" style:family="text">
      <style:text-properties fo:color="#0563c1" loext:opacity="100%" style:font-name="Helvetica" fo:font-size="12pt" fo:font-style="italic" style:font-size-asian="12pt" style:font-style-asian="italic" style:font-size-complex="14pt"/>
    </style:style>
    <style:style style:name="T29" style:family="text">
      <style:text-properties style:use-window-font-color="true" loext:opacity="0%" style:font-name="Helvetica" fo:font-size="12pt" fo:font-style="italic" officeooo:rsid="001b5fee" style:font-size-asian="12pt" style:font-style-asian="italic" style:font-size-complex="14pt"/>
    </style:style>
    <style:style style:name="T30" style:family="text">
      <style:text-properties fo:color="#0563c1" loext:opacity="100%" style:font-name="Helvetica" fo:font-size="12pt" style:font-size-asian="12pt"/>
    </style:style>
    <style:style style:name="T31" style:family="text">
      <style:text-properties style:use-window-font-color="true" loext:opacity="0%" style:font-name="Helvetica" fo:font-size="12pt" officeooo:rsid="001b5fee" style:font-size-asian="12pt"/>
    </style:style>
    <style:style style:name="T32" style:family="text">
      <style:text-properties style:use-window-font-color="true" loext:opacity="0%" style:font-name="Helvetica" fo:font-size="12pt" officeooo:rsid="000831dd" style:font-size-asian="12pt"/>
    </style:style>
    <style:style style:name="T33" style:family="text">
      <style:text-properties fo:font-size="14pt" fo:font-style="italic" officeooo:rsid="0019260a" style:font-size-asian="14pt" style:font-style-asian="italic" style:font-size-complex="14pt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0b819a"/>
    </style:style>
    <style:style style:name="T36" style:family="text">
      <style:text-properties officeooo:rsid="0016f5e0"/>
    </style:style>
    <style:style style:name="T37" style:family="text">
      <style:text-properties fo:font-size="14pt" officeooo:rsid="0009b8df" style:font-size-asian="14pt" style:font-size-complex="14pt"/>
    </style:style>
    <style:style style:name="T38" style:family="text">
      <style:text-properties fo:font-size="14pt" fo:font-weight="bold" officeooo:rsid="0009b8df" style:font-size-asian="14pt" style:font-weight-asian="bold" style:font-size-complex="14pt" style:font-weight-complex="bold"/>
    </style:style>
    <style:style style:name="T39" style:family="text">
      <style:text-properties fo:font-size="14pt" officeooo:rsid="000b819a" style:font-size-asian="14pt" style:font-size-complex="14pt"/>
    </style:style>
    <style:style style:name="T40" style:family="text">
      <style:text-properties fo:font-size="14pt" fo:font-weight="bold" officeooo:rsid="000b819a" style:font-size-asian="14pt" style:font-weight-asian="bold" style:font-size-complex="14pt" style:font-weight-complex="bold"/>
    </style:style>
    <style:style style:name="T41" style:family="text">
      <style:text-properties fo:font-variant="normal" fo:text-transform="none" fo:color="#000000" loext:opacity="100%" style:font-name="Times New Roman" fo:font-size="14pt" fo:letter-spacing="normal" fo:font-weight="normal" officeooo:rsid="000b819a" style:font-size-asian="14pt" style:font-size-complex="14pt"/>
    </style:style>
    <style:style style:name="T42" style:family="text">
      <style:text-properties fo:font-variant="normal" fo:text-transform="none" fo:color="#000000" loext:opacity="100%" style:font-name="Times New Roman" fo:font-size="14pt" fo:letter-spacing="normal" fo:font-weight="normal" officeooo:rsid="000d3f8d" style:font-size-asian="14pt" style:font-size-complex="14pt"/>
    </style:style>
    <style:style style:name="T43" style:family="text">
      <style:text-properties fo:font-variant="normal" fo:text-transform="none" fo:color="#000000" loext:opacity="100%" style:font-name="Times New Roman" fo:font-size="14pt" fo:letter-spacing="normal" fo:font-style="italic" fo:font-weight="normal" officeooo:rsid="000d3f8d" style:font-size-asian="14pt" style:font-style-asian="italic" style:font-size-complex="14pt"/>
    </style:style>
    <style:style style:name="T44" style:family="text">
      <style:text-properties fo:font-size="14pt" fo:font-style="italic" style:font-size-asian="14pt" style:font-style-asian="italic" style:font-size-complex="14pt" style:font-style-complex="italic"/>
    </style:style>
    <style:style style:name="T45" style:family="text">
      <style:text-properties fo:font-variant="normal" fo:text-transform="none" fo:color="#000000" loext:opacity="100%" style:font-name="Times New Roman" fo:font-size="14pt" fo:letter-spacing="normal" fo:font-style="italic" fo:font-weight="normal" officeooo:rsid="0019260a" style:font-size-asian="14pt" style:font-style-asian="italic" style:font-size-complex="14pt"/>
    </style:style>
    <style:style style:name="T46" style:family="text">
      <style:text-properties fo:font-variant="normal" fo:text-transform="none" style:use-window-font-color="true" loext:opacity="0%" style:font-name="Helvetica" fo:font-size="12pt" fo:letter-spacing="normal" fo:font-style="italic" fo:font-weight="normal" officeooo:rsid="001193e5" style:font-size-asian="12pt" style:font-style-asian="italic" style:font-size-complex="14pt"/>
    </style:style>
    <style:style style:name="T47" style:family="text">
      <style:text-properties fo:font-variant="normal" fo:text-transform="none" style:use-window-font-color="true" loext:opacity="0%" style:font-name="Helvetica" fo:font-size="12pt" fo:letter-spacing="normal" fo:font-style="italic" fo:font-weight="normal" officeooo:rsid="0016967a" style:font-size-asian="12pt" style:font-style-asian="italic" style:font-size-complex="14pt"/>
    </style:style>
    <style:style style:name="T48" style:family="text">
      <style:text-properties style:use-window-font-color="true" loext:opacity="0%" style:font-name="Helvetica" fo:font-size="12pt" officeooo:rsid="0016967a" style:font-size-asian="12pt"/>
    </style:style>
    <style:style style:name="T49" style:family="text">
      <style:text-properties fo:font-variant="normal" fo:text-transform="none" fo:color="#000000" loext:opacity="100%" style:font-name="Times New Roman" fo:font-size="14pt" fo:letter-spacing="normal" fo:font-style="italic" fo:font-weight="normal" officeooo:rsid="001193e5" style:font-size-asian="14pt" style:font-style-asian="italic" style:font-size-complex="14pt"/>
    </style:style>
    <style:style style:name="T50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officeooo:rsid="000f61f4"/>
    </style:style>
    <style:style style:name="T54" style:family="text">
      <style:text-properties fo:font-weight="normal" style:font-weight-asian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15.473cm" fo:min-width="16.596cm" fo:padding-top="0.025cm" fo:padding-bottom="0.025cm" fo:padding-left="0.025cm" fo:padding-right="0.025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8.604cm" fo:min-width="16.409cm" fo:padding-top="0.025cm" fo:padding-bottom="0.025cm" fo:padding-left="0.025cm" fo:padding-right="0.025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18.798cm" fo:min-width="16.328cm" fo:padding-top="0.025cm" fo:padding-bottom="0.025cm" fo:padding-left="0.025cm" fo:padding-right="0.025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7.715cm" fo:min-width="16.284cm" fo:padding-top="0.025cm" fo:padding-bottom="0.025cm" fo:padding-left="0.025cm" fo:padding-right="0.025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10.862cm" fo:min-width="16.528cm" fo:padding-top="0.025cm" fo:padding-bottom="0.025cm" fo:padding-left="0.025cm" fo:padding-right="0.025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6"><text:span text:style-name="T1">МИНИСТЕРСТВО НАУКИ И ВЫСШЕГО ОБРАЗОВАНИЯ<text:line-break/> РОССИЙСКОЙ ФЕДЕРАЦИИ</text:span><text:span text:style-name="T1"/></text:h>
      <text:h text:style-name="P2" text:outline-level="6">ФЕДЕРАЛЬНОЕ ГОСУДАРСТВЕННОЕ АВТОНОМНОЕ ОБРАЗОВАТЕЛЬНОЕ УЧРЕЖДЕНИЕ ВЫСШЕГО ОБРАЗОВАНИЯ<text:span text:style-name="T1"/></text:h>
      <text:h text:style-name="P2" text:outline-level="6">НОВОСИБИРСКИЙ НАЦИОНАЛЬНЫЙ ИССЛЕДОВАТЕЛЬСКИЙ ГОСУДАРСТВЕННЫЙ УНИВЕРСИТЕТ</text:h>
      <text:h text:style-name="P3" text:outline-level="6">Факультет информационных технологий<text:span text:style-name="T1"/></text:h>
      <text:p text:style-name="P4">Кафедра параллельных вычислений</text:p>
      <text:p text:style-name="P5"/>
      <text:p text:style-name="P6"/>
      <text:h text:style-name="P7" text:outline-level="7">ОТЧЕТ</text:h>
      <text:h text:style-name="P8" text:outline-level="7">О ВЫПОЛНЕНИИ ПРАКТИЧЕСКОЙ РАБОТЫ</text:h>
      <text:p text:style-name="P9"/>
      <text:p text:style-name="P10">«Таймеры и опции компиляции»</text:p>
      <text:p text:style-name="P10"/>
      <text:p text:style-name="P10">студентки <text:span text:style-name="T2">2</text:span> курса, <text:span text:style-name="T2">24203 </text:span>группы</text:p>
      <text:p text:style-name="P10"/>
      <text:p text:style-name="P11">Ким Дарьи Александровной</text:p>
      <text:p text:style-name="P12"/>
      <text:p text:style-name="P13">Направление 09.03.01 – «Информатика и вычислительная техника»</text:p>
      <text:p text:style-name="P14"/>
      <text:p text:style-name="Standard"/>
      <text:p text:style-name="Standard"/>
      <text:p text:style-name="P15">Преподаватель:</text:p>
      <text:p text:style-name="P15">Власенко Андрей Юрьевич</text:p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Новосибирск 20<text:span text:style-name="T2">25</text:span></text:p>
      <text:p text:style-name="P16">СОДЕРЖАНИЕ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a xlink:type="simple" xlink:href="#__RefHeading___Toc18443921" text:style-name="Index_20_Link" text:visited-style-name="Index_20_Link"><text:span text:style-name="T3">ЦЕЛЬ<text:tab/>3</text:span></text:a><text:span text:style-name="T4"/></text:p>
          <text:p text:style-name="P17"><text:a xlink:type="simple" xlink:href="#__RefHeading___Toc18443922" text:style-name="Index_20_Link" text:visited-style-name="Index_20_Link"><text:span text:style-name="T3">ЗАДАНИЕ<text:tab/>3</text:span></text:a></text:p>
          <text:p text:style-name="P17"><text:a xlink:type="simple" xlink:href="#__RefHeading___Toc18443923" text:style-name="Index_20_Link" text:visited-style-name="Index_20_Link"><text:span text:style-name="T3">ОПИСАНИЕ РАБОТЫ<text:tab/>4</text:span></text:a></text:p>
          <text:p text:style-name="P17"><text:a xlink:type="simple" xlink:href="#__RefHeading___Toc18443924" text:style-name="Index_20_Link" text:visited-style-name="Index_20_Link"><text:span text:style-name="T3">ЗАКЛЮЧЕНИЕ<text:tab/></text:span></text:a><text:span text:style-name="T5">11</text:span></text:p>
        </text:index-body>
      </text:table-of-content>
      <text:p text:style-name="P18"/>
      <text:p text:style-name="P19"/>
      <text:h text:style-name="P20" text:outline-level="1"><text:bookmark-start text:name="__RefHeading___Toc18443921"/>ЦЕЛЬ<text:bookmark-end text:name="__RefHeading___Toc18443921"/></text:h>
      <text:p text:style-name="Standard"/>
      <text:p text:style-name="P21"><text:span text:style-name="T6">Рассмотреть уровни </text:span><text:span text:style-name="T7">оптимизации</text:span><text:span text:style-name="T8"> </text:span><text:span text:style-name="T9">-00, -01, -02, - 03, -Os, -Ofast, - 0g под архитектуру процессора ×86 (x86-64), используя методику измерения времени работы программы.</text:span></text:p>
      <text:p text:style-name="P22"/>
      <text:h text:style-name="Heading_20_1" text:outline-level="1"><text:bookmark-start text:name="__RefHeading___Toc18443922"/>ЗАДАНИЕ<text:bookmark-end text:name="__RefHeading___Toc18443922"/></text:h>
      <text:p text:style-name="P23"><text:span text:style-name="T10"/></text:p>
      <text:p text:style-name="P24">Написать программу на языке С++, осуществляющую алгоритм вычисления числа Пи методом Монте-Карло, для изучения разных уровней оптимизации <text:span text:style-name="T11">(</text:span><text:span text:style-name="T12">-00, -01, -02, - 03, -Os, -Ofast, - 0g </text:span><text:span text:style-name="T11">)</text:span>. </text:p>
      <text:h text:style-name="P20" text:outline-level="1"><text:bookmark-start text:name="__RefHeading___Toc18443923"/>ОПИСАНИЕ РАБОТЫ<text:bookmark-end text:name="__RefHeading___Toc18443923"/></text:h>
      <text:p text:style-name="Standard"/>
      <text:p text:style-name="P25">Реализация функции вычисления числа Пи методом Монте-Карло:</text:p>
      <text:p text:style-name="P26"/>
      <text:p text:style-name="P27"><text:tab/><text:tab/><text:tab/><text:tab/><text:tab/><text:tab/><text:tab/><text:tab/><text:tab/><text:tab/><text:tab/>Листинг <text:span text:style-name="T13">1</text:span></text:p>
      <text:p text:style-name="P28"><draw:custom-shape text:anchor-type="paragraph" draw:z-index="3" draw:name="Shape 1" draw:style-name="gr1" draw:text-style-name="P29" svg:width="16.647cm" svg:height="15.523cm" svg:x="-0.113cm" svg:y="0.162cm"><text:p/><draw:enhanced-geometry svg:viewBox="0 0 21600 21600" draw:type="rectangle" draw:enhanced-path="M 0 0 L 21600 0 21600 21600 0 21600 0 0 Z N"/></draw:custom-shape></text:p>
      <text:p text:style-name="P30" loext:marker-style-name="T8"><text:span text:style-name="T8">#include &lt;</text:span><text:span text:style-name="T14">i</text:span><text:span text:style-name="T8">ostream&gt;</text:span></text:p>
      <text:p text:style-name="P31" loext:marker-style-name="T8"><text:span text:style-name="T8">#include &lt;random&gt; </text:span></text:p>
      <text:p text:style-name="P31" loext:marker-style-name="T8"><text:span text:style-name="T8">#include &lt;time.h&gt; </text:span></text:p>
      <text:p text:style-name="P31" loext:marker-style-name="T8"><text:span text:style-name="T8"/></text:p>
      <text:p text:style-name="P31" loext:marker-style-name="T8"><text:span text:style-name="T8">using namespace std;</text:span></text:p>
      <text:p text:style-name="P31" loext:marker-style-name="T8"><text:span text:style-name="T8"/></text:p>
      <text:p text:style-name="P30" loext:marker-style-name="T8"><text:span text:style-name="T8">double numberPi(int n){</text:span></text:p>
      <text:p text:style-name="P30" loext:marker-style-name="T8"><text:span text:style-name="T8"/></text:p>
      <text:p text:style-name="P31" loext:marker-style-name="T8"><text:span text:style-name="T8"><text:tab/>struct timespec start, end; </text:span></text:p>
      <text:p text:style-name="P31" loext:marker-style-name="T8"><text:span text:style-name="T8"><text:tab/>clock_gettime (CLOCK_MONOTONIC_RAW, &amp;start);</text:span></text:p>
      <text:p text:style-name="P31" loext:marker-style-name="T8"><text:span text:style-name="T8"/></text:p>
      <text:p text:style-name="P31" loext:marker-style-name="T8"><text:span text:style-name="T8"><text:tab/>int m = 0; </text:span></text:p>
      <text:p text:style-name="P31" loext:marker-style-name="T8"><text:span text:style-name="T8"><text:tab/>double x; </text:span></text:p>
      <text:p text:style-name="P31" loext:marker-style-name="T8"><text:span text:style-name="T8"><text:tab/>double y;</text:span></text:p>
      <text:p text:style-name="P31" loext:marker-style-name="T8"><text:span text:style-name="T8"/></text:p>
      <text:p text:style-name="P30" loext:marker-style-name="T8"><text:span text:style-name="T8"><text:tab/>random_device rd;</text:span><text:span text:style-name="T8"/></text:p>
      <text:p text:style-name="P30" loext:marker-style-name="T8"><text:span text:style-name="T8"><text:tab/>uniform_real_distribution&lt;double&gt; dist (-1.0,1.0);</text:span></text:p>
      <text:p text:style-name="P30" loext:marker-style-name="T8"><text:span text:style-name="T8"/></text:p>
      <text:p text:style-name="P30" loext:marker-style-name="T8"><text:span text:style-name="T8"><text:tab/>for (int i = 0;i &lt; n; i++){</text:span></text:p>
      <text:p text:style-name="P30" loext:marker-style-name="T8"><text:span text:style-name="T8"><text:tab/><text:tab/>x = dist(rd);</text:span></text:p>
      <text:p text:style-name="P30" loext:marker-style-name="T8"><text:span text:style-name="T8"><text:tab/><text:tab/>y = dist(rd);</text:span></text:p>
      <text:p text:style-name="P30" loext:marker-style-name="T8"><text:span text:style-name="T8"><text:tab/><text:tab/>if (x*x+y*y&lt;=1){</text:span></text:p>
      <text:p text:style-name="P30" loext:marker-style-name="T8"><text:span text:style-name="T8"><text:tab/><text:tab/><text:tab/>m+=1;</text:span></text:p>
      <text:p text:style-name="P30" loext:marker-style-name="T8"><text:span text:style-name="T8"><text:tab/><text:tab/></text:span><text:span text:style-name="T15">}</text:span></text:p>
      <text:p text:style-name="P30" loext:marker-style-name="T8"><text:span text:style-name="T8"><text:tab/>}</text:span></text:p>
      <text:p text:style-name="P30" loext:marker-style-name="T8"><text:span text:style-name="T8"/></text:p>
      <text:p text:style-name="P30" loext:marker-style-name="T8"><text:span text:style-name="T8"><text:tab/>double p = 4.0*m/n;</text:span><text:span text:style-name="T8"/></text:p>
      <text:p text:style-name="P30" loext:marker-style-name="T8"><text:span text:style-name="T8"><text:tab/>cout « "Number Pi: " « p « endl;</text:span></text:p>
      <text:p text:style-name="P30" loext:marker-style-name="T8"><text:span text:style-name="T8"/></text:p>
      <text:p text:style-name="P31" loext:marker-style-name="T8"><text:span text:style-name="T8"><text:tab/>clock_gettime (CLOCK_MONOTONIC_RAW, &amp;end); </text:span></text:p>
      <text:p text:style-name="P31" loext:marker-style-name="T8"><text:span text:style-name="T8"><text:tab/>cout &lt;&lt; <text:s/>"Time taken:" <text:s/>&lt;&lt; <text:s/>end.tv_sec-start.tv_sec </text:span></text:p>
      <text:p text:style-name="P31" loext:marker-style-name="T8"><text:span text:style-name="T8"><text:tab/>+ 0.000000001*(end.tv_nsec-start.tv_nsec) <text:s/>&lt;&lt; <text:s/>"sec." &lt;&lt; endl; </text:span></text:p>
      <text:p text:style-name="P31" loext:marker-style-name="T8"><text:span text:style-name="T8"/></text:p>
      <text:p text:style-name="P31" loext:marker-style-name="T8"><text:span text:style-name="T8"><text:tab/>return 0;</text:span></text:p>
      <text:p text:style-name="P32">}</text:p>
      <text:p text:style-name="P28"/>
      <text:p text:style-name="P33">1) Ввод в программу необходимых библиотек:</text:p>
      <text:list text:style-name="L1">
        <text:list-item>
          <text:p text:style-name="P34">iostream — для ввода и вывода,</text:p>
        </text:list-item>
        <text:list-item>
          <text:p text:style-name="P34">random — для последующей генерации координат,</text:p>
        </text:list-item>
        <text:list-item>
          <text:p text:style-name="P34">time.h — для измерения времени работы программы.</text:p>
        </text:list-item>
      </text:list>
      <text:p text:style-name="P35"/>
      <text:p text:style-name="P35">2) Использование пространство имен std (стандартной библиотеки) для упрощения написания последующей работы.</text:p>
      <text:p text:style-name="P36"><text:soft-page-break/></text:p>
      <text:p text:style-name="P35">3)Осуществление программы «таймера» для измерения времени работы алгоритма вычисления числа Пи через библиотечную функцию clock_gettime. <text:span text:style-name="T16">(</text:span>В этой программе был взят код, представленный в лабораторной работе№1<text:span text:style-name="T16">)</text:span>. </text:p>
      <text:p text:style-name="P36"><text:s text:c="37"/><text:tab/><text:tab/><text:tab/><text:tab/><text:tab/><text:tab/><text:tab/><text:tab/><text:span text:style-name="T17">Листинг </text:span><text:span text:style-name="T18">2</text:span></text:p>
      <text:p text:style-name="P37"><draw:custom-shape text:anchor-type="paragraph" draw:z-index="4" draw:name="Shape 2" draw:style-name="gr2" draw:text-style-name="P29" svg:width="16.46cm" svg:height="8.654cm" svg:x="-0.016cm" svg:y="-0.132cm"><text:p text:style-name="Frame_20_contents"/><draw:enhanced-geometry svg:viewBox="0 0 21600 21600" draw:type="rectangle" draw:enhanced-path="M 0 0 L 21600 0 21600 21600 0 21600 0 0 Z N"/></draw:custom-shape></text:p>
      <text:p text:style-name="P38">#include &lt;time.h&gt; </text:p>
      <text:p text:style-name="P37"/>
      <text:p text:style-name="P37"><text:span text:style-name="T8">using namespace std;</text:span></text:p>
      <text:p text:style-name="P37"/>
      <text:p text:style-name="P37"><text:span text:style-name="T8">double numberPi(int n){</text:span></text:p>
      <text:p text:style-name="P37"/>
      <text:p text:style-name="P38">struct timespec start, end; </text:p>
      <text:p text:style-name="P38">clock_gettime (CLOCK_MONOTONIC_RAW, &amp;start);</text:p>
      <text:p text:style-name="P37">//<text:span text:style-name="T19">my code</text:span></text:p>
      <text:p text:style-name="P37"/>
      <text:p text:style-name="P38">clock_gettime (CLOCK_MONOTONIC_RAW, &amp;end); </text:p>
      <text:p text:style-name="P38">cout &lt;&lt; <text:s/>"Time taken:" <text:s/>&lt;&lt; <text:s/>end.tv_sec-start.tv_sec </text:p>
      <text:p text:style-name="P38">+ 0.000000001*(end.tv_nsec-start.tv_nsec) <text:s/>&lt;&lt; <text:s/>"sec." &lt;&lt; endl; </text:p>
      <text:p text:style-name="P37"/>
      <text:p text:style-name="P37"><text:span text:style-name="T8">return 0;</text:span></text:p>
      <text:p text:style-name="P39">}</text:p>
      <text:p text:style-name="P40"><text:span text:style-name="T6"/></text:p>
      <text:p text:style-name="P41">Данная методика измерения времени была взята по следующим причинам:</text:p>
      <text:list text:style-name="L2">
        <text:list-item>
          <text:p text:style-name="P42"><text:span text:style-name="T6">Точность измерения времени </text:span><text:span text:style-name="T20">~1нс (10^9с) достаточна для нашего проекта.</text:span></text:p>
        </text:list-item>
        <text:list-item>
          <text:p text:style-name="P43"><text:span text:style-name="T6">Для рассмотрения </text:span><text:span text:style-name="T9">-</text:span><text:span text:style-name="T21">O</text:span><text:span text:style-name="T9">0, -</text:span><text:span text:style-name="T21">O</text:span><text:span text:style-name="T9">1, -</text:span><text:span text:style-name="T21">O</text:span><text:span text:style-name="T9">2, - </text:span><text:span text:style-name="T21">O</text:span><text:span text:style-name="T9">3, -Os, -Ofast, - </text:span><text:span text:style-name="T21">O</text:span><text:span text:style-name="T9">g</text:span><text:span text:style-name="T6"> нам не нужен точный замер времени, так как предоставляя одинаковый счетчик времени для компиляции программ с разными уровнями оптимизации мы и так сможем увидеть разницу между </text:span><text:span text:style-name="T22">их временными характеристиками (скоростью компиляции)</text:span><text:span text:style-name="T6">. Значит то, что и</text:span><text:span text:style-name="T20">нтервал времени включает в себя работы других процессов, которые работали на процессоре в </text:span><text:span text:style-name="T6">измеряемый период, никак не повлияет на наш вывод.</text:span></text:p>
        </text:list-item>
      </text:list>
      <text:p text:style-name="P44"/>
      <text:p text:style-name="P44"/>
      <text:p text:style-name="P44"/>
      <text:p text:style-name="P44"/>
      <text:p text:style-name="P45" loext:marker-style-name="T10"><text:span text:style-name="T10"/></text:p>
      <text:p text:style-name="P45" loext:marker-style-name="T10"><text:span text:style-name="T10"/></text:p>
      <text:p text:style-name="P45" loext:marker-style-name="T10"><text:span text:style-name="T10"/></text:p>
      <text:p text:style-name="P46"><text:soft-page-break/><text:span text:style-name="T6">Но данный этап можно было бы пропустить, при использовании утилиты </text:span><text:span text:style-name="T23">time. Замер времени был бы менее точным, но на общий результат это никак не повлияло бы.</text:span></text:p>
      <text:p text:style-name="P47" loext:marker-style-name="T10"><text:span text:style-name="T10"><text:tab/><text:tab/><text:tab/><text:tab/><text:tab/><text:tab/><text:tab/><text:tab/><text:tab/><text:tab/><text:tab/>Листинг 3</text:span></text:p>
      <text:p text:style-name="P48"><draw:custom-shape text:anchor-type="paragraph" draw:z-index="1" draw:name="Shape 5" draw:style-name="gr3" draw:text-style-name="P29" svg:width="16.378cm" svg:height="18.848cm" svg:x="0cm" svg:y="-0.307cm"><text:p/><draw:enhanced-geometry svg:viewBox="0 0 21600 21600" draw:type="rectangle" draw:enhanced-path="M 0 0 L 21600 0 21600 21600 0 21600 0 0 Z N"/></draw:custom-shape><text:span text:style-name="T24">// Исправленная п</text:span><text:span text:style-name="T25">рограмма для использования утилиты time</text:span></text:p>
      <text:p text:style-name="P30" loext:marker-style-name="T8"><text:span text:style-name="T26">#include &lt;iostream&gt;</text:span></text:p>
      <text:p text:style-name="P49" loext:marker-style-name="T8"><text:span text:style-name="T8">#include &lt;random&gt; </text:span></text:p>
      <text:p text:style-name="P49" loext:marker-style-name="T8"><text:span text:style-name="T8">#include &lt;time.h&gt; </text:span></text:p>
      <text:p text:style-name="P49" loext:marker-style-name="T8"><text:span text:style-name="T8">using namespace std;</text:span></text:p>
      <text:p text:style-name="P49" loext:marker-style-name="T8"><text:span text:style-name="T8"/></text:p>
      <text:p text:style-name="P30" loext:marker-style-name="T8"><text:span text:style-name="T8">double numberPi (int n) </text:span><text:span text:style-name="T27">{</text:span></text:p>
      <text:p text:style-name="P49" loext:marker-style-name="T8"><text:span text:style-name="T8"><text:tab/>int m=0; </text:span></text:p>
      <text:p text:style-name="P49" loext:marker-style-name="T8"><text:span text:style-name="T8"><text:tab/>double x; </text:span></text:p>
      <text:p text:style-name="P49" loext:marker-style-name="T8"><text:span text:style-name="T8"><text:tab/>double y;</text:span></text:p>
      <text:p text:style-name="P49" loext:marker-style-name="T8"><text:span text:style-name="T8"/></text:p>
      <text:p text:style-name="P30" loext:marker-style-name="T8"><text:span text:style-name="T8"><text:tab/>random_device rd;</text:span><text:span text:style-name="T8"/></text:p>
      <text:p text:style-name="P30" loext:marker-style-name="T8"><text:span text:style-name="T8"><text:tab/>uniform_real_distribution&lt;double&gt; dist(-1.0,1.0);</text:span><text:span text:style-name="T8"/></text:p>
      <text:p text:style-name="P30" loext:marker-style-name="T8"><text:span text:style-name="T8"><text:tab/>for (int i = 0;i &lt; n; i++) {</text:span><text:span text:style-name="T8"/></text:p>
      <text:p text:style-name="P30" loext:marker-style-name="T8"><text:span text:style-name="T8"><text:tab/><text:tab/>x = dist(rd);</text:span><text:span text:style-name="T8"/></text:p>
      <text:p text:style-name="P30" loext:marker-style-name="T8"><text:span text:style-name="T8"><text:tab/><text:tab/>y = dist(rd);</text:span></text:p>
      <text:p text:style-name="P30" loext:marker-style-name="T8"><text:span text:style-name="T8"/></text:p>
      <text:p text:style-name="P30" loext:marker-style-name="T8"><text:span text:style-name="T8"><text:tab/><text:tab/>if(x*x+y*y&lt;=1){</text:span><text:span text:style-name="T8"/></text:p>
      <text:p text:style-name="P30" loext:marker-style-name="T8"><text:span text:style-name="T8"><text:tab/><text:tab/><text:tab/>m+=1：</text:span><text:span text:style-name="T8"/></text:p>
      <text:p text:style-name="P30" loext:marker-style-name="T8"><text:span text:style-name="T8"><text:tab/><text:tab/>}</text:span></text:p>
      <text:p text:style-name="P30" loext:marker-style-name="T8"><text:span text:style-name="T8"/></text:p>
      <text:p text:style-name="P30" loext:marker-style-name="T8"><text:span text:style-name="T8"><text:tab/><text:tab/>double p = 4.0*m/n;</text:span><text:span text:style-name="T8"/></text:p>
      <text:p text:style-name="P30" loext:marker-style-name="T8"><text:span text:style-name="T8"><text:tab/><text:tab/>cout &lt;&lt; "Number Pi:" &lt;&lt; p &lt;&lt; endl;</text:span></text:p>
      <text:p text:style-name="P30" loext:marker-style-name="T8"><text:span text:style-name="T8"><text:tab/><text:tab/>return 0;</text:span><text:span text:style-name="T8"/></text:p>
      <text:p text:style-name="P30" loext:marker-style-name="T8"><text:span text:style-name="T8"><text:tab/>}</text:span></text:p>
      <text:p text:style-name="P30" loext:marker-style-name="T8"><text:span text:style-name="T8"/></text:p>
      <text:p text:style-name="P30" loext:marker-style-name="T8"><text:span text:style-name="T8">int main (int argc, char* argv [ ]) {</text:span><text:span text:style-name="T8"/></text:p>
      <text:p text:style-name="P30" loext:marker-style-name="T8"><text:span text:style-name="T8"><text:tab/>if (argc!=2) {</text:span><text:span text:style-name="T8"/></text:p>
      <text:p text:style-name="P30" loext:marker-style-name="T8"><text:span text:style-name="T8"><text:tab/><text:tab/>cerr &lt;&lt; "Error!" &lt;&lt; endl;</text:span></text:p>
      <text:p text:style-name="P30" loext:marker-style-name="T8"><text:span text:style-name="T8"><text:tab/><text:tab/>return 1;</text:span><text:span text:style-name="T8"/></text:p>
      <text:p text:style-name="P30" loext:marker-style-name="T8"><text:span text:style-name="T8"><text:tab/>}</text:span></text:p>
      <text:p text:style-name="P30" loext:marker-style-name="T8"><text:span text:style-name="T8"/></text:p>
      <text:p text:style-name="P30" loext:marker-style-name="T8"><text:span text:style-name="T8"><text:tab/>int n = atoi(argv [1]);</text:span></text:p>
      <text:p text:style-name="P30" loext:marker-style-name="T8"><text:span text:style-name="T8"/></text:p>
      <text:p text:style-name="P30" loext:marker-style-name="T8"><text:span text:style-name="T8"><text:tab/>if (n&lt;=0) {</text:span><text:span text:style-name="T8"/></text:p>
      <text:p text:style-name="P30" loext:marker-style-name="T8"><text:span text:style-name="T8"><text:tab/><text:tab/>cerr &lt;&lt; "N &gt;O !!!" &lt;&lt; endl;</text:span></text:p>
      <text:p text:style-name="P30" loext:marker-style-name="T8"><text:span text:style-name="T8"><text:tab/><text:tab/></text:span><text:span text:style-name="T27">return 1;</text:span></text:p>
      <text:p text:style-name="P50" loext:marker-style-name="T8"><text:span text:style-name="T8"><text:tab/>}</text:span></text:p>
      <text:p text:style-name="P30" loext:marker-style-name="T8"><text:span text:style-name="T8"><text:tab/>numberPi(n) ;</text:span></text:p>
      <text:p text:style-name="P30" loext:marker-style-name="T8"><text:span text:style-name="T8"/></text:p>
      <text:p text:style-name="P51" loext:marker-style-name="T10"><text:span text:style-name="T8"><text:tab/>return 0;</text:span></text:p>
      <text:p text:style-name="P52" loext:marker-style-name="T10"><text:span text:style-name="T8">}</text:span></text:p>
      <text:p text:style-name="P53">Пример:</text:p>
      <text:p text:style-name="P30" loext:marker-style-name="T8"><text:a xlink:type="simple" xlink:href="mailto:evm027@comrade" text:style-name="Internet_20_link" text:visited-style-name="Visited_20_Internet_20_Link"><text:span text:style-name="T28">evm027@comrade</text:span></text:a><text:span text:style-name="T26">: ~$ g++ program.cpp -</text:span><text:span text:style-name="T29">o</text:span><text:span text:style-name="T26"> prog -</text:span><text:span text:style-name="T29">O</text:span><text:span text:style-name="T26">0</text:span></text:p>
      <text:p text:style-name="P30" loext:marker-style-name="T8"><text:a xlink:type="simple" xlink:href="mailto:evm027@comrade" text:style-name="Internet_20_link" text:visited-style-name="Visited_20_Internet_20_Link"><text:span text:style-name="T30">evm027@comrade</text:span></text:a><text:span text:style-name="T8">: ~$</text:span><text:span text:style-name="T31"> </text:span><text:span text:style-name="T8">time ./prog 20000000</text:span></text:p>
      <text:p text:style-name="P30" loext:marker-style-name="T8"><text:span text:style-name="T8">Number Pi:3.14126</text:span><text:span text:style-name="T8"/></text:p>
      <text:p text:style-name="P54" loext:marker-style-name="T8"><text:span text:style-name="T8">real <text:s/></text:span><text:span text:style-name="T31">0</text:span><text:span text:style-name="T8">m42,910s</text:span></text:p>
      <text:p text:style-name="P54" loext:marker-style-name="T8"><text:span text:style-name="T8">user </text:span><text:span text:style-name="T31">0</text:span><text:span text:style-name="T8">m11,486</text:span><text:span text:style-name="T31">s</text:span></text:p>
      <text:p text:style-name="P30" loext:marker-style-name="T8"><text:span text:style-name="T8">sys <text:s/></text:span><text:span text:style-name="T32">0m31, 415s</text:span></text:p>
      <text:p text:style-name="P45" loext:marker-style-name="T10"><text:span text:style-name="T10"/></text:p>
      <text:p text:style-name="P45" loext:marker-style-name="T10"><text:soft-page-break/><text:span text:style-name="T10"/></text:p>
      <text:p text:style-name="P53">4) Вычисление числа Пи методом Монте-Карло:</text:p>
      <text:p text:style-name="P45" loext:marker-style-name="T10"><text:span text:style-name="T10"><text:tab/><text:tab/><text:tab/><text:tab/><text:tab/><text:tab/><text:tab/><text:tab/><text:tab/><text:tab/><text:tab/>Листинг </text:span><text:span text:style-name="T33">4</text:span></text:p>
      <text:p text:style-name="P55" loext:marker-style-name="T8"><draw:custom-shape text:anchor-type="paragraph" draw:z-index="2" draw:name="Shape 3" draw:style-name="gr4" draw:text-style-name="P29" svg:width="16.334cm" svg:height="7.765cm" svg:x="0.065cm" svg:y="-0.326cm"><text:p text:style-name="Frame_20_contents"/><draw:enhanced-geometry svg:viewBox="0 0 21600 21600" draw:type="rectangle" draw:enhanced-path="M 0 0 L 21600 0 21600 21600 0 21600 0 0 Z N"/></draw:custom-shape><text:span text:style-name="T8"><text:tab/>int m = 0; </text:span></text:p>
      <text:p text:style-name="P56" loext:marker-style-name="T8"><text:span text:style-name="T8">double x; </text:span></text:p>
      <text:p text:style-name="P56" loext:marker-style-name="T8"><text:span text:style-name="T8">double y;</text:span></text:p>
      <text:p text:style-name="P56" loext:marker-style-name="T8"><text:span text:style-name="T8"/></text:p>
      <text:p text:style-name="P56" loext:marker-style-name="T8"><text:span text:style-name="T8">random_device rd;</text:span></text:p>
      <text:p text:style-name="P56" loext:marker-style-name="T8"><text:span text:style-name="T8">uniform_real_distribution&lt;double&gt; dist (-1.0,1.0);</text:span></text:p>
      <text:p text:style-name="P56" loext:marker-style-name="T8"><text:span text:style-name="T8"/></text:p>
      <text:p text:style-name="P56" loext:marker-style-name="T8"><text:span text:style-name="T8">for (int i = 0;i &lt; n; i++){</text:span></text:p>
      <text:p text:style-name="P56" loext:marker-style-name="T8"><text:span text:style-name="T8"><text:tab/>x = dist(rd);</text:span></text:p>
      <text:p text:style-name="P56" loext:marker-style-name="T8"><text:span text:style-name="T8"><text:tab/>y = dist(rd);</text:span></text:p>
      <text:p text:style-name="P56" loext:marker-style-name="T8"><text:span text:style-name="T8"><text:tab/>if (x*x+y*y&lt;=1){</text:span></text:p>
      <text:p text:style-name="P56" loext:marker-style-name="T8"><text:span text:style-name="T8"><text:tab/><text:tab/>m+=1;</text:span></text:p>
      <text:p text:style-name="P56" loext:marker-style-name="T8"><text:span text:style-name="T8"><text:tab/></text:span><text:span text:style-name="T15">}</text:span></text:p>
      <text:p text:style-name="P56" loext:marker-style-name="T8"><text:span text:style-name="T8">}</text:span></text:p>
      <text:p text:style-name="P56" loext:marker-style-name="T8"><text:span text:style-name="T8"/></text:p>
      <text:p text:style-name="P56" loext:marker-style-name="T8"><text:span text:style-name="T8">double p = 4.0*m/n;</text:span></text:p>
      <text:p text:style-name="P56" loext:marker-style-name="T8"><text:span text:style-name="T26">cout « "Number Pi: " « p « endl;</text:span></text:p>
      <text:list text:style-name="WW8Num1">
        <text:list-header>
          <text:p text:style-name="P57" loext:marker-style-name="T10"/>
        </text:list-header>
        <text:list-item>
          <text:p text:style-name="P58">Используемые обозначения:</text:p>
        </text:list-item>
      </text:list>
      <text:p text:style-name="P59"><text:span text:style-name="T34"><text:tab/>m</text:span> — количество точек, попавших в пределы окружности <text:span text:style-name="T35">(попавших <text:tab/>внутрь <text:s/>x^2+y^2=1)</text:span></text:p>
      <text:p text:style-name="P60"><text:span text:style-name="T34"><text:tab/>x,y</text:span> — координаты точек.</text:p>
      <text:p text:style-name="P61"><text:tab/>Аргумент <text:span text:style-name="T34">n</text:span> поступающий в функцию numberPi — количество всех <text:tab/>взятых точек <text:span text:style-name="T36">(бросков)</text:span>.</text:p>
      <text:p text:style-name="P62"><text:span text:style-name="T34"><text:tab/>p </text:span>- число Пи.</text:p>
      <text:list text:style-name="L3">
        <text:list-item>
          <text:p text:style-name="P63">Инициализация <text:span text:style-name="T34">m, x, y</text:span>.</text:p>
        </text:list-item>
      </text:list>
      <text:list text:style-name="L4">
        <text:list-item>
          <text:p text:style-name="P64"><text:span text:style-name="T37">Создание «зерна» для генерации последующих случайных чисел (</text:span><text:span text:style-name="T38">random device rd</text:span><text:span text:style-name="T37">).</text:span></text:p>
        </text:list-item>
        <text:list-item>
          <text:p text:style-name="P64"><text:span text:style-name="T37">Равномерное распределение случайных чисел в квадрат с центром в токе (0,0) и стороной 2 ( </text:span><text:span text:style-name="T38">uniform_real_distribution&lt;double&gt; dist(-1.0, 1.0)</text:span><text:span text:style-name="T37"> )</text:span></text:p>
        </text:list-item>
        <text:list-item>
          <text:p text:style-name="P64"><text:span text:style-name="T39">Цикл для прохождении по всем </text:span><text:span text:style-name="T40">n</text:span><text:span text:style-name="T39"> точкам и вычислении </text:span><text:span text:style-name="T40">m</text:span><text:span text:style-name="T39"> точек.</text:span></text:p>
        </text:list-item>
        <text:list-item>
          <text:p text:style-name="P64"><text:span text:style-name="T39">Вычисление числа Пи по формуле </text:span><text:span text:style-name="T41">π ≈ </text:span><text:span text:style-name="T42">4m/n. </text:span></text:p>
        </text:list-item>
        <text:list-item>
          <text:p text:style-name="P65">Вывод результата.</text:p>
        </text:list-item>
      </text:list>
      <text:p text:style-name="P66"><text:span text:style-name="T43"/></text:p>
      <text:p text:style-name="P67"><text:span text:style-name="T43"/></text:p>
      <text:p text:style-name="P67"><text:soft-page-break/><text:span text:style-name="T44"/></text:p>
      <text:p text:style-name="P67"><text:span text:style-name="T44"/></text:p>
      <text:p text:style-name="P68"><text:span text:style-name="T6">Реализация</text:span><text:span text:style-name="T42"> функции main для рассмотрения нескольких значений (0.5n , n , 1.5n) :</text:span></text:p>
      <text:p text:style-name="P67"><text:span text:style-name="T43"><text:tab/><text:tab/><text:tab/><text:tab/><text:tab/><text:tab/><text:tab/><text:tab/><text:tab/><text:tab/><text:tab/>Листинг </text:span><text:span text:style-name="T45">5</text:span></text:p>
      <text:p text:style-name="P30" loext:marker-style-name="T8"><draw:custom-shape text:anchor-type="paragraph" draw:z-index="0" draw:name="Shape 4" draw:style-name="gr5" draw:text-style-name="P29" svg:width="16.578cm" svg:height="10.912cm" svg:x="-0.111cm" svg:y="-0.312cm"><text:p text:style-name="Frame_20_contents"/><draw:enhanced-geometry svg:viewBox="0 0 21600 21600" draw:type="rectangle" draw:enhanced-path="M 0 0 L 21600 0 21600 21600 0 21600 0 0 Z N"/></draw:custom-shape><text:span text:style-name="T46">int main (int argc, char* argv[ </text:span><text:span text:style-name="T47">]</text:span><text:span text:style-name="T46">) </text:span><text:span text:style-name="T8">{</text:span></text:p>
      <text:p text:style-name="P30" loext:marker-style-name="T8"><text:span text:style-name="T8"><text:tab/>if (argc!=2) {</text:span></text:p>
      <text:p text:style-name="P69" loext:marker-style-name="T8"><text:span text:style-name="T8"><text:tab/><text:tab/>cerr &lt;&lt; "Error!" &lt;&lt; endl; </text:span></text:p>
      <text:p text:style-name="P69" loext:marker-style-name="T8"><text:span text:style-name="T8"><text:tab/><text:tab/>return 1;</text:span></text:p>
      <text:p text:style-name="P30" loext:marker-style-name="T8"><text:span text:style-name="T8"><text:tab/>}</text:span></text:p>
      <text:p text:style-name="P30" loext:marker-style-name="T8"><text:span text:style-name="T8"/></text:p>
      <text:p text:style-name="P30" loext:marker-style-name="T8"><text:span text:style-name="T8"><text:tab/>int n = atoi(argv[1]);</text:span></text:p>
      <text:p text:style-name="P30" loext:marker-style-name="T8"><text:span text:style-name="T8"/></text:p>
      <text:p text:style-name="P30" loext:marker-style-name="T8"><text:span text:style-name="T8"><text:tab/>if (n&lt;=0) {</text:span></text:p>
      <text:p text:style-name="P30" loext:marker-style-name="T8"><text:span text:style-name="T8"><text:tab/><text:tab/>cerr <text:s/>&lt;&lt; "N &gt; 0 !!!" &lt;&lt; <text:s/>endl;</text:span></text:p>
      <text:p text:style-name="P30" loext:marker-style-name="T8"><text:span text:style-name="T8"><text:tab/><text:tab/></text:span><text:span text:style-name="T48">return1;</text:span></text:p>
      <text:p text:style-name="P30" loext:marker-style-name="T8"><text:span text:style-name="T8"><text:tab/>}</text:span></text:p>
      <text:p text:style-name="P30" loext:marker-style-name="T8"><text:span text:style-name="T8"/></text:p>
      <text:p text:style-name="P30" loext:marker-style-name="T8"><text:span text:style-name="T8"><text:tab/>cout &lt;&lt; "\033[32m" &lt;&lt; <text:s/>"----- 0.5*N ----- " &lt;&lt; <text:s/>"\033 [0m" &lt;&lt; </text:span><text:span text:style-name="T48">endl;</text:span></text:p>
      <text:p text:style-name="P30" loext:marker-style-name="T8"><text:span text:style-name="T8"><text:tab/>numberPi(0.5*n);</text:span></text:p>
      <text:p text:style-name="P30" loext:marker-style-name="T8"><text:span text:style-name="T8"/></text:p>
      <text:p text:style-name="P30" loext:marker-style-name="T8"><text:span text:style-name="T8"><text:tab/>cout &lt;&lt; "\033[32m" &lt;&lt; "-------N -------" &lt;&lt; <text:s/>"\033[0m" &lt;&lt; </text:span><text:span text:style-name="T48">endl;</text:span></text:p>
      <text:p text:style-name="P30" loext:marker-style-name="T8"><text:span text:style-name="T8"><text:tab/>numberPi(n);</text:span></text:p>
      <text:p text:style-name="P30" loext:marker-style-name="T8"><text:span text:style-name="T8"/></text:p>
      <text:p text:style-name="P30" loext:marker-style-name="T8"><text:span text:style-name="T8"><text:tab/>cout &lt;&lt; "\033[32m" &lt;&lt; "----- 1.5*N -----" &lt;&lt; "\033[0m" &lt;&lt; </text:span><text:span text:style-name="T48">endl;</text:span></text:p>
      <text:p text:style-name="P30" loext:marker-style-name="T8"><text:span text:style-name="T8"><text:tab/>numberPi(1.5*n);</text:span></text:p>
      <text:p text:style-name="P30" loext:marker-style-name="T8"><text:span text:style-name="T8"/></text:p>
      <text:p text:style-name="P30" loext:marker-style-name="T8"><text:span text:style-name="T8">return 0;</text:span><text:span text:style-name="T8"/></text:p>
      <text:p text:style-name="P70" loext:marker-style-name="T8"><text:span text:style-name="T49"><text:tab/></text:span><text:span text:style-name="T50">}</text:span></text:p>
      <text:p text:style-name="P71"><text:span text:style-name="T10"/></text:p>
      <text:list text:style-name="L5">
        <text:list-item>
          <text:p text:style-name="P72">Проверка на возможные ошибки ввода.</text:p>
        </text:list-item>
        <text:list-item>
          <text:p text:style-name="P72">Запуск функции numberPi при разных значениях числа бросков.</text:p>
        </text:list-item>
      </text:list>
      <text:p text:style-name="P73"><text:span text:style-name="T51"/></text:p>
      <text:p text:style-name="P74"><text:span text:style-name="T51"/></text:p>
      <text:p text:style-name="P74"><text:span text:style-name="T51"/></text:p>
      <text:p text:style-name="P74"><text:span text:style-name="T51"/></text:p>
      <text:p text:style-name="P74"><text:span text:style-name="T51"/></text:p>
      <text:p text:style-name="P74"><text:span text:style-name="T51"/></text:p>
      <text:p text:style-name="P74"><text:span text:style-name="T51"/></text:p>
      <text:p text:style-name="P74"><text:span text:style-name="T51"/></text:p>
      <text:p text:style-name="P74"><text:span text:style-name="T51"/></text:p>
      <text:p text:style-name="P74"><text:soft-page-break/><text:span text:style-name="T51"/></text:p>
      <text:p text:style-name="P75">Компиляция и запуск программы с разными уровнями оптимизации:</text:p>
      <text:list text:style-name="L6">
        <text:list-item>
          <text:p text:style-name="P76">Компиляция:</text:p>
        </text:list-item>
      </text:list>
      <text:p text:style-name="P74"><text:a xlink:type="simple" xlink:href="mailto:evm027@comrade" text:style-name="Internet_20_link" text:visited-style-name="Visited_20_Internet_20_Link"><text:span text:style-name="T52">evm027@comrade</text:span></text:a><text:span text:style-name="T52">:~$ g++ program.cpp -o p0 -O0</text:span></text:p>
      <text:p text:style-name="P74"><text:a xlink:type="simple" xlink:href="mailto:evm027@comrade" text:style-name="Internet_20_link" text:visited-style-name="Visited_20_Internet_20_Link"><text:span text:style-name="T52">evm027@comrade</text:span></text:a><text:span text:style-name="T52">:~$ g++ program.cpp -o p1 -O1</text:span></text:p>
      <text:p text:style-name="P74"><text:a xlink:type="simple" xlink:href="mailto:evm027@comrade" text:style-name="Internet_20_link" text:visited-style-name="Visited_20_Internet_20_Link"><text:span text:style-name="T52">evm027@comrade</text:span></text:a><text:span text:style-name="T52">:~$ g++ program.cpp -o p2 -O2</text:span></text:p>
      <text:p text:style-name="P74"><text:a xlink:type="simple" xlink:href="mailto:evm027@comrade" text:style-name="Internet_20_link" text:visited-style-name="Visited_20_Internet_20_Link"><text:span text:style-name="T52">evm027@comrade</text:span></text:a><text:span text:style-name="T52">:~$ g++ program.cpp -o p3 -O3</text:span></text:p>
      <text:p text:style-name="P74"><text:a xlink:type="simple" xlink:href="mailto:evm027@comrade" text:style-name="Internet_20_link" text:visited-style-name="Visited_20_Internet_20_Link"><text:span text:style-name="T52">evm027@comrade</text:span></text:a><text:span text:style-name="T52">:~$ g++ program.cpp -o ps -Os</text:span></text:p>
      <text:p text:style-name="P74"><text:a xlink:type="simple" xlink:href="mailto:evm027@comrade" text:style-name="Internet_20_link" text:visited-style-name="Visited_20_Internet_20_Link"><text:span text:style-name="T52">evm027@comrade</text:span></text:a><text:span text:style-name="T52">:~$ g++ program.cpp -o pf -Ofast</text:span></text:p>
      <text:p text:style-name="P74"><text:a xlink:type="simple" xlink:href="mailto:evm027@comrade" text:style-name="Internet_20_link" text:visited-style-name="Visited_20_Internet_20_Link"><text:span text:style-name="T52">evm027@comrade</text:span></text:a><text:span text:style-name="T52">:~$ g++ program.cpp -o pg -Og</text:span></text:p>
      <text:list text:style-name="L7">
        <text:list-item>
          <text:p text:style-name="P77">Результаты:</text:p>
        </text:list-item>
      </text:list>
      <text:p text:style-name="P78">Рассматриваем при n = 20 000 000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79"/>
            <text:p text:style-name="P79">Уровень оптимизации</text:p>
          </table:table-cell>
          <table:table-cell table:style-name="Table1.B1" table:number-columns-spanned="3" office:value-type="string">
            <text:p text:style-name="P80">Число бросков 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80">0.5n</text:p>
          </table:table-cell>
          <table:table-cell table:style-name="Table1.B2" office:value-type="string">
            <text:p text:style-name="P81"><text:s text:c="7"/>n</text:p>
          </table:table-cell>
          <table:table-cell table:style-name="Table1.D2" office:value-type="string">
            <text:p text:style-name="P81"><text:s text:c="5"/>1.5n</text:p>
          </table:table-cell>
        </table:table-row>
        <table:table-row>
          <table:table-cell table:style-name="Table1.B2" office:value-type="string">
            <text:p text:style-name="P80">O0</text:p>
          </table:table-cell>
          <table:table-cell table:style-name="Table1.B2" office:value-type="string">
            <text:p text:style-name="P82">Pi: <text:span text:style-name="T8">3.14212</text:span></text:p>
            <text:p text:style-name="P82">Time: <text:span text:style-name="T8">22.1935 sec</text:span></text:p>
          </table:table-cell>
          <table:table-cell table:style-name="Table1.B2" office:value-type="string">
            <text:p text:style-name="P82">Pi: <text:span text:style-name="T8">3.14156</text:span></text:p>
            <text:p text:style-name="P82">Time: <text:span text:style-name="T8">43.0859 sec</text:span></text:p>
          </table:table-cell>
          <table:table-cell table:style-name="Table1.D2" office:value-type="string">
            <text:p text:style-name="P82">Pi: <text:span text:style-name="T8">3.14186</text:span></text:p>
            <text:p text:style-name="P82">Time: <text:span text:style-name="T8">64.4852 sec</text:span></text:p>
          </table:table-cell>
        </table:table-row>
        <table:table-row>
          <table:table-cell table:style-name="Table1.B2" office:value-type="string">
            <text:p text:style-name="P80">O1</text:p>
          </table:table-cell>
          <table:table-cell table:style-name="Table1.B2" office:value-type="string">
            <text:p text:style-name="P82">Pi: <text:span text:style-name="T8">3. 14145</text:span></text:p>
            <text:p text:style-name="P82">Time: <text:span text:style-name="T8">21.1389 sec</text:span></text:p>
          </table:table-cell>
          <table:table-cell table:style-name="Table1.B2" office:value-type="string">
            <text:p text:style-name="P82">Pi: <text:span text:style-name="T8">3.14173</text:span></text:p>
            <text:p text:style-name="P82">Time: <text:span text:style-name="T8">40.8326 sec</text:span></text:p>
          </table:table-cell>
          <table:table-cell table:style-name="Table1.D2" office:value-type="string">
            <text:p text:style-name="P82">Pi: <text:span text:style-name="T8">3.14148</text:span></text:p>
            <text:p text:style-name="P82">Time: <text:span text:style-name="T8">61.874 sec</text:span></text:p>
          </table:table-cell>
        </table:table-row>
        <table:table-row>
          <table:table-cell table:style-name="Table1.B2" office:value-type="string">
            <text:p text:style-name="P80">O2</text:p>
          </table:table-cell>
          <table:table-cell table:style-name="Table1.B2" office:value-type="string">
            <text:p text:style-name="P83"><text:span text:style-name="T53">Pi: </text:span><text:span text:style-name="T8">3.14175</text:span></text:p>
            <text:p text:style-name="P82">Time: <text:span text:style-name="T8">20.7123 sec</text:span></text:p>
          </table:table-cell>
          <table:table-cell table:style-name="Table1.B2" office:value-type="string">
            <text:p text:style-name="P82">Pi: <text:span text:style-name="T8">3.14151</text:span></text:p>
            <text:p text:style-name="P82">Time: <text:span text:style-name="T8">41.0907 sec</text:span></text:p>
          </table:table-cell>
          <table:table-cell table:style-name="Table1.D2" office:value-type="string">
            <text:p text:style-name="P82">Pi: <text:span text:style-name="T8">3.14152</text:span></text:p>
            <text:p text:style-name="P82">Time: <text:span text:style-name="T8">61.7722 sec</text:span></text:p>
          </table:table-cell>
        </table:table-row>
        <table:table-row>
          <table:table-cell table:style-name="Table1.B2" office:value-type="string">
            <text:p text:style-name="P80">O3</text:p>
          </table:table-cell>
          <table:table-cell table:style-name="Table1.B2" office:value-type="string">
            <text:p text:style-name="P82">Pi: <text:span text:style-name="T8">3.14144</text:span></text:p>
            <text:p text:style-name="P82">Time: <text:span text:style-name="T8">21.465 sec</text:span></text:p>
          </table:table-cell>
          <table:table-cell table:style-name="Table1.B2" office:value-type="string">
            <text:p text:style-name="P82">Pi: <text:span text:style-name="T8">3.14127</text:span></text:p>
            <text:p text:style-name="P82">Time: <text:span text:style-name="T8">41.9822 sec</text:span></text:p>
          </table:table-cell>
          <table:table-cell table:style-name="Table1.D2" office:value-type="string">
            <text:p text:style-name="P82">Pi: <text:span text:style-name="T8">3.1416</text:span></text:p>
            <text:p text:style-name="P82">Time: <text:span text:style-name="T8">61.8777 sec</text:span></text:p>
          </table:table-cell>
        </table:table-row>
        <table:table-row>
          <table:table-cell table:style-name="Table1.B2" office:value-type="string">
            <text:p text:style-name="P80">Os</text:p>
          </table:table-cell>
          <table:table-cell table:style-name="Table1.B2" office:value-type="string">
            <text:p text:style-name="P82">Pi: <text:span text:style-name="T8">3.1421</text:span></text:p>
            <text:p text:style-name="P82">Time: <text:span text:style-name="T8">20.9398 sec</text:span></text:p>
          </table:table-cell>
          <table:table-cell table:style-name="Table1.B2" office:value-type="string">
            <text:p text:style-name="P82">Pi: <text:span text:style-name="T8">3.14184</text:span></text:p>
            <text:p text:style-name="P82">Time: <text:span text:style-name="T8">41.1203 sec</text:span></text:p>
          </table:table-cell>
          <table:table-cell table:style-name="Table1.D2" office:value-type="string">
            <text:p text:style-name="P82">Pi: <text:span text:style-name="T8">3.14242</text:span></text:p>
            <text:p text:style-name="P82">Time: <text:span text:style-name="T8">61.4946 sec</text:span></text:p>
          </table:table-cell>
        </table:table-row>
        <table:table-row>
          <table:table-cell table:style-name="Table1.B2" office:value-type="string">
            <text:p text:style-name="P80">Ofast</text:p>
          </table:table-cell>
          <table:table-cell table:style-name="Table1.B2" office:value-type="string">
            <text:p text:style-name="P82">Pi: <text:span text:style-name="T8">3.14128</text:span></text:p>
            <text:p text:style-name="P82">Time: <text:span text:style-name="T8">20.6175 sec</text:span></text:p>
          </table:table-cell>
          <table:table-cell table:style-name="Table1.B2" office:value-type="string">
            <text:p text:style-name="P82">Pi: <text:span text:style-name="T8">3.14098</text:span></text:p>
            <text:p text:style-name="P82">Time: <text:span text:style-name="T8">40.7832 sec</text:span></text:p>
          </table:table-cell>
          <table:table-cell table:style-name="Table1.D2" office:value-type="string">
            <text:p text:style-name="P82">Pi: <text:span text:style-name="T8">3.14166</text:span></text:p>
            <text:p text:style-name="P82">Time: <text:span text:style-name="T8">61.4133 sec</text:span></text:p>
          </table:table-cell>
        </table:table-row>
        <table:table-row>
          <table:table-cell table:style-name="Table1.B2" office:value-type="string">
            <text:p text:style-name="P80">Og</text:p>
          </table:table-cell>
          <table:table-cell table:style-name="Table1.B2" office:value-type="string">
            <text:p text:style-name="P82">Pi: <text:span text:style-name="T8">3.1409</text:span></text:p>
            <text:p text:style-name="P82">Time: <text:span text:style-name="T8">20.9159 sec</text:span></text:p>
          </table:table-cell>
          <table:table-cell table:style-name="Table1.B2" office:value-type="string">
            <text:p text:style-name="P82">Pi: <text:span text:style-name="T8">3.14213</text:span></text:p>
            <text:p text:style-name="P82">Time: <text:span text:style-name="T8">41.5671 sec</text:span></text:p>
          </table:table-cell>
          <table:table-cell table:style-name="Table1.D2" office:value-type="string">
            <text:p text:style-name="P82">Pi: <text:span text:style-name="T8">3.14161</text:span></text:p>
            <text:p text:style-name="P82">Time: <text:span text:style-name="T8">61. 9858 sec</text:span></text:p>
          </table:table-cell>
        </table:table-row>
      </table:table>
      <text:p text:style-name="P73"/>
      <text:p text:style-name="P84"><draw:frame draw:style-name="fr1" draw:name="Frame11" text:anchor-type="char" svg:x="-0.949cm" svg:y="-0.968cm" svg:width="17.866cm" draw:z-index="8"><draw:text-box fo:min-height="9.973cm"><text:p text:style-name="Figure"><draw:frame draw:style-name="fr2" draw:name="Object1" text:anchor-type="char" svg:x="-1.3cm" svg:y="1.214cm" svg:width="19.681cm" svg:height="10.717cm" draw:z-index="9"><draw:object xlink:href="./Object 1" xlink:type="simple" xlink:show="embed" xlink:actuate="onLoad"/><draw:image xlink:href="./ObjectReplacements/Object 1" xlink:type="simple" xlink:show="embed" xlink:actuate="onLoad"/></draw:frame></text:p><text:p text:style-name="Figure"/></draw:text-box></draw:frame><text:soft-page-break/>По графику легко выстраивается иерархия уровней оптимизации. </text:p>
      <text:p text:style-name="P84">Самым выделяющимся является -<text:span text:style-name="T13">O0, так как его график находится выше и в отдалении от остальных . Полученный результат указывает на то, что компиляция на этом уровне наименее эффективна. </text:span></text:p>
      <text:p text:style-name="P85">Ниже находятся -O1, -O2, -O3, -Ofast, -Os, -Og с лучшими (в сравнении с -O0) результатами. Так как время, затраченное на эти компиляции почти одинаковы, мы можем сделать вывод, что данные способы оптимизации эквивалентны по своей эффективности <text:span text:style-name="T13">для нашей программы</text:span>.</text:p>
      <text:p text:style-name="P74" loext:marker-style-name="T10"/>
      <text:h text:style-name="P20" text:outline-level="1"><text:bookmark-start text:name="__RefHeading___Toc18443924"/>ЗАКЛЮЧЕНИЕ<text:bookmark-end text:name="__RefHeading___Toc18443924"/></text:h>
      <text:p text:style-name="Standard"/>
      <text:p text:style-name="P86">По результатам проделанной работы можно сделать вывод, что при использовании каждого уровня оптимизации, программа компилируется за разный промежуток времени в зависимости от сложности и эффективности уровня, применимого на нашей программе. </text:p>
      <text:p text:style-name="P87"><text:span text:style-name="T5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elvetica" svg:font-family="Helvetic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text-align="center" style:justify-single-word="false" fo:keep-with-next="always"/>
      <style:text-properties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635cm" fo:margin-bottom="0.423cm" style:contextual-spacing="false" fo:text-align="center" style:justify-single-word="false" fo:text-indent="0cm" style:auto-text-indent="false" fo:break-before="page"/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212cm" fo:margin-bottom="0cm" style:contextual-spacing="false"/>
    </style:style>
    <style:style style:name="Body_20_Text_20_3" style:display-name="Body Text 3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style:contextual-spacing="false" fo:line-height="107%" fo:text-align="start" style:justify-single-word="false" fo:keep-together="always" fo:text-indent="0cm" style:auto-text-indent="false"/>
      <style:text-properties fo:color="#2e74b5" loext:opacity="100%" style:font-name="Calibri Light" fo:font-family="'Calibri Light'" style:font-family-generic="swiss" style:font-pitch="variable" fo:font-weight="normal" style:letter-kerning="false" style:font-weight-asian="normal" style:font-name-complex="Calibri Light" style:font-family-complex="'Calibri Light'" style:font-family-generic-complex="swiss" style:font-pitch-complex="variable" style:font-weight-complex="normal"/>
    </style:style>
    <style:style style:name="Contents_20_1" style:display-name="Contents 1" style:family="paragraph" style:parent-style-name="Standard" style:next-style-name="Standard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6_20_Char" style:display-name="Heading 6 Char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7_20_Char" style:display-name="Heading 7 Char" style:family="text">
      <style:text-properties style:font-name="Times New Roman" fo:font-family="'Times New Roman'" style:font-family-generic="roman" style:font-pitch="variable" fo:font-size="22pt" fo:font-weight="bold" style:font-name-asian="Times New Roman" style:font-family-asian="'Times New Roman'" style:font-family-generic-asian="roman" style:font-pitch-asian="variable" style:font-size-asian="2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Body_20_Text_20_3_20_Char" style:display-name="Body Text 3 Char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Heading_20_1_20_Char" style:display-name="Heading 1 Char" style:family="text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2:53:10.382822832</meta:creation-date>
    <meta:editing-cycles>2</meta:editing-cycles>
    <meta:editing-duration>PT4M58S</meta:editing-duration>
    <meta:generator>LibreOffice/24.8.2.1$MacOSX_AARCH64 LibreOffice_project/0f794b6e29741098670a3b95d60478a65d05ef13</meta:generator>
    <dc:date>2025-09-19T13:32:08.863177926</dc:date>
    <meta:document-statistic meta:table-count="1" meta:image-count="0" meta:object-count="1" meta:page-count="11" meta:paragraph-count="236" meta:word-count="1093" meta:character-count="7329" meta:non-whitespace-character-count="624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9.681cm" svg:height="10.717cm" xlink:href="." xlink:type="simple" chart:class="chart:line" chart:style-name="ch1">
        <chart:legend chart:legend-position="end" svg:x="17.477cm" svg:y="3.554cm" style:legend-expansion="high" chart:style-name="ch2"/>
        <chart:plot-area chart:style-name="ch3" chart:data-source-has-labels="both" svg:x="1.374cm" svg:y="0.214cm" svg:width="15.71cm" svg:height="10.289cm">
          <chart:coordinate-region svg:x="2.025cm" svg:y="0.415cm" svg:width="14.707cm" svg:height="9.438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0.451cm" svg:y="5.798cm" chart:style-name="ch6">
              <text:p><text:span text:style-name="T1">t, sec</text:span>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line">
            <chart:data-point chart:repeated="3"/>
          </chart:series>
          <chart:series chart:style-name="ch9" chart:values-cell-range-address="local-table.$C$2:.$C$4" chart:label-cell-address="local-table.$C$1" chart:class="chart:line">
            <chart:data-point chart:repeated="3"/>
          </chart:series>
          <chart:series chart:style-name="ch10" chart:values-cell-range-address="local-table.$D$2:.$D$4" chart:label-cell-address="local-table.$D$1" chart:class="chart:line">
            <chart:data-point chart:repeated="3"/>
          </chart:series>
          <chart:series chart:style-name="ch11" chart:values-cell-range-address="local-table.$E$2:.$E$4" chart:label-cell-address="local-table.$E$1" chart:class="chart:line">
            <chart:data-point chart:repeated="3"/>
          </chart:series>
          <chart:series chart:style-name="ch12" chart:values-cell-range-address="local-table.$F$2:.$F$4" chart:label-cell-address="local-table.$F$1" chart:class="chart:line">
            <chart:data-point chart:repeated="3"/>
          </chart:series>
          <chart:series chart:style-name="ch13" chart:values-cell-range-address="local-table.$G$2:.$G$4" chart:label-cell-address="local-table.$G$1" chart:class="chart:line">
            <chart:data-point chart:repeated="3"/>
          </chart:series>
          <chart:series chart:style-name="ch14" chart:values-cell-range-address="local-table.$H$2:.$H$4" chart:label-cell-address="local-table.$H$1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s</text:p>
              </table:table-cell>
              <table:table-cell office:value-type="string">
                <text:p>Ofast</text:p>
              </table:table-cell>
              <table:table-cell office:value-type="string">
                <text:p>Og</text:p>
              </table:table-cell>
            </table:table-row>
          </table:table-header-rows>
          <table:table-rows>
            <table:table-row>
              <table:table-cell office:value-type="string">
                <text:p>0.5n</text:p>
              </table:table-cell>
              <table:table-cell office:value-type="float" office:value="22.1935">
                <text:p>22.1935</text:p>
              </table:table-cell>
              <table:table-cell office:value-type="float" office:value="21.1389">
                <text:p>21.1389</text:p>
              </table:table-cell>
              <table:table-cell office:value-type="float" office:value="20.7123">
                <text:p>20.7123</text:p>
              </table:table-cell>
              <table:table-cell office:value-type="float" office:value="21.465">
                <text:p>21.465</text:p>
              </table:table-cell>
              <table:table-cell office:value-type="float" office:value="20.9398">
                <text:p>20.9398</text:p>
              </table:table-cell>
              <table:table-cell office:value-type="float" office:value="20.6175">
                <text:p>20.6175</text:p>
              </table:table-cell>
              <table:table-cell office:value-type="float" office:value="20.9159">
                <text:p>20.915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43.0859">
                <text:p>43.0859</text:p>
              </table:table-cell>
              <table:table-cell office:value-type="float" office:value="40.8326">
                <text:p>40.8326</text:p>
              </table:table-cell>
              <table:table-cell office:value-type="float" office:value="41.0907">
                <text:p>41.0907</text:p>
              </table:table-cell>
              <table:table-cell office:value-type="float" office:value="41.9822">
                <text:p>41.9822</text:p>
              </table:table-cell>
              <table:table-cell office:value-type="float" office:value="41.1203">
                <text:p>41.1203</text:p>
              </table:table-cell>
              <table:table-cell office:value-type="float" office:value="40.7832">
                <text:p>40.7832</text:p>
              </table:table-cell>
              <table:table-cell office:value-type="float" office:value="41.5671">
                <text:p>41.5671</text:p>
              </table:table-cell>
            </table:table-row>
            <table:table-row>
              <table:table-cell office:value-type="string">
                <text:p>1.5n</text:p>
              </table:table-cell>
              <table:table-cell office:value-type="float" office:value="64.4852">
                <text:p>64.4852</text:p>
              </table:table-cell>
              <table:table-cell office:value-type="float" office:value="61.874">
                <text:p>61.874</text:p>
              </table:table-cell>
              <table:table-cell office:value-type="float" office:value="61.7722">
                <text:p>61.7722</text:p>
              </table:table-cell>
              <table:table-cell office:value-type="float" office:value="61.8777">
                <text:p>61.8777</text:p>
              </table:table-cell>
              <table:table-cell office:value-type="float" office:value="61.4946">
                <text:p>61.4946</text:p>
              </table:table-cell>
              <table:table-cell office:value-type="float" office:value="61.4133">
                <text:p>61.4133</text:p>
              </table:table-cell>
              <table:table-cell office:value-type="float" office:value="61.9858">
                <text:p>61.98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