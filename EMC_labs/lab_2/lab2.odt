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Helvetica" svg:font-family="Helvetic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Wingdings" svg:font-family="Wingdings" style:font-pitch="variable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var ds-font-family-code" svg:font-family="'var ds-font-family-code'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4.8cm" style:rel-column-width="19061*"/>
    </style:style>
    <style:style style:name="Table1.B" style:family="table-column">
      <style:table-column-properties style:column-width="11.702cm" style:rel-column-width="46474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4.8cm" style:rel-column-width="19061*"/>
    </style:style>
    <style:style style:name="Table2.B" style:family="table-column">
      <style:table-column-properties style:column-width="11.702cm" style:rel-column-width="46474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4.8cm" style:rel-column-width="19061*"/>
    </style:style>
    <style:style style:name="Table3.B" style:family="table-column">
      <style:table-column-properties style:column-width="11.702cm" style:rel-column-width="46474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4.8cm" style:rel-column-width="19061*"/>
    </style:style>
    <style:style style:name="Table4.B" style:family="table-column">
      <style:table-column-properties style:column-width="11.702cm" style:rel-column-width="46474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4.8cm" style:rel-column-width="19061*"/>
    </style:style>
    <style:style style:name="Table5.B" style:family="table-column">
      <style:table-column-properties style:column-width="11.702cm" style:rel-column-width="46474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4.8cm" style:rel-column-width="19061*"/>
    </style:style>
    <style:style style:name="Table6.B" style:family="table-column">
      <style:table-column-properties style:column-width="11.702cm" style:rel-column-width="46474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4.8cm" style:rel-column-width="19061*"/>
    </style:style>
    <style:style style:name="Table7.B" style:family="table-column">
      <style:table-column-properties style:column-width="11.702cm" style:rel-column-width="46474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4" style:family="table-row">
      <style:table-row-properties style:min-row-height="2.004cm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4.8cm" style:rel-column-width="19061*"/>
    </style:style>
    <style:style style:name="Table8.B" style:family="table-column">
      <style:table-column-properties style:column-width="11.702cm" style:rel-column-width="46474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6.501cm" table:align="margins" style:writing-mode="lr-tb"/>
    </style:style>
    <style:style style:name="Table9.A" style:family="table-column">
      <style:table-column-properties style:column-width="4.8cm" style:rel-column-width="19061*"/>
    </style:style>
    <style:style style:name="Table9.B" style:family="table-column">
      <style:table-column-properties style:column-width="11.702cm" style:rel-column-width="46474*"/>
    </style:style>
    <style:style style:name="Table9.A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6.501cm" table:align="margins" style:writing-mode="lr-tb"/>
    </style:style>
    <style:style style:name="Table10.A" style:family="table-column">
      <style:table-column-properties style:column-width="5.5cm" style:rel-column-width="21842*"/>
    </style:style>
    <style:style style:name="Table10.C" style:family="table-column">
      <style:table-column-properties style:column-width="5.502cm" style:rel-column-width="21851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.5" style:family="table-row">
      <style:table-row-properties style:min-row-height="0.9cm"/>
    </style:style>
    <style:style style:name="Table10.6" style:family="table-row">
      <style:table-row-properties style:min-row-height="0.838cm"/>
    </style:style>
    <style:style style:name="Table13" style:family="table">
      <style:table-properties style:width="16.501cm" table:align="margins" style:writing-mode="lr-tb"/>
    </style:style>
    <style:style style:name="Table13.A" style:family="table-column">
      <style:table-column-properties style:column-width="16.501cm" style:rel-column-width="65535*"/>
    </style:style>
    <style:style style:name="Table13.A1" style:family="table-cell">
      <style:table-cell-properties fo:padding="0.097cm" fo:border="0.5pt solid #000000"/>
    </style:style>
    <style:style style:name="Table13.2" style:family="table-row">
      <style:table-row-properties style:min-row-height="1.501cm"/>
    </style:style>
    <style:style style:name="Table13.A2" style:family="table-cell">
      <style:table-cell-properties fo:padding="0.097cm" fo:border-left="0.5pt solid #000000" fo:border-right="0.5pt solid #000000" fo:border-top="none" fo:border-bottom="0.5pt solid #000000"/>
    </style:style>
    <style:style style:name="Table13.3" style:family="table-row">
      <style:table-row-properties style:min-row-height="0.672cm"/>
    </style:style>
    <style:style style:name="Table13.5" style:family="table-row">
      <style:table-row-properties style:min-row-height="0.954cm"/>
    </style:style>
    <style:style style:name="P1" style:family="paragraph" style:parent-style-name="Heading_20_6">
      <style:paragraph-properties fo:margin-top="0.212cm" fo:margin-bottom="0cm" style:contextual-spacing="false"/>
      <style:text-properties fo:font-size="12pt" officeooo:paragraph-rsid="0063822b" style:font-size-asian="12pt"/>
    </style:style>
    <style:style style:name="P2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3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4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weight-complex="bold"/>
    </style:style>
    <style:style style:name="P6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7" style:family="paragraph" style:parent-style-name="Heading_20_7">
      <style:paragraph-properties fo:margin-right="0cm" fo:text-indent="0cm" style:auto-text-indent="false"/>
      <style:text-properties fo:font-size="12pt" style:font-size-asian="12pt"/>
    </style:style>
    <style:style style:name="P8" style:family="paragraph" style:parent-style-name="Heading_20_7">
      <style:paragraph-properties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9" style:family="paragraph" style:parent-style-name="Standard">
      <style:paragraph-properties fo:margin-right="0cm" fo:text-align="center" style:justify-single-word="false" fo:text-indent="0cm" style:auto-text-indent="false"/>
      <style:text-properties fo:font-size="12pt" style:font-size-asian="12pt"/>
    </style:style>
    <style:style style:name="P10" style:family="paragraph" style:parent-style-name="Standard">
      <style:paragraph-properties fo:margin-right="0cm" fo:text-align="center" style:justify-single-word="false" fo:text-indent="0cm" style:auto-text-indent="false"/>
    </style:style>
    <style:style style:name="P11" style:family="paragraph" style:parent-style-name="Body_20_Text_20_3">
      <style:paragraph-properties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right="0cm" fo:margin-top="0.212cm" fo:margin-bottom="0cm" style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left="7.502cm" fo:margin-right="0cm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1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/>
      <style:text-properties style:font-name="Times New Roman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20" style:family="paragraph" style:parent-style-name="Default">
      <style:paragraph-properties fo:margin-top="0cm" fo:margin-bottom="0.347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23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italic" style:font-size-asian="14pt" style:font-style-asian="italic" style:font-size-complex="14pt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Default">
      <style:paragraph-properties fo:margin-top="0cm" fo:margin-bottom="0.347cm" style:contextual-spacing="false" fo:text-align="justify" style:justify-single-word="false"/>
      <style:text-properties fo:font-size="14pt" fo:font-style="normal" officeooo:paragraph-rsid="001b18c9" style:font-size-asian="14pt" style:font-style-asian="normal" style:font-size-complex="14pt" style:font-style-complex="normal"/>
    </style:style>
    <style:style style:name="P27" style:family="paragraph" style:parent-style-name="Heading_20_1">
      <style:paragraph-properties fo:text-indent="0cm" style:auto-text-indent="false" fo:break-before="page"/>
    </style:style>
    <style:style style:name="P28" style:family="paragraph" style:parent-style-name="Standard">
      <style:paragraph-properties fo:text-indent="0cm" style:auto-text-indent="false"/>
    </style:style>
    <style:style style:name="P29" style:family="paragraph" style:parent-style-name="Standard">
      <style:paragraph-properties fo:text-indent="0cm" style:auto-text-indent="false"/>
      <style:text-properties fo:font-weight="bold" officeooo:rsid="001c9c4d" officeooo:paragraph-rsid="001c9c4d" style:font-weight-asian="bold" style:font-weight-complex="bold"/>
    </style:style>
    <style:style style:name="P30" style:family="paragraph" style:parent-style-name="Standard">
      <style:paragraph-properties fo:text-indent="0cm" style:auto-text-indent="false"/>
      <style:text-properties officeooo:rsid="001cd4cd" officeooo:paragraph-rsid="001cd4cd"/>
    </style:style>
    <style:style style:name="P31" style:family="paragraph" style:parent-style-name="Standard">
      <style:paragraph-properties fo:text-indent="0cm" style:auto-text-indent="false"/>
      <style:text-properties officeooo:rsid="001c9c4d" officeooo:paragraph-rsid="001c9c4d"/>
    </style:style>
    <style:style style:name="P32" style:family="paragraph">
      <loext:graphic-properties draw:fill-color="#ffffff"/>
    </style:style>
    <style:style style:name="P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tyle="normal" officeooo:paragraph-rsid="001c9c4d" style:font-style-asian="normal" style:font-style-complex="normal"/>
    </style:style>
    <style:style style:name="P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font-style="normal" officeooo:paragraph-rsid="001c9c4d" style:font-size-asian="12pt" style:font-style-asian="normal" style:font-style-complex="normal"/>
    </style:style>
    <style:style style:name="P35" style:family="paragraph" style:parent-style-name="Standard">
      <style:text-properties style:use-window-font-color="true" loext:opacity="0%" style:font-name="Helvetica" fo:font-size="12pt" fo:font-style="normal" officeooo:paragraph-rsid="001c9c4d" style:font-size-asian="12pt" style:font-style-asian="normal" style:font-size-complex="14pt" style:font-style-complex="normal"/>
    </style:style>
    <style:style style:name="P36" style:family="paragraph" style:parent-style-name="Standard">
      <style:text-properties style:use-window-font-color="true" loext:opacity="0%" style:font-name="Helvetica" fo:font-size="12pt" fo:font-style="normal" officeooo:paragraph-rsid="001cd4cd" style:font-size-asian="12pt" style:font-style-asian="normal" style:font-size-complex="14pt" style:font-style-complex="normal"/>
    </style:style>
    <style:style style:name="P37" style:family="paragraph" style:parent-style-name="Standard">
      <style:text-properties style:use-window-font-color="true" loext:opacity="0%" style:font-name="Helvetica" fo:font-size="12pt" fo:font-style="italic" officeooo:paragraph-rsid="001c9c4d" style:font-size-asian="12pt" style:font-style-asian="italic" style:font-size-complex="14pt"/>
    </style:style>
    <style:style style:name="P38" style:family="paragraph" style:parent-style-name="Standard">
      <style:paragraph-properties fo:text-align="justify" style:justify-single-word="false" fo:text-indent="0cm" style:auto-text-indent="false"/>
      <style:text-properties officeooo:paragraph-rsid="001b2444"/>
    </style:style>
    <style:style style:name="P39" style:family="paragraph" style:parent-style-name="Standard">
      <style:paragraph-properties fo:text-align="justify" style:justify-single-word="false" fo:text-indent="0cm" style:auto-text-indent="false"/>
      <style:text-properties fo:font-style="normal" officeooo:rsid="001b2444" officeooo:paragraph-rsid="001b2444" style:font-style-asian="normal" style:font-style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4pt" fo:font-style="normal" officeooo:paragraph-rsid="001b2444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style="normal" officeooo:paragraph-rsid="001b2444" style:font-size-asian="14pt" style:font-style-asian="normal" style:font-size-complex="14pt" style:font-style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4pt" fo:font-style="normal" officeooo:rsid="001b2444" officeooo:paragraph-rsid="001b2444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style="italic" officeooo:paragraph-rsid="001b2444" style:font-size-asian="14pt" style:font-style-asian="italic" style:font-size-complex="14pt"/>
    </style:style>
    <style:style style:name="P44" style:family="paragraph" style:parent-style-name="Standard">
      <style:paragraph-properties fo:text-align="justify" style:justify-single-word="false" fo:text-indent="0cm" style:auto-text-indent="false"/>
      <style:text-properties fo:font-size="14pt" fo:font-style="normal" fo:font-weight="bold" officeooo:rsid="001b2444" officeooo:paragraph-rsid="001b2444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 fo:text-indent="0cm" style:auto-text-indent="false"/>
      <style:text-properties fo:font-size="14pt" fo:font-style="normal" officeooo:rsid="001b2444" officeooo:paragraph-rsid="001b2444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4pt" fo:font-style="normal" officeooo:paragraph-rsid="001e456f" style:font-size-asian="14pt" style:font-style-asian="normal" style:font-size-complex="14pt" style:font-style-complex="normal"/>
    </style:style>
    <style:style style:name="P4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Times New Roman" fo:font-size="14pt" fo:font-style="normal" officeooo:paragraph-rsid="001e456f" style:font-size-asian="14pt" style:font-style-asian="normal" style:font-size-complex="14pt" style:font-style-complex="normal"/>
    </style:style>
    <style:style style:name="P48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Times New Roman" fo:font-size="14pt" fo:font-style="normal" officeooo:paragraph-rsid="001e456f" style:font-size-asian="14pt" style:font-style-asian="normal" style:font-size-complex="14pt" style:font-style-complex="normal"/>
    </style:style>
    <style:style style:name="P49" style:family="paragraph" style:parent-style-name="Table_20_Contents">
      <style:paragraph-properties fo:text-indent="0cm" style:auto-text-indent="false"/>
      <style:text-properties fo:font-weight="bold" officeooo:rsid="001e456f" officeooo:paragraph-rsid="001e456f" style:font-weight-asian="bold" style:font-weight-complex="bold"/>
    </style:style>
    <style:style style:name="P50" style:family="paragraph" style:parent-style-name="Table_20_Contents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fo:font-style="normal" officeooo:rsid="001e456f" officeooo:paragraph-rsid="001f6206" style:font-size-asian="14pt" style:font-style-asian="normal" style:font-size-complex="14pt" style:font-style-complex="normal"/>
    </style:style>
    <style:style style:name="P52" style:family="paragraph" style:parent-style-name="Standard">
      <style:paragraph-properties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6206" style:font-size-asian="14pt" style:font-size-complex="14pt"/>
    </style:style>
    <style:style style:name="P53" style:family="paragraph" style:parent-style-name="Text_20_body">
      <style:paragraph-properties fo:text-align="justify" style:justify-single-word="false" fo:text-indent="0cm" style:auto-text-indent="false"/>
      <style:text-properties officeooo:paragraph-rsid="003e95aa"/>
    </style:style>
    <style:style style:name="P54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4pt" fo:font-style="normal" officeooo:paragraph-rsid="001f6206" style:font-size-asian="14pt" style:font-style-asian="normal" style:font-size-complex="14pt" style:font-style-complex="normal"/>
    </style:style>
    <style:style style:name="P55" style:family="paragraph" style:parent-style-name="Table_20_Contents">
      <style:paragraph-properties fo:text-indent="0cm" style:auto-text-indent="false"/>
      <style:text-properties fo:font-weight="bold" officeooo:rsid="001e456f" officeooo:paragraph-rsid="001f6206" style:font-weight-asian="bold" style:font-weight-complex="bold"/>
    </style:style>
    <style:style style:name="P56" style:family="paragraph" style:parent-style-name="Table_20_Contents">
      <style:text-properties fo:font-weight="bold" officeooo:paragraph-rsid="001f6206" style:font-weight-asian="bold" style:font-weight-complex="bold"/>
    </style:style>
    <style:style style:name="P57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fo:font-style="normal" officeooo:paragraph-rsid="001f6206" style:font-size-asian="12.25pt" style:font-size-complex="14pt"/>
    </style:style>
    <style:style style:name="P58" style:family="paragraph" style:parent-style-name="Standard">
      <style:paragraph-properties fo:text-align="justify" style:justify-single-word="false" fo:text-indent="0cm" style:auto-text-indent="false"/>
      <style:text-properties fo:font-size="14pt" fo:font-style="italic" officeooo:paragraph-rsid="001f6206" style:font-size-asian="14pt" style:font-style-asian="italic" style:font-size-complex="14pt"/>
    </style:style>
    <style:style style:name="P59" style:family="paragraph" style:parent-style-name="Standard">
      <style:paragraph-properties fo:text-align="justify" style:justify-single-word="false" fo:text-indent="0cm" style:auto-text-indent="false"/>
      <style:text-properties fo:font-variant="normal" fo:text-transform="none" fo:color="#f9fafb" loext:opacity="100%" style:font-name="Times New Roman" fo:font-size="14pt" fo:letter-spacing="normal" fo:font-style="normal" fo:font-weight="normal" officeooo:paragraph-rsid="001f6206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f6206" officeooo:paragraph-rsid="001f6206" style:font-size-asian="14pt" style:font-style-asian="normal" style:font-size-complex="14pt" style:font-style-complex="normal"/>
    </style:style>
    <style:style style:name="P61" style:family="paragraph" style:parent-style-name="Text_20_body">
      <style:paragraph-properties fo:text-align="justify" style:justify-single-word="false" fo:text-indent="0cm" style:auto-text-indent="false"/>
      <style:text-properties fo:font-style="italic" officeooo:paragraph-rsid="003e95aa" style:font-style-asian="italic"/>
    </style:style>
    <style:style style:name="P62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4pt" fo:font-style="normal" officeooo:paragraph-rsid="0020342d" style:font-size-asian="14pt" style:font-style-asian="normal" style:font-size-complex="14pt" style:font-style-complex="normal"/>
    </style:style>
    <style:style style:name="P63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Times New Roman" fo:font-size="14pt" fo:font-style="normal" officeooo:paragraph-rsid="0020342d" style:font-size-asian="14pt" style:font-style-asian="normal" style:font-size-complex="14pt" style:font-style-complex="normal"/>
    </style:style>
    <style:style style:name="P64" style:family="paragraph" style:parent-style-name="Table_20_Contents">
      <style:paragraph-properties fo:text-indent="0cm" style:auto-text-indent="false"/>
      <style:text-properties fo:font-weight="bold" officeooo:rsid="001e456f" officeooo:paragraph-rsid="0020342d" style:font-weight-asian="bold" style:font-weight-complex="bold"/>
    </style:style>
    <style:style style:name="P65" style:family="paragraph" style:parent-style-name="Table_20_Contents">
      <style:text-properties fo:font-weight="bold" officeooo:paragraph-rsid="0020342d" style:font-weight-asian="bold" style:font-weight-complex="bold"/>
    </style:style>
    <style:style style:name="P66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fo:font-style="normal" officeooo:rsid="001e456f" officeooo:paragraph-rsid="0020342d" style:font-size-asian="14pt" style:font-style-asian="normal" style:font-size-complex="14pt" style:font-style-complex="normal"/>
    </style:style>
    <style:style style:name="P67" style:family="paragraph" style:parent-style-name="Standard">
      <style:paragraph-properties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f6206" officeooo:paragraph-rsid="0021003e" style:font-size-asian="14pt" style:font-style-asian="normal" style:font-size-complex="14pt" style:font-style-complex="normal"/>
    </style:style>
    <style:style style:name="P68" style:family="paragraph" style:parent-style-name="Standard">
      <style:paragraph-properties fo:text-align="justify" style:justify-single-word="false" fo:text-indent="0cm" style:auto-text-indent="false"/>
      <style:text-properties fo:font-size="14pt" fo:font-style="italic" officeooo:paragraph-rsid="0020342d" style:font-size-asian="14pt" style:font-style-asian="italic" style:font-size-complex="14pt"/>
    </style:style>
    <style:style style:name="P69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4pt" fo:font-style="normal" officeooo:paragraph-rsid="0021003e" style:font-size-asian="14pt" style:font-style-asian="normal" style:font-size-complex="14pt" style:font-style-complex="normal"/>
    </style:style>
    <style:style style:name="P70" style:family="paragraph" style:parent-style-name="Table_20_Contents">
      <style:paragraph-properties fo:text-indent="0cm" style:auto-text-indent="false"/>
      <style:text-properties fo:font-weight="bold" officeooo:rsid="001e456f" officeooo:paragraph-rsid="0021003e" style:font-weight-asian="bold" style:font-weight-complex="bold"/>
    </style:style>
    <style:style style:name="P71" style:family="paragraph" style:parent-style-name="Table_20_Contents">
      <style:text-properties fo:font-weight="bold" officeooo:paragraph-rsid="0021003e" style:font-weight-asian="bold" style:font-weight-complex="bold"/>
    </style:style>
    <style:style style:name="P72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fo:font-style="normal" officeooo:rsid="001e456f" officeooo:paragraph-rsid="0021003e" style:font-size-asian="14pt" style:font-style-asian="normal" style:font-size-complex="14pt" style:font-style-complex="normal"/>
    </style:style>
    <style:style style:name="P73" style:family="paragraph" style:parent-style-name="Standard">
      <style:paragraph-properties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Times New Roman" fo:font-size="14pt" fo:font-style="normal" officeooo:paragraph-rsid="0021003e" style:font-size-asian="14pt" style:font-style-asian="normal" style:font-size-complex="14pt" style:font-style-complex="normal"/>
    </style:style>
    <style:style style:name="P74" style:family="paragraph" style:parent-style-name="Standard">
      <style:paragraph-properties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f6206" officeooo:paragraph-rsid="0022a6c1" style:font-size-asian="14pt" style:font-style-asian="normal" style:font-size-complex="14pt" style:font-style-complex="normal"/>
    </style:style>
    <style:style style:name="P75" style:family="paragraph" style:parent-style-name="Text_20_body">
      <style:paragraph-properties fo:text-align="justify" style:justify-single-word="false" fo:text-indent="0cm" style:auto-text-indent="false"/>
      <style:text-properties fo:font-style="italic" officeooo:paragraph-rsid="003e95aa" style:font-style-asian="italic" style:font-style-complex="italic"/>
    </style:style>
    <style:style style:name="P76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fo:font-style="normal" officeooo:rsid="001e456f" officeooo:paragraph-rsid="00286766" style:font-size-asian="14pt" style:font-style-asian="normal" style:font-size-complex="14pt" style:font-style-complex="normal"/>
    </style:style>
    <style:style style:name="P77" style:family="paragraph" style:parent-style-name="Standard">
      <style:paragraph-properties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f6206" officeooo:paragraph-rsid="00245fcf" style:font-size-asian="14pt" style:font-style-asian="normal" style:font-size-complex="14pt" style:font-style-complex="normal"/>
    </style:style>
    <style:style style:name="P78" style:family="paragraph" style:parent-style-name="Standard">
      <style:paragraph-properties fo:text-align="justify" style:justify-single-word="false" fo:text-indent="0cm" style:auto-text-indent="false"/>
      <style:text-properties fo:font-size="14pt" fo:font-style="italic" officeooo:paragraph-rsid="0021003e" style:font-size-asian="14pt" style:font-style-asian="italic" style:font-size-complex="14pt"/>
    </style:style>
    <style:style style:name="P79" style:family="paragraph" style:parent-style-name="Standard">
      <style:paragraph-properties fo:text-align="justify" style:justify-single-word="false" fo:text-indent="0cm" style:auto-text-indent="false"/>
      <style:text-properties fo:font-size="14pt" fo:font-style="normal" fo:font-weight="bold" officeooo:paragraph-rsid="0021003e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text-align="justify" style:justify-single-word="false" fo:text-indent="0cm" style:auto-text-indent="false"/>
      <style:text-properties fo:font-size="14pt" fo:font-style="normal" officeooo:paragraph-rsid="0021003e" style:font-size-asian="14pt" style:font-style-asian="normal" style:font-size-complex="14pt" style:font-style-complex="normal"/>
    </style:style>
    <style:style style:name="P81" style:family="paragraph" style:parent-style-name="Table_20_Contents">
      <style:text-properties fo:font-weight="bold" officeooo:rsid="00286766" officeooo:paragraph-rsid="00286766" style:font-weight-asian="bold" style:font-weight-complex="bold"/>
    </style:style>
    <style:style style:name="P82" style:family="paragraph" style:parent-style-name="Table_20_Contents">
      <style:paragraph-properties fo:text-indent="0cm" style:auto-text-indent="false"/>
      <style:text-properties fo:font-weight="bold" style:font-weight-asian="bold" style:font-weight-complex="bold"/>
    </style:style>
    <style:style style:name="P83" style:family="paragraph" style:parent-style-name="Table_20_Contents">
      <style:paragraph-properties fo:text-indent="0cm" style:auto-text-indent="false"/>
    </style:style>
    <style:style style:name="P84" style:family="paragraph" style:parent-style-name="Table_20_Contents">
      <style:paragraph-properties fo:text-indent="0cm" style:auto-text-indent="false"/>
      <style:text-properties officeooo:paragraph-rsid="0037886c"/>
    </style:style>
    <style:style style:name="P85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fo:font-style="normal" officeooo:paragraph-rsid="0021003e" style:font-size-asian="14pt" style:font-style-asian="normal" style:font-size-complex="14pt" style:font-style-complex="normal"/>
    </style:style>
    <style:style style:name="P86" style:family="paragraph" style:parent-style-name="Text_20_body">
      <style:paragraph-properties fo:text-indent="0cm" style:auto-text-indent="false"/>
      <style:text-properties fo:color="#000000" loext:opacity="100%" style:font-name="Times New Roman" fo:font-size="14pt" fo:font-weight="bold" officeooo:paragraph-rsid="0029360b" style:font-size-asian="14pt" style:font-weight-asian="bold" style:font-name-complex="Times New Roman1" style:font-size-complex="14pt" style:font-weight-complex="bold"/>
    </style:style>
    <style:style style:name="P87" style:family="paragraph" style:parent-style-name="Table_20_Contents">
      <style:text-properties fo:font-weight="bold" officeooo:rsid="00329c6b" officeooo:paragraph-rsid="003c1b0b" style:font-weight-asian="bold" style:font-weight-complex="bold"/>
    </style:style>
    <style:style style:name="P88" style:family="paragraph" style:parent-style-name="Standard">
      <style:paragraph-properties fo:text-align="justify" style:justify-single-word="false" fo:text-indent="0cm" style:auto-text-indent="false"/>
      <style:text-properties fo:font-size="14pt" fo:font-style="normal" fo:font-weight="bold" officeooo:rsid="001b2444" officeooo:paragraph-rsid="003c1b0b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justify" style:justify-single-word="false" fo:text-indent="0cm" style:auto-text-indent="false"/>
      <style:text-properties fo:font-size="14pt" fo:font-style="normal" officeooo:rsid="001b2444" officeooo:paragraph-rsid="003c1b0b" style:font-size-asian="14pt" style:font-style-asian="normal" style:font-size-complex="14pt" style:font-style-complex="normal"/>
    </style:style>
    <style:style style:name="P90" style:family="paragraph" style:parent-style-name="Standard">
      <style:paragraph-properties fo:text-indent="0cm" style:auto-text-indent="false"/>
      <style:text-properties officeooo:paragraph-rsid="003c1b0b"/>
    </style:style>
    <style:style style:name="P91" style:family="paragraph" style:parent-style-name="Text_20_body" style:list-style-name="L2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92" style:family="paragraph" style:parent-style-name="Text_20_body" style:list-style-name="L2">
      <style:paragraph-properties fo:margin-left="0cm" fo:margin-right="0cm" fo:margin-top="0cm" fo:margin-bottom="0cm" style:contextual-spacing="false" fo:text-indent="1cm" style:auto-text-indent="false" fo:padding="0cm" fo:border="none"/>
    </style:style>
    <style:style style:name="P9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fo:color="#000000" loext:opacity="100%" style:font-name="Times New Roman1" officeooo:rsid="002defd5" style:font-name-complex="Times New Roman1"/>
    </style:style>
    <style:style style:name="P94" style:family="paragraph" style:parent-style-name="Text_20_body">
      <style:paragraph-properties fo:text-indent="0cm" style:auto-text-indent="false"/>
      <style:text-properties fo:color="#000000" loext:opacity="100%" style:font-name="Times New Roman1" fo:font-weight="bold" officeooo:rsid="002defd5" officeooo:paragraph-rsid="002defd5" style:font-weight-asian="bold" style:font-name-complex="Times New Roman1" style:font-weight-complex="bold"/>
    </style:style>
    <style:style style:name="P95" style:family="paragraph" style:parent-style-name="Standard">
      <style:paragraph-properties fo:text-align="justify" style:justify-single-word="false" fo:text-indent="0cm" style:auto-text-indent="false"/>
      <style:text-properties fo:color="#000000" loext:opacity="100%" style:font-name="Times New Roman1" fo:font-style="italic" officeooo:rsid="002defd5" officeooo:paragraph-rsid="003915e6" style:font-style-asian="italic" style:font-name-complex="Times New Roman1" style:font-style-complex="italic"/>
    </style:style>
    <style:style style:name="P96" style:family="paragraph" style:parent-style-name="Standard">
      <style:paragraph-properties fo:text-align="justify" style:justify-single-word="false" fo:text-indent="0cm" style:auto-text-indent="false"/>
      <style:text-properties fo:color="#000000" loext:opacity="100%" style:font-name="Times New Roman1" officeooo:rsid="002defd5" officeooo:paragraph-rsid="003915e6" style:font-name-complex="Times New Roman1"/>
    </style:style>
    <style:style style:name="P97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1" officeooo:rsid="002defd5" officeooo:paragraph-rsid="003915e6" style:font-name-complex="Times New Roman1"/>
    </style:style>
    <style:style style:name="P98" style:family="paragraph" style:parent-style-name="Standard">
      <style:paragraph-properties fo:text-align="justify" style:justify-single-word="false" fo:text-indent="0cm" style:auto-text-indent="false"/>
      <style:text-properties fo:color="#000000" loext:opacity="100%" style:font-name="Times New Roman" fo:font-style="italic" officeooo:rsid="002defd5" officeooo:paragraph-rsid="00609a4a" style:font-style-asian="italic" style:font-name-complex="Times New Roman1" style:font-style-complex="italic"/>
    </style:style>
    <style:style style:name="P99" style:family="paragraph" style:parent-style-name="Standard">
      <style:paragraph-properties fo:text-align="justify" style:justify-single-word="false" fo:text-indent="0cm" style:auto-text-indent="false"/>
      <style:text-properties fo:color="#000000" loext:opacity="100%" style:font-name="Times New Roman" officeooo:rsid="002defd5" officeooo:paragraph-rsid="00609a4a" style:font-name-complex="Times New Roman1"/>
    </style:style>
    <style:style style:name="P100" style:family="paragraph" style:parent-style-name="Standard" style:list-style-name="L4">
      <style:paragraph-properties fo:text-align="justify" style:justify-single-word="false"/>
      <style:text-properties fo:color="#000000" loext:opacity="100%" style:font-name="Times New Roman" officeooo:rsid="002defd5" officeooo:paragraph-rsid="00609a4a" style:font-name-complex="Times New Roman1"/>
    </style:style>
    <style:style style:name="P101" style:family="paragraph" style:parent-style-name="Standard" style:list-style-name="L5">
      <style:paragraph-properties fo:text-align="justify" style:justify-single-word="false"/>
      <style:text-properties fo:color="#000000" loext:opacity="100%" style:font-name="Times New Roman1" officeooo:rsid="002defd5" officeooo:paragraph-rsid="003915e6" style:font-name-complex="Times New Roman1"/>
    </style:style>
    <style:style style:name="P102" style:family="paragraph" style:parent-style-name="Standard">
      <style:paragraph-properties fo:text-align="justify" style:justify-single-word="false"/>
      <style:text-properties fo:color="#000000" loext:opacity="100%" style:font-name="Times New Roman1" officeooo:rsid="002defd5" officeooo:paragraph-rsid="003915e6" style:font-name-complex="Times New Roman1"/>
    </style:style>
    <style:style style:name="P103" style:family="paragraph" style:parent-style-name="Standard">
      <style:paragraph-properties fo:text-align="justify" style:justify-single-word="false"/>
      <style:text-properties fo:color="#000000" loext:opacity="100%" style:font-name="Times New Roman" officeooo:rsid="002defd5" officeooo:paragraph-rsid="003915e6" style:font-name-complex="Times New Roman1"/>
    </style:style>
    <style:style style:name="P104" style:family="paragraph" style:parent-style-name="Standard">
      <style:paragraph-properties fo:text-align="justify" style:justify-single-word="false" fo:text-indent="0cm" style:auto-text-indent="false"/>
      <style:text-properties fo:color="#000000" loext:opacity="100%" style:font-name="Times New Roman" fo:font-style="italic" officeooo:rsid="002defd5" officeooo:paragraph-rsid="003915e6" style:font-style-asian="italic" style:font-name-complex="Times New Roman1" style:font-style-complex="italic"/>
    </style:style>
    <style:style style:name="P105" style:family="paragraph" style:parent-style-name="Standard">
      <style:paragraph-properties fo:text-align="justify" style:justify-single-word="false" fo:text-indent="0cm" style:auto-text-indent="false"/>
      <style:text-properties fo:color="#000000" loext:opacity="100%" style:font-name="Times New Roman" officeooo:rsid="002defd5" officeooo:paragraph-rsid="003915e6" style:font-name-complex="Times New Roman1"/>
    </style:style>
    <style:style style:name="P106" style:family="paragraph" style:parent-style-name="Standard" style:list-style-name="L6">
      <style:paragraph-properties fo:text-align="justify" style:justify-single-word="false"/>
      <style:text-properties fo:color="#000000" loext:opacity="100%" style:font-name="Times New Roman" officeooo:rsid="002defd5" officeooo:paragraph-rsid="003915e6" style:font-name-complex="Times New Roman1"/>
    </style:style>
    <style:style style:name="P107" style:family="paragraph" style:parent-style-name="Heading_20_1">
      <style:paragraph-properties fo:break-before="page"/>
      <style:text-properties officeooo:paragraph-rsid="003a3016"/>
    </style:style>
    <style:style style:name="P108" style:family="paragraph" style:parent-style-name="Default">
      <style:paragraph-properties fo:text-align="justify" style:justify-single-word="false"/>
      <style:text-properties fo:font-size="14pt" fo:font-style="normal" officeooo:paragraph-rsid="00313a62" style:font-size-asian="14pt" style:font-style-asian="normal" style:font-size-complex="14pt" style:font-style-complex="normal"/>
    </style:style>
    <style:style style:name="P109" style:family="paragraph" style:parent-style-name="Heading_20_1">
      <style:paragraph-properties fo:text-align="center" style:justify-single-word="false" fo:break-before="page"/>
      <style:text-properties officeooo:paragraph-rsid="001c9c4d"/>
    </style:style>
    <style:style style:name="P110" style:family="paragraph" style:parent-style-name="Heading_20_1">
      <style:paragraph-properties fo:text-align="justify" style:justify-single-word="false"/>
      <style:text-properties officeooo:paragraph-rsid="001c9c4d"/>
    </style:style>
    <style:style style:name="P111" style:family="paragraph" style:parent-style-name="Default">
      <style:paragraph-properties fo:margin-top="0cm" fo:margin-bottom="0.347cm" style:contextual-spacing="false"/>
      <style:text-properties fo:font-size="14pt" fo:font-style="italic" style:font-size-asian="14pt" style:font-style-asian="italic" style:font-size-complex="14pt"/>
    </style:style>
    <style:style style:name="P112" style:family="paragraph">
      <loext:graphic-properties draw:fill-color="#ffffff"/>
      <style:paragraph-properties style:writing-mode="lr-tb"/>
    </style:style>
    <style:style style:name="P113" style:family="paragraph" style:parent-style-name="Default">
      <style:paragraph-properties fo:margin-top="0cm" fo:margin-bottom="0.347cm" style:contextual-spacing="false"/>
      <style:text-properties fo:font-size="14pt" fo:font-style="normal" style:font-size-asian="14pt" style:font-style-asian="normal" style:font-size-complex="14pt" style:font-style-complex="normal"/>
    </style:style>
    <style:style style:name="P114" style:family="paragraph" style:parent-style-name="Standard">
      <style:paragraph-properties fo:margin-top="0cm" fo:margin-bottom="0.347cm" style:contextual-spacing="false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115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116" style:family="paragraph" style:parent-style-name="Standard">
      <style:text-properties fo:font-size="14pt" fo:font-style="italic" style:font-size-asian="14pt" style:font-style-asian="italic" style:font-size-complex="14pt"/>
    </style:style>
    <style:style style:name="P117" style:family="paragraph" style:parent-style-name="Standard">
      <style:paragraph-properties fo:margin-left="0cm" fo:margin-right="0cm" fo:text-indent="0cm" style:auto-text-indent="false"/>
    </style:style>
    <style:style style:name="P118" style:family="paragraph">
      <loext:graphic-properties draw:fill-color="#ffffff"/>
      <style:paragraph-properties style:writing-mode="lr-tb"/>
      <style:text-properties fo:font-size="12pt"/>
    </style:style>
    <style:style style:name="P119" style:family="paragraph" style:parent-style-name="Standard">
      <style:paragraph-properties fo:text-align="justify" style:justify-single-word="false" fo:text-indent="0cm" style:auto-text-indent="false"/>
      <style:text-properties officeooo:paragraph-rsid="001c9c4d"/>
    </style:style>
    <style:style style:name="P120" style:family="paragraph" style:parent-style-name="Standard">
      <style:paragraph-properties fo:text-align="justify" style:justify-single-word="false"/>
      <style:text-properties officeooo:paragraph-rsid="001c9c4d"/>
    </style:style>
    <style:style style:name="P121" style:family="paragraph" style:parent-style-name="Standard">
      <style:paragraph-properties fo:text-indent="0cm" style:auto-text-indent="false"/>
      <style:text-properties officeooo:paragraph-rsid="001c9c4d"/>
    </style:style>
    <style:style style:name="P122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6c9ea" officeooo:paragraph-rsid="0046c9ea" fo:background-color="transparent"/>
    </style:style>
    <style:style style:name="P123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6c9ea" officeooo:paragraph-rsid="0046c9ea"/>
    </style:style>
    <style:style style:name="P124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67eca5" officeooo:paragraph-rsid="0067eca5"/>
    </style:style>
    <style:style style:name="P125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680b47" officeooo:paragraph-rsid="00680b47"/>
    </style:style>
    <style:style style:name="P126" style:family="paragraph" style:parent-style-name="Standard">
      <style:paragraph-properties fo:text-align="justify" style:justify-single-word="false" fo:text-indent="0cm" style:auto-text-indent="false"/>
      <style:text-properties officeooo:rsid="0046c9ea" officeooo:paragraph-rsid="0046c9ea"/>
    </style:style>
    <style:style style:name="P127" style:family="paragraph" style:parent-style-name="Preformatted_20_Text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1c9c4d" style:font-size-asian="14pt" style:font-size-complex="14pt"/>
    </style:style>
    <style:style style:name="P128" style:family="paragraph" style:parent-style-name="Preformatted_20_Text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47141a" style:font-size-asian="14pt" style:font-size-complex="14pt"/>
    </style:style>
    <style:style style:name="P129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7141a" officeooo:paragraph-rsid="0047141a"/>
    </style:style>
    <style:style style:name="P130" style:family="paragraph" style:parent-style-name="Preformatted_20_Text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48ae3f" style:font-size-asian="14pt" style:font-size-complex="14pt"/>
    </style:style>
    <style:style style:name="P131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officeooo:paragraph-rsid="0048ae3f"/>
    </style:style>
    <style:style style:name="P132" style:family="paragraph" style:parent-style-name="Standard">
      <style:paragraph-properties fo:text-align="justify" style:justify-single-word="false" fo:text-indent="0cm" style:auto-text-indent="false"/>
      <style:text-properties officeooo:paragraph-rsid="0048ae3f"/>
    </style:style>
    <style:style style:name="P133" style:family="paragraph" style:parent-style-name="Preformatted_20_Text">
      <style:paragraph-properties fo:text-align="justify" style:justify-single-word="false" fo:text-indent="0cm" style:auto-text-indent="false"/>
      <style:text-properties fo:color="#069a2e" loext:opacity="100%" style:font-name="Times New Roman" officeooo:paragraph-rsid="0048ae3f"/>
    </style:style>
    <style:style style:name="P134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8ae3f" officeooo:paragraph-rsid="0048ae3f"/>
    </style:style>
    <style:style style:name="P135" style:family="paragraph" style:parent-style-name="Standard">
      <style:paragraph-properties fo:text-align="justify" style:justify-single-word="false" fo:text-indent="0cm" style:auto-text-indent="false"/>
      <style:text-properties fo:color="#069a2e" loext:opacity="100%" fo:font-size="14pt" officeooo:rsid="0048ae3f" officeooo:paragraph-rsid="0048ae3f" style:font-size-asian="14pt" style:font-size-complex="14pt"/>
    </style:style>
    <style:style style:name="P136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aacb8" officeooo:paragraph-rsid="004aacb8"/>
    </style:style>
    <style:style style:name="P137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1c9c4d" style:font-size-asian="14pt" style:font-size-complex="14pt"/>
    </style:style>
    <style:style style:name="P138" style:family="paragraph" style:parent-style-name="Standard">
      <style:paragraph-properties fo:text-align="justify" style:justify-single-word="false" fo:text-indent="0cm" style:auto-text-indent="false"/>
      <style:text-properties officeooo:paragraph-rsid="004b430e"/>
    </style:style>
    <style:style style:name="P139" style:family="paragraph" style:parent-style-name="Preformatted_20_Text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4b430e" style:font-size-asian="14pt" style:font-size-complex="14pt"/>
    </style:style>
    <style:style style:name="P140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officeooo:paragraph-rsid="004b430e"/>
    </style:style>
    <style:style style:name="P141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a2c8a" officeooo:paragraph-rsid="005a2c8a"/>
    </style:style>
    <style:style style:name="P142" style:family="paragraph" style:parent-style-name="Standard">
      <style:paragraph-properties fo:text-align="justify" style:justify-single-word="false" fo:text-indent="0cm" style:auto-text-indent="false"/>
      <style:text-properties officeooo:paragraph-rsid="005a2c8a"/>
    </style:style>
    <style:style style:name="P143" style:family="paragraph" style:parent-style-name="Standard">
      <style:paragraph-properties fo:text-align="justify" style:justify-single-word="false" fo:text-indent="0cm" style:auto-text-indent="false"/>
      <style:text-properties officeooo:paragraph-rsid="0067eca5"/>
    </style:style>
    <style:style style:name="P144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4cbe00" style:font-size-asian="14pt" style:font-size-complex="14pt"/>
    </style:style>
    <style:style style:name="P145" style:family="paragraph" style:parent-style-name="Heading_20_1">
      <style:paragraph-properties fo:text-align="center" style:justify-single-word="false" fo:text-indent="0cm" style:auto-text-indent="false" fo:break-before="page"/>
      <style:text-properties officeooo:paragraph-rsid="001c9c4d"/>
    </style:style>
    <style:style style:name="P146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paragraph-rsid="001c9c4d"/>
    </style:style>
    <style:style style:name="P147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f5d0b" officeooo:paragraph-rsid="004f5d0b"/>
    </style:style>
    <style:style style:name="P148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194a8" officeooo:paragraph-rsid="005194a8"/>
    </style:style>
    <style:style style:name="P149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eb1c5" officeooo:paragraph-rsid="004eb1c5"/>
    </style:style>
    <style:style style:name="P150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cbe00" officeooo:paragraph-rsid="004eb1c5"/>
    </style:style>
    <style:style style:name="P151" style:family="paragraph" style:parent-style-name="Standard">
      <style:paragraph-properties fo:text-align="justify" style:justify-single-word="false" fo:text-indent="0cm" style:auto-text-indent="false"/>
      <style:text-properties officeooo:paragraph-rsid="0050114c"/>
    </style:style>
    <style:style style:name="P152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0114c" officeooo:paragraph-rsid="0050114c"/>
    </style:style>
    <style:style style:name="P153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eb1c5" officeooo:paragraph-rsid="005194a8"/>
    </style:style>
    <style:style style:name="P154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officeooo:paragraph-rsid="004eb1c5"/>
    </style:style>
    <style:style style:name="P155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paragraph-rsid="004eb1c5"/>
    </style:style>
    <style:style style:name="P156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officeooo:paragraph-rsid="004f0bfa"/>
    </style:style>
    <style:style style:name="P157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24374" officeooo:paragraph-rsid="00524374"/>
    </style:style>
    <style:style style:name="P158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paragraph-rsid="004f0bfa"/>
    </style:style>
    <style:style style:name="P159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f0bfa" officeooo:paragraph-rsid="00524374"/>
    </style:style>
    <style:style style:name="P160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4f0bfa" officeooo:paragraph-rsid="004f0bfa"/>
    </style:style>
    <style:style style:name="P161" style:family="paragraph" style:parent-style-name="Standard">
      <style:paragraph-properties fo:text-align="justify" style:justify-single-word="false" fo:text-indent="0cm" style:auto-text-indent="false"/>
      <style:text-properties officeooo:paragraph-rsid="004f0bfa"/>
    </style:style>
    <style:style style:name="P162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2c17d" officeooo:paragraph-rsid="0052c17d"/>
    </style:style>
    <style:style style:name="P163" style:family="paragraph" style:parent-style-name="Times_20_New_20_Roman">
      <style:text-properties fo:color="#069a2e" loext:opacity="100%" style:font-name="Times New Roman" fo:font-size="14pt" style:font-size-asian="14pt" style:font-size-complex="14pt"/>
    </style:style>
    <style:style style:name="P164" style:family="paragraph" style:parent-style-name="Standard">
      <style:paragraph-properties fo:text-align="justify" style:justify-single-word="false" fo:text-indent="0cm" style:auto-text-indent="false"/>
      <style:text-properties officeooo:paragraph-rsid="0052c17d"/>
    </style:style>
    <style:style style:name="P165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44a0f" officeooo:paragraph-rsid="00544a0f"/>
    </style:style>
    <style:style style:name="P166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544a0f" style:font-size-asian="14pt" style:font-size-complex="14pt"/>
    </style:style>
    <style:style style:name="P167" style:family="paragraph" style:parent-style-name="Standard">
      <style:paragraph-properties fo:text-align="justify" style:justify-single-word="false" fo:text-indent="0cm" style:auto-text-indent="false"/>
      <style:text-properties officeooo:paragraph-rsid="00544a0f"/>
    </style:style>
    <style:style style:name="P168" style:family="paragraph" style:parent-style-name="Standard">
      <style:paragraph-properties fo:text-align="justify" style:justify-single-word="false" fo:text-indent="0cm" style:auto-text-indent="false"/>
      <style:text-properties fo:color="#069a2e" loext:opacity="100%" style:font-name="Times New Roman" fo:font-size="14pt" officeooo:paragraph-rsid="0054cf17" style:font-size-asian="14pt" style:font-size-complex="14pt"/>
    </style:style>
    <style:style style:name="P169" style:family="paragraph" style:parent-style-name="Standard">
      <style:paragraph-properties fo:text-align="justify" style:justify-single-word="false" fo:text-indent="0cm" style:auto-text-indent="false"/>
      <style:text-properties officeooo:paragraph-rsid="0054cf17"/>
    </style:style>
    <style:style style:name="P170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4cf17" officeooo:paragraph-rsid="0054cf17"/>
    </style:style>
    <style:style style:name="P171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679b8" officeooo:paragraph-rsid="005679b8"/>
    </style:style>
    <style:style style:name="P172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6b8ab" officeooo:paragraph-rsid="0056b8ab"/>
    </style:style>
    <style:style style:name="P173" style:family="paragraph" style:parent-style-name="Standard">
      <style:paragraph-properties fo:text-align="justify" style:justify-single-word="false" fo:text-indent="0cm" style:auto-text-indent="false"/>
      <style:text-properties fo:color="#069a2e" loext:opacity="100%" officeooo:rsid="0058b04a" officeooo:paragraph-rsid="0058b04a"/>
    </style:style>
    <style:style style:name="T1" style:family="text">
      <style:text-properties fo:font-size="12pt" style:font-size-asian="12pt"/>
    </style:style>
    <style:style style:name="T2" style:family="text">
      <style:text-properties officeooo:rsid="001ab515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63822b"/>
    </style:style>
    <style:style style:name="T6" style:family="text">
      <style:text-properties fo:font-style="italic" style:font-style-asian="italic" style:font-style-complex="normal"/>
    </style:style>
    <style:style style:name="T7" style:family="text">
      <style:text-properties officeooo:rsid="003e95aa"/>
    </style:style>
    <style:style style:name="T8" style:family="text">
      <style:text-properties style:use-window-font-color="true" loext:opacity="0%" style:font-name="Helvetica" fo:font-size="12pt" style:font-size-asian="12pt"/>
    </style:style>
    <style:style style:name="T9" style:family="text">
      <style:text-properties style:use-window-font-color="true" loext:opacity="0%" style:font-name="Helvetica" fo:font-size="12pt" officeooo:rsid="00151d0a" style:font-size-asian="12pt"/>
    </style:style>
    <style:style style:name="T10" style:family="text">
      <style:text-properties style:use-window-font-color="true" loext:opacity="0%" style:font-name="Helvetica" fo:font-size="12pt" officeooo:rsid="0013bf3d" style:font-size-asian="12pt"/>
    </style:style>
    <style:style style:name="T11" style:family="text">
      <style:text-properties officeooo:rsid="001cd4cd"/>
    </style:style>
    <style:style style:name="T12" style:family="text">
      <style:text-properties fo:font-style="normal" fo:font-weight="bold" officeooo:rsid="001c9c4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b2444" style:font-style-asian="normal" style:font-weight-asian="bold" style:font-style-complex="normal" style:font-weight-complex="bold"/>
    </style:style>
    <style:style style:name="T14" style:family="text">
      <style:text-properties officeooo:rsid="001b2444"/>
    </style:style>
    <style:style style:name="T15" style:family="text">
      <style:text-properties fo:font-weight="bold" officeooo:rsid="001c9c4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loext:opacity="0%" fo:font-weight="bold" officeooo:rsid="001b2444" style:font-weight-asian="bold" style:font-weight-complex="bold"/>
    </style:style>
    <style:style style:name="T18" style:family="text">
      <style:text-properties style:use-window-font-color="true" loext:opacity="0%" fo:font-weight="bold" officeooo:rsid="001e456f" style:font-weight-asian="bold" style:font-weight-complex="bold"/>
    </style:style>
    <style:style style:name="T19" style:family="text">
      <style:text-properties style:use-window-font-color="true" loext:opacity="0%" fo:font-weight="bold" style:font-weight-asian="bold" style:font-weight-complex="bold"/>
    </style:style>
    <style:style style:name="T20" style:family="text">
      <style:text-properties style:use-window-font-color="true" loext:opacity="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loext:opacity="100%" fo:letter-spacing="normal" fo:font-weight="normal"/>
    </style:style>
    <style:style style:name="T24" style:family="text">
      <style:text-properties fo:font-variant="normal" fo:text-transform="none" fo:color="#000000" loext:opacity="100%" style:font-name="Times New Roman" fo:letter-spacing="normal" fo:font-style="italic" fo:font-weight="normal" style:font-style-asian="italic" style:font-style-complex="itali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1f6206"/>
    </style:style>
    <style:style style:name="T27" style:family="text">
      <style:text-properties style:font-style-complex="italic"/>
    </style:style>
    <style:style style:name="T28" style:family="text">
      <style:text-properties fo:font-size="14pt" fo:font-style="normal" style:font-size-asian="14pt" style:font-style-asian="normal" style:font-size-complex="14pt" style:font-style-complex="normal"/>
    </style:style>
    <style:style style:name="T29" style:family="text">
      <style:text-properties style:use-window-font-color="true" loext:opacity="0%" officeooo:rsid="001b2444"/>
    </style:style>
    <style:style style:name="T3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officeooo:rsid="00286766"/>
    </style:style>
    <style:style style:name="T32" style:family="text">
      <style:text-properties officeooo:rsid="0029360b"/>
    </style:style>
    <style:style style:name="T33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34" style:family="text">
      <style:text-properties fo:font-style="italic" officeooo:rsid="006d2b32" style:font-style-asian="italic" style:font-style-complex="italic"/>
    </style:style>
    <style:style style:name="T35" style:family="text">
      <style:text-properties officeooo:rsid="001c9c4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italic" fo:font-weight="normal" style:font-style-asian="italic" style:font-weight-asian="normal"/>
    </style:style>
    <style:style style:name="T38" style:family="text">
      <style:text-properties fo:color="#d4d4d4" loext:opacity="100%"/>
    </style:style>
    <style:style style:name="T39" style:family="text">
      <style:text-properties fo:font-weight="normal" style:font-weight-asian="normal"/>
    </style:style>
    <style:style style:name="T40" style:family="text">
      <style:text-properties fo:font-style="italic" fo:font-weight="normal" officeooo:rsid="001c9c4d" style:font-style-asian="italic" style:font-weight-asian="normal" style:font-style-complex="normal" style:font-weight-complex="bold"/>
    </style:style>
    <style:style style:name="T41" style:family="text">
      <style:text-properties fo:color="#069a2e" loext:opacity="100%" officeooo:rsid="0066d070"/>
    </style:style>
    <style:style style:name="T42" style:family="text">
      <style:text-properties fo:font-variant="normal" fo:text-transform="none" fo:color="#069a2e" loext:opacity="100%" style:font-name="quote-cjk-patch" fo:font-size="12pt" fo:letter-spacing="normal" fo:font-style="normal" fo:font-weight="normal"/>
    </style:style>
    <style:style style:name="T43" style:family="text">
      <style:text-properties fo:color="#069a2e" loext:opacity="100%" officeooo:rsid="0067eca5"/>
    </style:style>
    <style:style style:name="T44" style:family="text">
      <style:text-properties fo:color="#069a2e" loext:opacity="100%" officeooo:rsid="00680b47"/>
    </style:style>
    <style:style style:name="T45" style:family="text">
      <style:text-properties fo:color="#069a2e" loext:opacity="100%" style:font-name="Times New Roman" fo:font-size="14pt" officeooo:rsid="00680b47" style:font-size-asian="14pt" style:font-size-complex="14pt"/>
    </style:style>
    <style:style style:name="T46" style:family="text">
      <style:text-properties fo:font-variant="normal" fo:text-transform="none" fo:color="#069a2e" loext:opacity="100%" style:font-name="Times New Roman" fo:font-size="14pt" fo:letter-spacing="normal" fo:font-style="normal" fo:font-weight="normal" style:font-size-asian="14pt" style:font-size-complex="14pt"/>
    </style:style>
    <style:style style:name="T47" style:family="text">
      <style:text-properties officeooo:rsid="004f5d0b"/>
    </style:style>
    <style:style style:name="T48" style:family="text">
      <style:text-properties fo:font-variant="normal" fo:text-transform="none" fo:letter-spacing="normal" fo:font-style="italic" fo:font-weight="normal" officeooo:rsid="0047141a"/>
    </style:style>
    <style:style style:name="T49" style:family="text">
      <style:text-properties fo:font-variant="normal" fo:text-transform="none" fo:letter-spacing="normal" fo:font-style="italic" fo:font-weight="normal"/>
    </style:style>
    <style:style style:name="T50" style:family="text">
      <style:text-properties fo:font-variant="normal" fo:text-transform="none" fo:letter-spacing="normal" fo:font-style="italic" fo:font-weight="normal" officeooo:rsid="0048ae3f"/>
    </style:style>
    <style:style style:name="T51" style:family="text">
      <style:text-properties officeooo:rsid="0048ae3f"/>
    </style:style>
    <style:style style:name="T52" style:family="text">
      <style:text-properties fo:font-variant="normal" fo:text-transform="none" fo:font-size="14pt" fo:letter-spacing="normal" fo:font-style="italic" fo:font-weight="normal" officeooo:rsid="0048ae3f" style:font-size-asian="14pt" style:font-size-complex="14pt"/>
    </style:style>
    <style:style style:name="T53" style:family="text">
      <style:text-properties fo:font-variant="normal" fo:text-transform="none" fo:font-size="14pt" fo:letter-spacing="normal" fo:font-style="italic" fo:font-weight="normal" style:font-size-asian="14pt" style:font-size-complex="14pt"/>
    </style:style>
    <style:style style:name="T54" style:family="text">
      <style:text-properties fo:color="#069a2e" loext:opacity="100%" officeooo:rsid="0048ae3f"/>
    </style:style>
    <style:style style:name="T55" style:family="text">
      <style:text-properties fo:font-variant="normal" fo:text-transform="none" fo:color="#069a2e" loext:opacity="100%" style:font-name="var ds-font-family-code" fo:letter-spacing="normal" fo:font-style="italic" fo:font-weight="normal"/>
    </style:style>
    <style:style style:name="T56" style:family="text">
      <style:text-properties fo:color="#069a2e" loext:opacity="100%" officeooo:rsid="006991a0"/>
    </style:style>
    <style:style style:name="T57" style:family="text">
      <style:text-properties fo:font-variant="normal" fo:text-transform="none" fo:letter-spacing="normal" fo:font-style="italic" fo:font-weight="normal" officeooo:rsid="004aacb8"/>
    </style:style>
    <style:style style:name="T58" style:family="text">
      <style:text-properties fo:font-variant="normal" fo:text-transform="none" fo:letter-spacing="normal" fo:font-style="italic" fo:font-weight="normal" officeooo:rsid="004b430e"/>
    </style:style>
    <style:style style:name="T59" style:family="text">
      <style:text-properties fo:color="#069a2e" loext:opacity="100%" officeooo:rsid="004b430e"/>
    </style:style>
    <style:style style:name="T60" style:family="text">
      <style:text-properties fo:font-variant="normal" fo:text-transform="none" fo:color="#069a2e" loext:opacity="100%" fo:letter-spacing="normal"/>
    </style:style>
    <style:style style:name="T61" style:family="text">
      <style:text-properties fo:color="#069a2e" loext:opacity="100%"/>
    </style:style>
    <style:style style:name="T62" style:family="text">
      <style:text-properties fo:color="#069a2e" loext:opacity="100%" style:font-name="Times New Roman" officeooo:rsid="004b430e"/>
    </style:style>
    <style:style style:name="T63" style:family="text">
      <style:text-properties fo:font-variant="normal" fo:text-transform="none" fo:color="#069a2e" loext:opacity="100%" style:font-name="Times New Roman" fo:letter-spacing="normal" fo:font-style="italic" fo:font-weight="normal"/>
    </style:style>
    <style:style style:name="T64" style:family="text">
      <style:text-properties officeooo:rsid="004b430e"/>
    </style:style>
    <style:style style:name="T65" style:family="text">
      <style:text-properties officeooo:rsid="004cbe00"/>
    </style:style>
    <style:style style:name="T66" style:family="text">
      <style:text-properties fo:font-variant="normal" fo:text-transform="none" fo:letter-spacing="normal" fo:font-style="normal" fo:font-weight="normal"/>
    </style:style>
    <style:style style:name="T67" style:family="text">
      <style:text-properties fo:color="#069a2e" loext:opacity="100%" officeooo:rsid="005a09ca"/>
    </style:style>
    <style:style style:name="T68" style:family="text">
      <style:text-properties fo:font-variant="normal" fo:text-transform="none" fo:color="#069a2e" loext:opacity="100%" style:font-name="Times New Roman" fo:font-size="14pt" fo:letter-spacing="normal" fo:font-style="normal" fo:font-weight="normal" officeooo:rsid="005a09ca" style:font-size-asian="14pt" style:font-size-complex="14pt"/>
    </style:style>
    <style:style style:name="T69" style:family="text">
      <style:text-properties fo:font-variant="normal" fo:text-transform="none" fo:color="#069a2e" loext:opacity="100%" style:font-name="Times New Roman" fo:font-size="14pt" fo:letter-spacing="normal" officeooo:rsid="005a09ca" style:font-size-asian="14pt" style:font-size-complex="14pt"/>
    </style:style>
    <style:style style:name="T70" style:family="text">
      <style:text-properties officeooo:rsid="004eb1c5"/>
    </style:style>
    <style:style style:name="T71" style:family="text">
      <style:text-properties officeooo:rsid="0050114c"/>
    </style:style>
    <style:style style:name="T72" style:family="text">
      <style:text-properties fo:color="#069a2e" loext:opacity="100%" officeooo:rsid="004cbe00"/>
    </style:style>
    <style:style style:name="T73" style:family="text">
      <style:text-properties officeooo:rsid="005194a8"/>
    </style:style>
    <style:style style:name="T74" style:family="text">
      <style:text-properties fo:font-variant="normal" fo:text-transform="none" style:font-name="Times New Roman" fo:letter-spacing="normal" fo:font-style="italic" fo:font-weight="normal"/>
    </style:style>
    <style:style style:name="T75" style:family="text">
      <style:text-properties officeooo:rsid="004f0bfa"/>
    </style:style>
    <style:style style:name="T76" style:family="text">
      <style:text-properties fo:font-variant="normal" fo:text-transform="none" style:font-name="var ds-font-family-code" fo:letter-spacing="normal" fo:font-style="italic" fo:font-weight="normal" officeooo:rsid="004f0bfa"/>
    </style:style>
    <style:style style:name="T77" style:family="text">
      <style:text-properties officeooo:rsid="00524374"/>
    </style:style>
    <style:style style:name="T78" style:family="text">
      <style:text-properties fo:color="#069a2e" loext:opacity="100%" officeooo:rsid="00524374"/>
    </style:style>
    <style:style style:name="T79" style:family="text">
      <style:text-properties fo:color="#069a2e" loext:opacity="100%" officeooo:rsid="0052c17d"/>
    </style:style>
    <style:style style:name="T80" style:family="text">
      <style:text-properties officeooo:rsid="0052c17d"/>
    </style:style>
    <style:style style:name="T81" style:family="text">
      <style:text-properties officeooo:rsid="00544a0f"/>
    </style:style>
    <style:style style:name="T82" style:family="text">
      <style:text-properties fo:font-variant="normal" fo:text-transform="none" fo:color="#50a14f" loext:opacity="100%" fo:letter-spacing="normal" fo:font-style="normal" fo:font-weight="normal"/>
    </style:style>
    <style:style style:name="T83" style:family="text">
      <style:text-properties fo:color="#069a2e" loext:opacity="100%" officeooo:rsid="00544a0f"/>
    </style:style>
    <style:style style:name="T84" style:family="text">
      <style:text-properties fo:color="#069a2e" loext:opacity="100%" style:font-name="Times New Roman" fo:font-size="14pt" officeooo:rsid="00544a0f" style:font-size-asian="14pt" style:font-size-complex="14pt"/>
    </style:style>
    <style:style style:name="T85" style:family="text">
      <style:text-properties fo:font-variant="normal" fo:text-transform="none" fo:color="#069a2e" loext:opacity="100%" style:font-name="Times New Roman" fo:font-size="14pt" fo:letter-spacing="normal" fo:font-style="normal" fo:font-weight="normal" officeooo:rsid="00544a0f" style:font-size-asian="14pt" style:font-size-complex="14pt"/>
    </style:style>
    <style:style style:name="T86" style:family="text">
      <style:text-properties officeooo:rsid="0054cf17"/>
    </style:style>
    <style:style style:name="T87" style:family="text">
      <style:text-properties fo:color="#069a2e" loext:opacity="100%" officeooo:rsid="0054cf17"/>
    </style:style>
    <style:style style:name="T88" style:family="text">
      <style:text-properties fo:color="#069a2e" loext:opacity="100%" style:font-name="Times New Roman" fo:font-size="14pt" officeooo:rsid="0054cf17" style:font-size-asian="14pt" style:font-size-complex="14pt"/>
    </style:style>
    <style:style style:name="T89" style:family="text">
      <style:text-properties fo:font-variant="normal" fo:text-transform="none" fo:color="#069a2e" loext:opacity="100%" style:font-name="Times New Roman" fo:font-size="14pt" fo:letter-spacing="normal" fo:font-style="normal" fo:font-weight="normal" officeooo:rsid="0054cf17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" text:bullet-char="•">
        <style:list-level-properties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1.08cm" fo:min-width="16.251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2.407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15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797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679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675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652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732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799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73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638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742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41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9.373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2.444cm" fo:min-width="17.254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66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975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913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74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16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608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718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9.706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3.035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96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34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968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474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31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074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88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342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367cm" fo:min-width="17.237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53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2.056cm" fo:min-width="17.187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2.502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263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5.882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402cm" fo:min-width="17.353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37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538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55cm" fo:min-width="17.635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23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035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67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261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6.197cm" fo:min-width="17.233cm" fo:padding-top="0.025cm" fo:padding-bottom="0.025cm" fo:padding-left="0.025cm" fo:padding-right="0.025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3.257cm" fo:min-width="17.244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МИНИСТЕРСТВО НАУКИ И ВЫСШЕГО ОБРАЗОВАНИЯ<text:line-break/> РОССИЙСКОЙ ФЕДЕРАЦИИ</text:h>
      <text:h text:style-name="P2" text:outline-level="6">ФЕДЕРАЛЬНОЕ ГОСУДАРСТВЕННОЕ АВТОНОМНОЕ ОБРАЗОВАТЕЛЬНОЕ УЧРЕЖДЕНИЕ ВЫСШЕГО ОБРАЗОВАНИЯ<text:span text:style-name="T1"/></text:h>
      <text:h text:style-name="P2" text:outline-level="6">НОВОСИБИРСКИЙ НАЦИОНАЛЬНЫЙ ИССЛЕДОВАТЕЛЬСКИЙ ГОСУДАРСТВЕННЫЙ УНИВЕРСИТЕТ</text:h>
      <text:h text:style-name="P3" text:outline-level="6">Факультет информационных технологий<text:span text:style-name="T1"/></text:h>
      <text:p text:style-name="P4">Кафедра параллельных вычислений</text:p>
      <text:p text:style-name="P5"/>
      <text:p text:style-name="P6"/>
      <text:h text:style-name="P7" text:outline-level="7">ОТЧЕТ</text:h>
      <text:h text:style-name="P8" text:outline-level="7">О ВЫПОЛНЕНИИ ЛАБОРАТОРНОЙ РАБОТЫ</text:h>
      <text:p text:style-name="P9"/>
      <text:p text:style-name="P10">«Архитектуры <text:span text:style-name="T2">x86-64, x86 и asm-листинги</text:span>»</text:p>
      <text:p text:style-name="P10"/>
      <text:p text:style-name="P10">студентки <text:span text:style-name="T2">2 </text:span>курса, <text:span text:style-name="T2">24203 </text:span>группы</text:p>
      <text:p text:style-name="P10"/>
      <text:p text:style-name="P11">Ким Дарьи Александровной</text:p>
      <text:p text:style-name="P12"/>
      <text:p text:style-name="P13">Направление 09.03.01 – «Информатика и вычислительная техника»</text:p>
      <text:p text:style-name="P14"/>
      <text:p text:style-name="Standard"/>
      <text:p text:style-name="Standard"/>
      <text:p text:style-name="P15">Преподаватель:</text:p>
      <text:p text:style-name="P15">Власенко Андрей Юрьевич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Новосибирск 20<text:span text:style-name="T2">25</text:span></text:p>
      <text:p text:style-name="P16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8443921" text:style-name="Index_20_Link" text:visited-style-name="Index_20_Link">ЦЕЛЬ<text:tab/>3</text:a></text:p>
          <text:p text:style-name="P18"/>
          <text:p text:style-name="P17"><text:a xlink:type="simple" xlink:href="#__RefHeading___Toc18443922" text:style-name="Index_20_Link" text:visited-style-name="Index_20_Link">ЗАДАНИЕ<text:tab/>3</text:a></text:p>
          <text:p text:style-name="P18"/>
          <text:p text:style-name="P17"><text:a xlink:type="simple" xlink:href="#__RefHeading___Toc18443923" text:style-name="Index_20_Link" text:visited-style-name="Index_20_Link">ОПИСАНИЕ РАБОТЫ<text:tab/>4</text:a></text:p>
          <text:p text:style-name="P18"/>
          <text:p text:style-name="P17"><text:a xlink:type="simple" xlink:href="#__RefHeading___Toc18443924" text:style-name="Index_20_Link" text:visited-style-name="Index_20_Link">ЗАКЛЮЧЕНИЕ<text:tab/>11</text:a></text:p>
          <text:p text:style-name="P18"/>
          <text:p text:style-name="P17"><text:a xlink:type="simple" xlink:href="#__RefHeading___Toc18443925" text:style-name="Index_20_Link" text:visited-style-name="Index_20_Link">Приложение№1</text:a> <text:a xlink:type="simple" xlink:href="#__RefHeading___Toc20586_323823121" text:style-name="Index_20_Link" text:visited-style-name="Index_20_Link"><text:span text:style-name="T3">Листинг</text:span><text:span text:style-name="T4"> </text:span><text:span text:style-name="T3">компиляции программы уровня -O0 на архитектуре x86-64</text:span><text:tab/>12</text:a></text:p>
          <text:p text:style-name="P18"/>
          <text:p text:style-name="P17"><text:a xlink:type="simple" xlink:href="#__RefHeading___Toc18443925%20Copy%201" text:style-name="Index_20_Link" text:visited-style-name="Index_20_Link">Приложение№</text:a><text:span text:style-name="T5">2 </text:span><text:a xlink:type="simple" xlink:href="#__RefHeading___Toc20588_323823121" text:style-name="Index_20_Link" text:visited-style-name="Index_20_Link"><text:span text:style-name="T3">Листинг</text:span> <text:span text:style-name="T3">компиляции программы уровня -O3 на архитектуре x86-64</text:span><text:tab/>25</text:a></text:p>
          <text:p text:style-name="P18"/>
          <text:p text:style-name="P17"><text:a xlink:type="simple" xlink:href="#__RefHeading___Toc18443925%20Copy%202" text:style-name="Index_20_Link" text:visited-style-name="Index_20_Link">Приложение№3</text:a> <text:a xlink:type="simple" xlink:href="#__RefHeading___Toc20590_323823121" text:style-name="Index_20_Link" text:visited-style-name="Index_20_Link"><text:span text:style-name="T3">Листинг</text:span><text:span text:style-name="T6"> </text:span><text:span text:style-name="T3">компиляции программы уровня -O0 на архитектуре x86</text:span><text:tab/>34</text:a></text:p>
          <text:p text:style-name="P18"/>
          <text:p text:style-name="P17"><text:a xlink:type="simple" xlink:href="#__RefHeading___Toc18443925%20Copy%203" text:style-name="Index_20_Link" text:visited-style-name="Index_20_Link">Приложение№4</text:a> <text:a xlink:type="simple" xlink:href="#__RefHeading___Toc20592_323823121" text:style-name="Index_20_Link" text:visited-style-name="Index_20_Link"><text:span text:style-name="T3">Листинг</text:span><text:span text:style-name="T6"> </text:span><text:span text:style-name="T3">компиляции программы уровня -O3 на архитектуре x86</text:span><text:tab/>46</text:a></text:p>
        </text:index-body>
      </text:table-of-content>
      <text:p text:style-name="P19"/>
      <text:p text:style-name="P20"/>
      <text:p text:style-name="P20"/>
      <text:h text:style-name="P21" text:outline-level="1"><text:bookmark-start text:name="__RefHeading___Toc18443921"/>ЦЕЛЬ<text:bookmark-end text:name="__RefHeading___Toc18443921"/></text:h>
      <text:p text:style-name="Standard"/>
      <text:p text:style-name="P22">Рассмотреть отличия исполняемой программы,выполненной на языках Си и ассемблере ,изучив <text:span text:style-name="T2">asm-листинги на архитектурах x86, x86-64.</text:span></text:p>
      <text:p text:style-name="P23"/>
      <text:h text:style-name="P24" text:outline-level="1"><text:bookmark-start text:name="__RefHeading___Toc18443922"/>ЗАДАНИЕ<text:bookmark-end text:name="__RefHeading___Toc18443922"/></text:h>
      <text:p text:style-name="P25"/>
      <text:p text:style-name="P26">Перевести программу <text:span text:style-name="T7">(вычисления числа Пи методом Монте-Карло)</text:span> с языка Си на ассемблер и проанализировать полученные листинги для выявления отличий этих двух реализаций кода на <text:span text:style-name="T2">x86, x86-64 и более глубокого изучения архитектур.</text:span></text:p>
      <text:h text:style-name="P27" text:outline-level="1" text:is-list-header="true"><text:bookmark-start text:name="__RefHeading___Toc18443923"/>ОПИСАНИЕ РАБОТЫ<text:bookmark-end text:name="__RefHeading___Toc18443923"/></text:h>
      <text:p text:style-name="P28"/>
      <text:p text:style-name="P29">1) Код вычисления числа Пи методом Монте-Карло:</text:p>
      <text:p text:style-name="P30"><text:tab/><text:tab/><text:tab/><text:tab/><text:tab/><text:tab/><text:tab/><text:tab/><text:tab/><text:tab/><text:tab/>Листинг 1</text:p>
      <text:p text:style-name="P31"><draw:custom-shape text:anchor-type="paragraph" draw:z-index="1" draw:name="Shape 1" draw:style-name="gr1" draw:text-style-name="P32" svg:width="16.301cm" svg:height="21.13cm" svg:x="0.111cm" svg:y="0.053cm"><text:p/><draw:enhanced-geometry svg:viewBox="0 0 21600 21600" draw:type="rectangle" draw:enhanced-path="M 0 0 L 21600 0 21600 21600 0 21600 0 0 Z N"/></draw:custom-shape></text:p>
      <text:p text:style-name="P33"><text:span text:style-name="T8">#include &lt;</text:span><text:span text:style-name="T9">i</text:span><text:span text:style-name="T8">ostream&gt;</text:span></text:p>
      <text:p text:style-name="P34">#include &lt;random&gt; </text:p>
      <text:p text:style-name="P34">#include &lt;time.h&gt; </text:p>
      <text:p text:style-name="P33"/>
      <text:p text:style-name="P34">using namespace std;</text:p>
      <text:p text:style-name="P33"/>
      <text:p text:style-name="P34">double numberPi(int n){</text:p>
      <text:p text:style-name="P34"><text:tab/>struct timespec start, end; </text:p>
      <text:p text:style-name="P34"><text:tab/>clock_gettime (CLOCK_MONOTONIC_RAW, &amp;start);</text:p>
      <text:p text:style-name="P34"><text:tab/>int m = 0; </text:p>
      <text:p text:style-name="P34"><text:tab/>double x; </text:p>
      <text:p text:style-name="P34"><text:tab/>double y;</text:p>
      <text:p text:style-name="P34"><text:tab/>random_device rd;</text:p>
      <text:p text:style-name="P34"><text:tab/>uniform_real_distribution&lt;double&gt; dist (-1.0,1.0);</text:p>
      <text:p text:style-name="P34"><text:tab/>for (int i = 0;i &lt; n; i++){</text:p>
      <text:p text:style-name="P34"><text:tab/><text:tab/>x = dist(rd);</text:p>
      <text:p text:style-name="P34"><text:tab/><text:tab/>y = dist(rd);</text:p>
      <text:p text:style-name="P34"><text:tab/><text:tab/>if (x*x+y*y&lt;=1){</text:p>
      <text:p text:style-name="P34"><text:tab/><text:tab/><text:tab/>m+=1;</text:p>
      <text:p text:style-name="P33"><text:span text:style-name="T8"><text:tab/><text:tab/></text:span><text:span text:style-name="T10">}</text:span></text:p>
      <text:p text:style-name="P34"><text:tab/>}</text:p>
      <text:p text:style-name="P34"><text:tab/>double p = 4.0*m/n;</text:p>
      <text:p text:style-name="P34"><text:tab/>cout « "Number Pi: " « p « endl;</text:p>
      <text:p text:style-name="P34"><text:tab/>clock_gettime (CLOCK_MONOTONIC_RAW, &amp;end); </text:p>
      <text:p text:style-name="P34"><text:tab/>cout &lt;&lt; <text:s/>"Time taken:" <text:s/>&lt;&lt; <text:s/>end.tv_sec-start.tv_sec </text:p>
      <text:p text:style-name="P34"><text:tab/>+ 0.000000001*(end.tv_nsec-start.tv_nsec) <text:s/>&lt;&lt; <text:s/>"sec." &lt;&lt; endl; </text:p>
      <text:p text:style-name="P34"><text:tab/>return 0;</text:p>
      <text:p text:style-name="P35">}</text:p>
      <text:p text:style-name="P35"/>
      <text:p text:style-name="P35">int main(int argc, char* argv[ ]){</text:p>
      <text:p text:style-name="P35"><text:s text:c="4"/>if(argc!=2){</text:p>
      <text:p text:style-name="P36"><text:s text:c="8"/>cerr &lt;&lt; "Error!" &lt;&lt; endl; </text:p>
      <text:p text:style-name="P36"><text:tab/> <text:s text:c="5"/>return 1;</text:p>
      <text:p text:style-name="P35"><text:s text:c="4"/>}</text:p>
      <text:p text:style-name="P35"><text:s text:c="4"/>int n = atoi(argv[1]);</text:p>
      <text:p text:style-name="P35"><text:s text:c="4"/>if (n&lt;=0){</text:p>
      <text:p text:style-name="P35"><text:s text:c="8"/>cerr &lt;&lt; "N &gt;0 !!!" &lt;&lt; endl;</text:p>
      <text:p text:style-name="P35"><text:tab/> <text:s text:c="5"/><text:span text:style-name="T11">return1;</text:span></text:p>
      <text:p text:style-name="P35"><text:s text:c="4"/>}</text:p>
      <text:p text:style-name="P35"><text:s text:c="4"/>cout &lt;&lt; "\033[32m" &lt;&lt; "----- 0.5*N ----- " &lt;&lt; "\033[0m" &lt;&lt; endl;</text:p>
      <text:p text:style-name="P35"><text:s text:c="4"/>numberPi(0.5*n);</text:p>
      <text:p text:style-name="P35"><text:s text:c="4"/>cout &lt;&lt; "\033[32m" &lt;&lt; "-------N -----" &lt;&lt; "\033[0m" &lt;&lt; endl;</text:p>
      <text:p text:style-name="P35"><text:s text:c="4"/>numberPi(n);</text:p>
      <text:p text:style-name="P35"><text:s text:c="4"/>cout &lt;&lt; "\033[32m" &lt;&lt; "---- 1.5*N —---" &lt;&lt; "\033[0m" &lt;&lt; endl;</text:p>
      <text:p text:style-name="P35"><text:s text:c="4"/>numberPi(1.5*n);</text:p>
      <text:p text:style-name="P35"><text:s text:c="4"/>return 0;</text:p>
      <text:p text:style-name="P35">}</text:p>
      <text:p text:style-name="P37"/>
      <text:p text:style-name="P37"/>
      <text:p text:style-name="P37"/>
      <text:p text:style-name="P38"/>
      <text:p text:style-name="P38"><text:soft-page-break/><text:span text:style-name="T12">2</text:span><text:span text:style-name="T13">) Генерация кода на ассемблере:</text:span></text:p>
      <text:p text:style-name="P39">Воспользуемся онлайн компилятором Compiler Explorer.</text:p>
      <text:p text:style-name="P39"/>
      <text:list text:style-name="L1">
        <text:list-item>
          <text:p text:style-name="P40">На <text:span text:style-name="T14">x86 с уровнем компиляции O0</text:span></text:p>
          <text:p text:style-name="P40"><text:span text:style-name="T14">(Compiler: x86-64 gcc 15.2 Options: </text:span>-<text:span text:style-name="T14">m32 -O0)</text:span></text:p>
        </text:list-item>
      </text:list>
      <text:p text:style-name="P41"/>
      <text:list text:continue-numbering="true" text:style-name="L1">
        <text:list-item>
          <text:p text:style-name="P42">На x86 с уровнем компиляции O3</text:p>
          <text:p text:style-name="P40"><text:span text:style-name="T14">(Compiler: x86-64 gcc 15.2 Options: </text:span>-<text:span text:style-name="T14">m32 -O3)</text:span></text:p>
        </text:list-item>
      </text:list>
      <text:p text:style-name="P41"/>
      <text:list text:continue-numbering="true" text:style-name="L1">
        <text:list-item>
          <text:p text:style-name="P42">На x86-64 с уровнем компиляции O0</text:p>
          <text:p text:style-name="P42">(Compiler: x86-64 gcc 15.2 Options: -O0)</text:p>
        </text:list-item>
      </text:list>
      <text:p text:style-name="P41"/>
      <text:list text:continue-numbering="true" text:style-name="L1">
        <text:list-item>
          <text:p text:style-name="P42">На x8664 с уровнем компиляции O3</text:p>
          <text:p text:style-name="P42">(Compiler: x86-64 gcc 15.2 Options: -O3)</text:p>
        </text:list-item>
      </text:list>
      <text:p text:style-name="P43"/>
      <text:p text:style-name="P44"/>
      <text:p text:style-name="P45"><text:span text:style-name="T15">3</text:span><text:span text:style-name="T16">) Сопоставление кода на Си и на ассемблере:</text:span></text:p>
      <text:p text:style-name="P4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6"><text:span text:style-name="T17">Код на С</text:span><text:span text:style-name="T18">++</text:span><text:span text:style-name="T17">: </text:span><text:span text:style-name="T19"><text:s/></text:span><text:span text:style-name="T20"><text:s text:c="6"/>int m = 0; </text:span></text:p>
            <text:p text:style-name="P47"><text:s text:c="20"/>double x; </text:p>
            <text:p text:style-name="P48"><text:tab/> <text:s text:c="19"/>double y;</text:p>
          </table:table-cell>
          <table:covered-table-cell/>
        </table:table-row>
        <table:table-row>
          <table:table-cell table:style-name="Table1.A2" office:value-type="string">
            <text:p text:style-name="P49">Архитектура и уровень компиляции:</text:p>
          </table:table-cell>
          <table:table-cell table:style-name="Table1.B2" office:value-type="string">
            <text:p text:style-name="P50">Код:</text:p>
          </table:table-cell>
        </table:table-row>
        <table:table-row>
          <table:table-cell table:style-name="Table1.A2" office:value-type="string">
            <text:p text:style-name="P51">x86 -O0</text:p>
          </table:table-cell>
          <table:table-cell table:style-name="Table1.B2" office:value-type="string">
            <text:p text:style-name="P52">mov [ebp-12], ...</text:p>
          </table:table-cell>
        </table:table-row>
        <table:table-row>
          <table:table-cell table:style-name="Table1.A2" office:value-type="string">
            <text:p text:style-name="P51">x86 -O3</text:p>
          </table:table-cell>
          <table:table-cell table:style-name="Table1.B2" office:value-type="string">
            <text:p text:style-name="P52">mov <text:s/>[ebp-2612], ...</text:p>
          </table:table-cell>
        </table:table-row>
      </table:table>
      <text:p text:style-name="P53"><text:span text:style-name="T21">Вывод: </text:span><text:span text:style-name="T22">Уровень оптимизации влияет на расположение переменных в стеке.</text:span></text:p>
      <text:p text:style-name="P5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4"><text:span text:style-name="T17">Код на С</text:span><text:span text:style-name="T18">++</text:span><text:span text:style-name="T17">: </text:span><text:span text:style-name="T20"><text:s text:c="7"/>random_device rd;</text:span></text:p>
          </table:table-cell>
          <table:covered-table-cell/>
        </table:table-row>
        <table:table-row>
          <table:table-cell table:style-name="Table2.A2" office:value-type="string">
            <text:p text:style-name="P55">Архитектура и уровень компиляции:</text:p>
          </table:table-cell>
          <table:table-cell table:style-name="Table2.B2" office:value-type="string">
            <text:p text:style-name="P56">Код:</text:p>
          </table:table-cell>
        </table:table-row>
        <table:table-row>
          <table:table-cell table:style-name="Table2.A2" office:value-type="string">
            <text:p text:style-name="P51">x86 -O0</text:p>
          </table:table-cell>
          <table:table-cell table:style-name="Table2.B2" office:value-type="string">
            <text:p text:style-name="P52">call std::random_device::random_device()</text:p>
          </table:table-cell>
        </table:table-row>
        <table:table-row>
          <table:table-cell table:style-name="Table2.A2" office:value-type="string">
            <text:p text:style-name="P51">x86 -O3</text:p>
          </table:table-cell>
          <table:table-cell table:style-name="Table2.B2" office:value-type="string">
            <text:p text:style-name="P52">call std::random_device::_M_init()</text:p>
          </table:table-cell>
        </table:table-row>
      </table:table>
      <text:p text:style-name="P53"><text:span text:style-name="T21">Вывод:</text:span>Уровень оптимизации не отменяет вызов конструктора, однако на -O3 наблюдается использование функции (_M_init).</text:p>
      <text:p text:style-name="P57"><text:span text:style-name="T23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4"><text:span text:style-name="T17">Код на С</text:span><text:span text:style-name="T18">++</text:span><text:span text:style-name="T17">: </text:span><text:span text:style-name="T19"><text:s text:c="2"/></text:span><text:span text:style-name="T20"><text:s text:c="5"/>uniform_real_distribution&lt;double&gt; dist(-1.0, 1.0);</text:span></text:p>
          </table:table-cell>
          <table:covered-table-cell/>
        </table:table-row>
        <table:table-row>
          <table:table-cell table:style-name="Table3.A2" office:value-type="string">
            <text:p text:style-name="P55">Архитектура и <text:soft-page-break/>уровень компиляции:</text:p>
          </table:table-cell>
          <table:table-cell table:style-name="Table3.B2" office:value-type="string">
            <text:p text:style-name="P56">Код:</text:p>
          </table:table-cell>
        </table:table-row>
        <table:table-row>
          <table:table-cell table:style-name="Table3.A2" office:value-type="string">
            <text:p text:style-name="P51">x86 -O0</text:p>
          </table:table-cell>
          <table:table-cell table:style-name="Table3.B2" office:value-type="string">
            <text:p text:style-name="P52">call std::uniform_real_distribution&lt;double&gt;::uniform_real_distribution(double, double)</text:p>
          </table:table-cell>
        </table:table-row>
        <table:table-row>
          <table:table-cell table:style-name="Table3.A2" office:value-type="string">
            <text:p text:style-name="P51">x86 -O3</text:p>
          </table:table-cell>
          <table:table-cell table:style-name="Table3.B2" office:value-type="string">
            <text:p text:style-name="P52">Инлайнинг </text:p>
          </table:table-cell>
        </table:table-row>
      </table:table>
      <text:p text:style-name="P53"><text:span text:style-name="T24">Вывод: </text:span>Ключевое отличие — <text:s/>инлайнинг на -O3. </text:p>
      <text:p text:style-name="P58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4"><text:span text:style-name="T17">Код на С</text:span><text:span text:style-name="T18">++</text:span><text:span text:style-name="T17">: </text:span><text:span text:style-name="T19"><text:s/></text:span><text:span text:style-name="T20"><text:s text:c="5"/>for (int i = 0; i &lt; n; i++) </text:span></text:p>
          </table:table-cell>
          <table:covered-table-cell/>
        </table:table-row>
        <table:table-row>
          <table:table-cell table:style-name="Table4.A2" office:value-type="string">
            <text:p text:style-name="P55">Архитектура и уровень компиляции:</text:p>
          </table:table-cell>
          <table:table-cell table:style-name="Table4.B2" office:value-type="string">
            <text:p text:style-name="P56">Код:</text:p>
          </table:table-cell>
        </table:table-row>
        <table:table-row>
          <table:table-cell table:style-name="Table4.A2" office:value-type="string">
            <text:p text:style-name="P51">x86 -O0</text:p>
          </table:table-cell>
          <table:table-cell table:style-name="Table4.B2" office:value-type="string">
            <text:p text:style-name="P59"><text:span text:style-name="T25">Инициализфция </text:span><text:span text:style-name="T26">i: mov <text:s/>[ebp-16], ...</text:span></text:p>
            <text:p text:style-name="P60">Сравнение i: cmp eax, <text:s/>[ebp+8]</text:p>
            <text:p text:style-name="P60">Инкремент: add <text:s/>[ebp-16], ...</text:p>
          </table:table-cell>
        </table:table-row>
        <table:table-row>
          <table:table-cell table:style-name="Table4.A2" office:value-type="string">
            <text:p text:style-name="P51">x86 -O3</text:p>
          </table:table-cell>
          <table:table-cell table:style-name="Table4.B2" office:value-type="string">
            <text:p text:style-name="P59"><text:span text:style-name="T25">Инициализфция </text:span><text:span text:style-name="T26">i: xor edi, edi</text:span></text:p>
            <text:p text:style-name="P60">Сравнение i: cmp <text:s/>[ebp+8], edi</text:p>
            <text:p text:style-name="P60">Инкремент: add edi, ...</text:p>
          </table:table-cell>
        </table:table-row>
      </table:table>
      <text:p text:style-name="P61"><text:span text:style-name="T27">Вывод: </text:span><text:span text:style-name="T28">Оптимизация -O3 принципиально меняет работу со счетчиком: он размещается в регистре, а не в стеке. Это значительно ускоряет операции сравнения и инкремента, которые являются критичными для производительности цикла.</text:span></text:p>
      <text:p text:style-name="P5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2"><text:span text:style-name="T17">Код на С</text:span><text:span text:style-name="T18">++</text:span><text:span text:style-name="T17">: </text:span><text:span text:style-name="T20"><text:s text:c="6"/>x = dist(rd);</text:span></text:p>
            <text:p text:style-name="P63"><text:s text:c="29"/>y = dist(rd);</text:p>
          </table:table-cell>
          <table:covered-table-cell/>
        </table:table-row>
        <table:table-row>
          <table:table-cell table:style-name="Table5.A2" office:value-type="string">
            <text:p text:style-name="P64">Архитектура и уровень компиляции:</text:p>
          </table:table-cell>
          <table:table-cell table:style-name="Table5.B2" office:value-type="string">
            <text:p text:style-name="P65">Код:</text:p>
          </table:table-cell>
        </table:table-row>
        <table:table-row>
          <table:table-cell table:style-name="Table5.A2" office:value-type="string">
            <text:p text:style-name="P66">x86 -O0</text:p>
          </table:table-cell>
          <table:table-cell table:style-name="Table5.B2" office:value-type="string">
            <text:p text:style-name="P67">call operator()&lt;std::random_device&gt;</text:p>
          </table:table-cell>
        </table:table-row>
        <table:table-row>
          <table:table-cell table:style-name="Table5.A2" office:value-type="string">
            <text:p text:style-name="P66">x86 -O3</text:p>
          </table:table-cell>
          <table:table-cell table:style-name="Table5.B2" office:value-type="string">
            <text:p text:style-name="P67">call std::random_device::_M_getval() + FPU операции</text:p>
          </table:table-cell>
        </table:table-row>
      </table:table>
      <text:p text:style-name="P61"><text:span text:style-name="T27">Вывод: </text:span><text:span text:style-name="T28">На -O0 код строго следует семантике C++, вызывая оператор. На -O3 происходит инлайнинг.</text:span></text:p>
      <text:p text:style-name="P68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9"><text:span text:style-name="T17">Код на С</text:span><text:span text:style-name="T18">++</text:span><text:span text:style-name="T17">: </text:span><text:span text:style-name="T19"><text:s/></text:span><text:span text:style-name="T20"><text:s text:c="6"/>if (x*x + y*y &lt;= 1) m += 1;</text:span></text:p>
          </table:table-cell>
          <table:covered-table-cell/>
        </table:table-row>
        <table:table-row>
          <table:table-cell table:style-name="Table6.A2" office:value-type="string">
            <text:p text:style-name="P70">Архитектура и уровень компиляции:</text:p>
          </table:table-cell>
          <table:table-cell table:style-name="Table6.B2" office:value-type="string">
            <text:p text:style-name="P71">Код:</text:p>
          </table:table-cell>
        </table:table-row>
        <text:soft-page-break/>
        <table:table-row>
          <table:table-cell table:style-name="Table6.A2" office:value-type="string">
            <text:p text:style-name="P72">x86 -O0</text:p>
          </table:table-cell>
          <table:table-cell table:style-name="Table6.B2" office:value-type="string">
            <text:p text:style-name="P67">Вычисление: fmul st, st(0) + faddp st(1), st</text:p>
            <text:p text:style-name="P67">Сравнение: fcomip st, st(1)</text:p>
            <text:p text:style-name="P67">Инкремент: add <text:s/>[ebp-12], ...</text:p>
          </table:table-cell>
        </table:table-row>
        <table:table-row>
          <table:table-cell table:style-name="Table6.A2" office:value-type="string">
            <text:p text:style-name="P72">x86 -O3</text:p>
          </table:table-cell>
          <table:table-cell table:style-name="Table6.B2" office:value-type="string">
            <text:p text:style-name="P67">Вычисление: fmul st, st(0) + faddp st(1), st</text:p>
            <text:p text:style-name="P67">Сравнение: fcomip st, st(1)</text:p>
            <text:p text:style-name="P67">Инкремент: sbb <text:s/>[ebp-2612],...</text:p>
          </table:table-cell>
        </table:table-row>
      </table:table>
      <text:p text:style-name="P61"><text:span text:style-name="T27">Вывод: </text:span><text:span text:style-name="T3">На -O3 применяется условный инкремент через sbb вместо условного перехода. Это ускоряет выполнение цикла.</text:span></text:p>
      <text:p text:style-name="P5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9"><text:span text:style-name="T17">Код на С</text:span><text:span text:style-name="T18">++</text:span><text:span text:style-name="T17">: </text:span><text:span text:style-name="T19"><text:s text:c="2"/></text:span><text:span text:style-name="T20"><text:s text:c="4"/>double p = 4.0 * m / n;</text:span></text:p>
            <text:p text:style-name="P73"><text:s text:c="28"/>cout &lt;&lt; "Number Pi: " &lt;&lt; p &lt;&lt; endl;</text:p>
          </table:table-cell>
          <table:covered-table-cell/>
        </table:table-row>
        <table:table-row>
          <table:table-cell table:style-name="Table7.A2" office:value-type="string">
            <text:p text:style-name="P70">Архитектура и уровень компиляции:</text:p>
          </table:table-cell>
          <table:table-cell table:style-name="Table7.B2" office:value-type="string">
            <text:p text:style-name="P71">Код:</text:p>
          </table:table-cell>
        </table:table-row>
        <table:table-row>
          <table:table-cell table:style-name="Table7.A2" office:value-type="string">
            <text:p text:style-name="P72">x86 -O0</text:p>
          </table:table-cell>
          <table:table-cell table:style-name="Table7.B2" office:value-type="string">
            <text:p text:style-name="P74">Вывод строки: call operator&lt;&lt;</text:p>
            <text:p text:style-name="P74">Вывод числа: call operator&lt;&lt;</text:p>
          </table:table-cell>
        </table:table-row>
        <table:table-row table:style-name="Table7.4">
          <table:table-cell table:style-name="Table7.A2" office:value-type="string">
            <text:p text:style-name="P72">x86 -O3</text:p>
          </table:table-cell>
          <table:table-cell table:style-name="Table7.B2" office:value-type="string">
            <text:p text:style-name="P74">Вывод строки: call std::__ostream_insert</text:p>
            <text:p text:style-name="P74">Вывод числа: call _M_insert&lt;double&gt;</text:p>
          </table:table-cell>
        </table:table-row>
      </table:table>
      <text:p text:style-name="P75">Вывод: <text:span text:style-name="T3">На -O3 компилятор использует более специализированные функции для вывода, чем на -O0.</text:span></text:p>
      <text:p text:style-name="P75"><text:span text:style-name="T28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9"><text:span text:style-name="T17">Код на С</text:span><text:span text:style-name="T18">++</text:span><text:span text:style-name="T17">: </text:span><text:span text:style-name="T20"><text:s text:c="6"/>struct timespec start, end;</text:span></text:p>
            <text:p text:style-name="P73"><text:s text:c="28"/>clock_gettime(CLOCK_MONOTONIC_RAW, &amp;start);</text:p>
          </table:table-cell>
          <table:covered-table-cell/>
        </table:table-row>
        <table:table-row>
          <table:table-cell table:style-name="Table8.A2" office:value-type="string">
            <text:p text:style-name="P70">Архитектура и уровень компиляции:</text:p>
          </table:table-cell>
          <table:table-cell table:style-name="Table8.B2" office:value-type="string">
            <text:p text:style-name="P71">Код:</text:p>
          </table:table-cell>
        </table:table-row>
        <table:table-row>
          <table:table-cell table:style-name="Table8.A2" office:value-type="string">
            <text:p text:style-name="P72">x86 -O0</text:p>
            <text:p text:style-name="P76">x86 -O3</text:p>
          </table:table-cell>
          <table:table-cell table:style-name="Table8.B2" office:value-type="string">
            <text:p text:style-name="P77">Передача адреса: <text:s/>lea eax, [ebp-48] + push eax</text:p>
            <text:p text:style-name="P77">Вызов clock_gettime: call clock_gettime</text:p>
          </table:table-cell>
        </table:table-row>
      </table:table>
      <text:p text:style-name="P75"><text:span text:style-name="T28"/></text:p>
      <text:p text:style-name="P78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9"><text:span text:style-name="T17">Код на С</text:span><text:span text:style-name="T18">++</text:span><text:span text:style-name="T17">:</text:span><text:span text:style-name="T29"> </text:span><text:span text:style-name="T20">end.tv_sec - start.tv_sec + 0.000000001*(end.tv_nsec - <text:s text:c="6"/>start.tv_nsec)</text:span></text:p>
          </table:table-cell>
          <table:covered-table-cell/>
        </table:table-row>
        <table:table-row>
          <table:table-cell table:style-name="Table9.A2" office:value-type="string">
            <text:p text:style-name="P70">Архитектура и уровень компиляции:</text:p>
          </table:table-cell>
          <table:table-cell table:style-name="Table9.B2" office:value-type="string">
            <text:p text:style-name="P71">Код:</text:p>
          </table:table-cell>
        </table:table-row>
        <table:table-row>
          <table:table-cell table:style-name="Table9.A2" office:value-type="string">
            <text:p text:style-name="P72">x86 -O0</text:p>
            <text:p text:style-name="P76"><text:soft-page-break/>x86 -O3</text:p>
          </table:table-cell>
          <table:table-cell table:style-name="Table9.B2" office:value-type="string">
            <text:p text:style-name="P77">Сек: sub ecx, edx</text:p>
            <text:p text:style-name="P77"><text:soft-page-break/>Наносек: sub ecx, edx</text:p>
            <text:p text:style-name="P77">Преобразование: fild + fmul</text:p>
            <text:p text:style-name="P77">Сложение: faddp</text:p>
          </table:table-cell>
        </table:table-row>
      </table:table>
      <text:p text:style-name="P75"><text:span text:style-name="T30"/></text:p>
      <text:p text:style-name="P79"/>
      <text:p text:style-name="P79">Вывод по всем вариантам компиляции:</text:p>
      <text:p text:style-name="P80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81">Параметр</text:p>
          </table:table-cell>
          <table:table-cell table:style-name="Table10.A1" office:value-type="string">
            <text:p text:style-name="P50">-<text:span text:style-name="T31">O0</text:span></text:p>
          </table:table-cell>
          <table:table-cell table:style-name="Table10.C1" office:value-type="string">
            <text:p text:style-name="P50">-<text:span text:style-name="T31">O3</text:span></text:p>
          </table:table-cell>
        </table:table-row>
        <table:table-row>
          <table:table-cell table:style-name="Table10.A2" office:value-type="string">
            <text:p text:style-name="P82">Размещение переменных</text:p>
          </table:table-cell>
          <table:table-cell table:style-name="Table10.A2" office:value-type="string">
            <text:p text:style-name="P83">Все переменные в памяти на стеке</text:p>
          </table:table-cell>
          <table:table-cell table:style-name="Table10.C2" office:value-type="string">
            <text:p text:style-name="P83">Максимальное использование регистров</text:p>
          </table:table-cell>
        </table:table-row>
        <table:table-row>
          <table:table-cell table:style-name="Table10.A2" office:value-type="string">
            <text:p text:style-name="P82">Вызовы функций</text:p>
          </table:table-cell>
          <table:table-cell table:style-name="Table10.A2" office:value-type="string">
            <text:p text:style-name="P83">Явные call-инструкции</text:p>
          </table:table-cell>
          <table:table-cell table:style-name="Table10.C2" office:value-type="string">
            <text:p text:style-name="P84">Инлайнинг, специализированные функции <text:span text:style-name="T28"><text:s/>(random_device, distribution)</text:span></text:p>
          </table:table-cell>
        </table:table-row>
        <table:table-row>
          <table:table-cell table:style-name="Table10.A2" office:value-type="string">
            <text:p text:style-name="P82">Управление циклом</text:p>
          </table:table-cell>
          <table:table-cell table:style-name="Table10.A2" office:value-type="string">
            <text:p text:style-name="P83">Линейный код </text:p>
          </table:table-cell>
          <table:table-cell table:style-name="Table10.C2" office:value-type="string">
            <text:p text:style-name="P83">Развертывание</text:p>
          </table:table-cell>
        </table:table-row>
        <table:table-row table:style-name="Table10.5">
          <table:table-cell table:style-name="Table10.A2" office:value-type="string">
            <text:p text:style-name="P82">Условные операции</text:p>
          </table:table-cell>
          <table:table-cell table:style-name="Table10.A2" office:value-type="string">
            <text:p text:style-name="P83"><text:s/>jmp</text:p>
          </table:table-cell>
          <table:table-cell table:style-name="Table10.C2" office:value-type="string">
            <text:p text:style-name="P83"><text:s/>sbb</text:p>
          </table:table-cell>
        </table:table-row>
        <table:table-row table:style-name="Table10.6">
          <table:table-cell table:style-name="Table10.A2" office:value-type="string">
            <text:p text:style-name="P82">Код с точки зрения отладки</text:p>
          </table:table-cell>
          <table:table-cell table:style-name="Table10.A2" office:value-type="string">
            <text:p text:style-name="P83">Большой, читаемый <text:span text:style-name="T31">(хорош для отладки)</text:span></text:p>
          </table:table-cell>
          <table:table-cell table:style-name="Table10.C2" office:value-type="string">
            <text:p text:style-name="P83">Оптимизированный, плох для отладки</text:p>
          </table:table-cell>
        </table:table-row>
      </table:table>
      <text:p text:style-name="P85"/>
      <text:p text:style-name="P85"/>
      <text:p text:style-name="P86"><text:span text:style-name="T32">4) Р</text:span>азмещение переменных языка Си в программах на ассемблере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7">x86</text:p>
          </table:table-cell>
        </table:table-row>
        <table:table-row table:style-name="Table13.2">
          <table:table-cell table:style-name="Table13.A2" office:value-type="string">
            <text:p text:style-name="P88">Локальные переменные в стеке:</text:p>
            <text:p text:style-name="P88"/>
          </table:table-cell>
        </table:table-row>
        <table:table-row table:style-name="Table13.3">
          <table:table-cell table:style-name="Table13.A2" office:value-type="string">
            <text:p text:style-name="P89">[ebp-12] - переменная m</text:p>
            <text:p text:style-name="P89">[ebp-16] - переменная i</text:p>
            <text:p text:style-name="P89">[ebp-24] - переменная p</text:p>
            <text:p text:style-name="P89">[ebp-32] - переменная x</text:p>
            <text:p text:style-name="P89">[ebp-40] - переменная y</text:p>
            <text:p text:style-name="P89">[ebp+8] - параметр n</text:p>
          </table:table-cell>
        </table:table-row>
        <table:table-row table:style-name="Table13.3">
          <table:table-cell table:style-name="Table13.A1" office:value-type="string">
            <text:p text:style-name="P88">Объекты в стеке:</text:p>
          </table:table-cell>
        </table:table-row>
        <table:table-row table:style-name="Table13.5">
          <table:table-cell table:style-name="Table13.A2" office:value-type="string">
            <text:p text:style-name="P89">[ebp-2556] - объект std::random_device rd</text:p>
            <text:p text:style-name="P89">[ebp-2572]-объект std::uniform_real_distribution&lt;double&gt; dist</text:p>
          </table:table-cell>
        </table:table-row>
        <table:table-row table:style-name="Table13.5">
          <table:table-cell table:style-name="Table13.A2" office:value-type="string">
            <text:p text:style-name="P88">Регистры общего назначения:</text:p>
          </table:table-cell>
        </table:table-row>
        <table:table-row table:style-name="Table13.5">
          <table:table-cell table:style-name="Table13.A2" office:value-type="string">
            <text:p text:style-name="P89">eax - возвращаемые значения</text:p>
            <text:p text:style-name="P89"><text:soft-page-break/>ebx - сохраненный регистр</text:p>
            <text:p text:style-name="P89">ecx, edx - временные значения</text:p>
            <text:p text:style-name="P89">esi, edi - индексы и счетчики</text:p>
          </table:table-cell>
        </table:table-row>
      </table:table>
      <text:p text:style-name="P90"><text:span text:style-name="Strong_20_Emphasis"><text:span text:style-name="T22"/></text:span></text:p>
      <text:list text:style-name="L2">
        <text:list-header>
          <text:p text:style-name="P91"><text:span text:style-name="Strong_20_Emphasis"><text:span text:style-name="T33">Влияние уровня оптимизации</text:span></text:span><text:span text:style-name="T22">:</text:span></text:p>
          <text:list>
            <text:list-item>
              <text:p text:style-name="P92"><text:span text:style-name="Strong_20_Emphasis"><text:span text:style-name="T33">-O0</text:span></text:span><text:span text:style-name="T22">: Все переменные явно размещаются в стеке, минимальное использование регистров</text:span></text:p>
            </text:list-item>
            <text:list-item>
              <text:p text:style-name="P92"><text:span text:style-name="Strong_20_Emphasis"><text:span text:style-name="T33">-O3</text:span></text:span><text:span text:style-name="T22">: Приоритет регистрового распределения, агрессивное переиспользование</text:span></text:p>
            </text:list-item>
          </text:list>
        </text:list-header>
      </text:list>
      <text:p text:style-name="P93"><text:span text:style-name="T16"/></text:p>
      <text:p text:style-name="P94">5) Сравнение архитектур x86-64 и x86:</text:p>
      <text:p text:style-name="P95">x86-64 (64-bit):</text:p>
      <text:p text:style-name="P96"/>
      <text:list text:style-name="L3">
        <text:list-item>
          <text:p text:style-name="P97"><text:span text:style-name="T21">Регистры и адресация: </text:span><text:span text:style-name="T34">16 </text:span>64-битных регистров общего назначения + 16 SSE-регистров XMM</text:p>
          <text:p text:style-name="P97"/>
        </text:list-item>
        <text:list-item>
          <text:p text:style-name="P97"><text:span text:style-name="T21">Обработка чисел с плавающей точкой: </text:span>SSE регистры (xmm0-xmm7) для операций с float/double, векторная обработка</text:p>
          <text:p text:style-name="P97"/>
        </text:list-item>
        <text:list-item>
          <text:p text:style-name="P97"><text:span text:style-name="T21">Стек: </text:span>Выравнивание 16 байт</text:p>
          <text:p text:style-name="P97"/>
        </text:list-item>
        <text:list-item>
          <text:p text:style-name="P97"><text:span text:style-name="T21">Оптимизации: </text:span>Инлайнинг функций, удаление избыточных операций, агрессивное использование регистров, векторизация</text:p>
          <text:p text:style-name="P97"/>
        </text:list-item>
        <text:list-item>
          <text:p text:style-name="P97"><text:span text:style-name="T21">Обработка исключений:</text:span> _Unwind_Resume для раскрутки стека</text:p>
        </text:list-item>
      </text:list>
      <text:p text:style-name="P98"/>
      <text:p text:style-name="P98">x86-64 преимущества:</text:p>
      <text:p text:style-name="P99"/>
      <text:list text:style-name="L4">
        <text:list-item>
          <text:p text:style-name="P100">Больше регистров уменьшает обращения к памяти</text:p>
        </text:list-item>
        <text:list-item>
          <text:p text:style-name="P100">Векторные инструкции SSE</text:p>
        </text:list-item>
        <text:list-item>
          <text:p text:style-name="P100">64-битная арифметика</text:p>
        </text:list-item>
      </text:list>
      <text:p text:style-name="P96"/>
      <text:p text:style-name="P95">x86 (32-bit):</text:p>
      <text:p text:style-name="P96"/>
      <text:list text:style-name="L5">
        <text:list-item>
          <text:p text:style-name="P101"><text:span text:style-name="T21">Регистры и адресация: </text:span><text:span text:style-name="T34">8 </text:span>32-битных регистров + 8-уровневый стек FPU</text:p>
        </text:list-item>
      </text:list>
      <text:p text:style-name="P102"/>
      <text:list text:continue-numbering="true" text:style-name="L5">
        <text:list-item>
          <text:p text:style-name="P101"><text:span text:style-name="T21">Обработка чисел с плавающей точкой: </text:span>Стековый FPU (fld, fstp, fadd, fmul), x87 floating point</text:p>
        </text:list-item>
      </text:list>
      <text:p text:style-name="P102"/>
      <text:list text:continue-numbering="true" text:style-name="L5">
        <text:list-item>
          <text:p text:style-name="P101"><text:span text:style-name="T21">Стек: </text:span>Выравнивание 4 байта</text:p>
        </text:list-item>
      </text:list>
      <text:p text:style-name="P102"/>
      <text:list text:continue-numbering="true" text:style-name="L5">
        <text:list-item>
          <text:p text:style-name="P101"><text:soft-page-break/><text:span text:style-name="T21">Оптимизации: </text:span>Меньше возможностей для оптимизации из-за ограниченности регистров, сохранение переменных в памяти</text:p>
        </text:list-item>
      </text:list>
      <text:p text:style-name="P102"/>
      <text:list text:continue-numbering="true" text:style-name="L5">
        <text:list-item>
          <text:p text:style-name="P101"><text:span text:style-name="T21">Обработка исключений:</text:span> Аналогичный механизм с 32-битными адресами</text:p>
        </text:list-item>
      </text:list>
      <text:p text:style-name="P103"/>
      <text:p text:style-name="P104">x86 преимущества:</text:p>
      <text:p text:style-name="P105"/>
      <text:list text:style-name="L6">
        <text:list-item>
          <text:p text:style-name="P106">Меньший размер кода</text:p>
        </text:list-item>
        <text:list-item>
          <text:p text:style-name="P106">Меньший расход памяти</text:p>
        </text:list-item>
      </text:list>
      <text:p text:style-name="P105"/>
      <text:p text:style-name="P105">Из всего вышеперечисленного можно прийти к выводу, что x86-64 архитектура демонстрирует значительные преимущества в производительности благодаря большему количеству регистров. Однако x86 сохраняет преимущества в размере кода и может быть более эффективной на системах с ограниченными ресурсами.</text:p>
      <text:h text:style-name="P107" text:outline-level="1"><text:bookmark-start text:name="__RefHeading___Toc18443924"/>ЗАКЛЮЧЕНИЕ<text:bookmark-end text:name="__RefHeading___Toc18443924"/></text:h>
      <text:p text:style-name="Standard"/>
      <text:p text:style-name="P108">Анализ ассемблерных листингов показал, что их изучение позволяет глубоко понять особенности работы программы на уровне процессора и оптимизировать критичные участки программы, а также, что на x86-64 генерируется более производительный код благодаря расширенному набору регистров , в то время как x86-версия характеризуется большей компактностью. </text:p>
      <text:h text:style-name="P109" text:outline-level="1"><text:bookmark-start text:name="__RefHeading___Toc18443925"/>Приложение№<text:span text:style-name="T35">1 </text:span><text:bookmark-end text:name="__RefHeading___Toc18443925"/></text:h>
      <text:h text:style-name="P110" text:outline-level="1"><text:bookmark-start text:name="__RefHeading___Toc20586_323823121"/><text:span text:style-name="T36">Листинг</text:span><text:span text:style-name="T37"> </text:span><text:span text:style-name="T36">компиляции программы уровн</text:span><text:span text:style-name="T12">я </text:span><text:span text:style-name="T36">-</text:span><text:span text:style-name="T12">O0 </text:span><text:span text:style-name="T36">на архитектуре </text:span><text:span text:style-name="T12">x86-64 </text:span><text:bookmark-end text:name="__RefHeading___Toc20586_323823121"/></text:h>
      <text:p text:style-name="P111"><draw:custom-shape text:anchor-type="paragraph" draw:z-index="2" draw:name="Shape 2" draw:style-name="gr2" draw:text-style-name="P112" svg:width="17.283cm" svg:height="22.457cm" svg:x="-0.367cm" svg:y="0.474cm"><text:p/><draw:enhanced-geometry svg:viewBox="0 0 21600 21600" draw:type="rectangle" draw:enhanced-path="M 0 0 L 21600 0 21600 21600 0 21600 0 0 Z N"/></draw:custom-shape><text:span text:style-name="T38"/></text:p>
      <text:p text:style-name="P111">.LC1:</text:p>
      <text:p text:style-name="P111"><text:s text:c="6"/><text:span text:style-name="T3"><text:s text:c="2"/>.string "default"</text:span></text:p>
      <text:p text:style-name="P113"><text:s text:c="8"/>.set <text:s text:c="3"/>std::random_device::random_device() [complete object constructor],_ZNSt13random_deviceC2Ev</text:p>
      <text:p text:style-name="P113"><text:s text:c="8"/>.set <text:s text:c="3"/>std::random_device::~random_device() [complete object destructor],_ZNSt13random_deviceD2Ev</text:p>
      <text:p text:style-name="P113">.LC5:</text:p>
      <text:p text:style-name="P113"><text:s text:c="8"/>.string "Number Pi: "</text:p>
      <text:p text:style-name="P113">.LC6:</text:p>
      <text:p text:style-name="P113"><text:s text:c="8"/>.string "Time taken:"</text:p>
      <text:p text:style-name="P113">.LC8:</text:p>
      <text:p text:style-name="P113"><text:s text:c="8"/>.string "sec."</text:p>
      <text:p text:style-name="P113">numberPi(int):</text:p>
      <text:p text:style-name="P113"><text:s text:c="8"/>pushq <text:s text:c="2"/>%rbp</text:p>
      <text:p text:style-name="P113"><text:s text:c="8"/>movq <text:s text:c="3"/>%rsp, %rbp</text:p>
      <text:p text:style-name="P113"><text:s text:c="8"/>pushq <text:s text:c="2"/>%rbx</text:p>
      <text:p text:style-name="P113"><text:s text:c="8"/>subq <text:s text:c="3"/>$5112, %rsp</text:p>
      <text:p text:style-name="P113"><text:s text:c="8"/>movl <text:s text:c="3"/>%edi, -5108(%rbp)</text:p>
      <text:p text:style-name="P113"><text:s text:c="8"/>leaq <text:s text:c="3"/>-64(%rbp), %rax</text:p>
      <text:p text:style-name="P113"><text:s text:c="8"/>movq <text:s text:c="3"/>%rax, %rsi</text:p>
      <text:p text:style-name="P113"><text:s text:c="8"/>movl <text:s text:c="3"/>$4, %edi</text:p>
      <text:p text:style-name="P113"><text:s text:c="8"/>call <text:s text:c="3"/>clock_gettime</text:p>
      <text:p text:style-name="P113"><text:s text:c="8"/>movl <text:s text:c="3"/>$0, -20(%rbp)</text:p>
      <text:p text:style-name="P113"><text:s text:c="8"/>leaq <text:s text:c="3"/>-5088(%rbp), %rax</text:p>
      <text:p text:style-name="P113"><text:s text:c="8"/>movq <text:s text:c="3"/>%rax, %rdi</text:p>
      <text:p text:style-name="P113"><draw:custom-shape text:anchor-type="paragraph" draw:z-index="3" draw:name="Shape 3" draw:style-name="gr3" draw:text-style-name="P112" svg:width="17.283cm" svg:height="25.865cm" svg:x="-0.367cm" svg:y="-0.198cm"><text:p/><draw:enhanced-geometry svg:viewBox="0 0 21600 21600" draw:type="rectangle" draw:enhanced-path="M 0 0 L 21600 0 21600 21600 0 21600 0 0 Z N"/></draw:custom-shape><text:soft-page-break/><text:s text:c="8"/>call <text:s text:c="3"/>std::random_device::random_device() [complete object constructor]</text:p>
      <text:p text:style-name="P113"><text:s text:c="8"/>movsd <text:s text:c="2"/>.LC2(%rip), %xmm0</text:p>
      <text:p text:style-name="P113"><text:s text:c="8"/>movq <text:s text:c="3"/>.LC3(%rip), %rdx</text:p>
      <text:p text:style-name="P113"><text:s text:c="8"/>leaq <text:s text:c="3"/>-5104(%rbp), %rax</text:p>
      <text:p text:style-name="P113"><text:s text:c="8"/>movapd <text:s/>%xmm0, %xmm1</text:p>
      <text:p text:style-name="P113"><text:s text:c="8"/>movq <text:s text:c="3"/>%rdx, %xmm0</text:p>
      <text:p text:style-name="P113"><text:s text:c="8"/>movq <text:s text:c="3"/>%rax, %rdi</text:p>
      <text:p text:style-name="P113"><text:s text:c="8"/>call <text:s text:c="3"/>std::uniform_real_distribution&lt;double&gt;::uniform_real_distribution(double, double) [complete object constructor]</text:p>
      <text:p text:style-name="P113"><text:s text:c="8"/>movl <text:s text:c="3"/>$0, -24(%rbp)</text:p>
      <text:p text:style-name="P113"><text:s text:c="8"/>jmp <text:s text:c="4"/>.L25</text:p>
      <text:p text:style-name="P113">.L28:</text:p>
      <text:p text:style-name="P113"><text:s text:c="8"/>leaq <text:s text:c="3"/>-5088(%rbp), %rdx</text:p>
      <text:p text:style-name="P113"><text:s text:c="8"/>leaq <text:s text:c="3"/>-5104(%rbp), %rax</text:p>
      <text:p text:style-name="P113"><text:s text:c="8"/>movq <text:s text:c="3"/>%rdx, %rsi</text:p>
      <text:p text:style-name="P113"><text:s text:c="8"/>movq <text:s text:c="3"/>%rax, %rdi</text:p>
      <text:p text:style-name="P113"><text:s text:c="8"/>call <text:s text:c="3"/>double std::uniform_real_distribution&lt;double&gt;::operator()&lt;std::random_device&gt;(std::random_device&amp;)</text:p>
      <text:p text:style-name="P113"><text:s text:c="8"/>movq <text:s text:c="3"/>%xmm0, %rax</text:p>
      <text:p text:style-name="P113"><text:s text:c="8"/>movq <text:s text:c="3"/>%rax, -40(%rbp)</text:p>
      <text:p text:style-name="P113"><text:s text:c="8"/>leaq <text:s text:c="3"/>-5088(%rbp), %rdx</text:p>
      <text:p text:style-name="P113"><text:s text:c="8"/>leaq <text:s text:c="3"/>-5104(%rbp), %rax</text:p>
      <text:p text:style-name="P113"><text:s text:c="8"/>movq <text:s text:c="3"/>%rdx, %rsi</text:p>
      <text:p text:style-name="P113"><text:s text:c="8"/>movq <text:s text:c="3"/>%rax, %rdi</text:p>
      <text:p text:style-name="P113"><text:s text:c="8"/>call <text:s text:c="3"/>double std::uniform_real_distribution&lt;double&gt;::operator()&lt;std::random_device&gt;(std::random_device&amp;)</text:p>
      <text:p text:style-name="P113"><text:s text:c="8"/>movq <text:s text:c="3"/>%xmm0, %rax</text:p>
      <text:p text:style-name="P113"><draw:custom-shape text:anchor-type="paragraph" draw:z-index="4" draw:name="Shape 4" draw:style-name="gr4" draw:text-style-name="P112" svg:width="17.283cm" svg:height="25.847cm" svg:x="-0.367cm" svg:y="-0.168cm"><text:p/><draw:enhanced-geometry svg:viewBox="0 0 21600 21600" draw:type="rectangle" draw:enhanced-path="M 0 0 L 21600 0 21600 21600 0 21600 0 0 Z N"/></draw:custom-shape><text:soft-page-break/><text:s text:c="8"/>movq <text:s text:c="3"/>%rax, -48(%rbp)</text:p>
      <text:p text:style-name="P113"><text:s text:c="8"/>movsd <text:s text:c="2"/>-40(%rbp), %xmm0</text:p>
      <text:p text:style-name="P113"><text:s text:c="8"/>movapd <text:s/>%xmm0, %xmm1</text:p>
      <text:p text:style-name="P113"><text:s text:c="8"/>mulsd <text:s text:c="2"/>%xmm0, %xmm1</text:p>
      <text:p text:style-name="P113"><text:s text:c="8"/>movsd <text:s text:c="2"/>-48(%rbp), %xmm0</text:p>
      <text:p text:style-name="P113"><text:s text:c="8"/>mulsd <text:s text:c="2"/>%xmm0, %xmm0</text:p>
      <text:p text:style-name="P113"><text:s text:c="8"/>addsd <text:s text:c="2"/>%xmm0, %xmm1</text:p>
      <text:p text:style-name="P113"><text:s text:c="8"/>movsd <text:s text:c="2"/>.LC2(%rip), %xmm0</text:p>
      <text:p text:style-name="P113"><text:s text:c="8"/>comisd <text:s/>%xmm1, %xmm0</text:p>
      <text:p text:style-name="P113"><text:s text:c="8"/>jb <text:s text:c="5"/>.L26</text:p>
      <text:p text:style-name="P113"><text:s text:c="8"/>addl <text:s text:c="3"/>$1, -20(%rbp)</text:p>
      <text:p text:style-name="P113">.L26:</text:p>
      <text:p text:style-name="P113"><text:s text:c="8"/>addl <text:s text:c="3"/>$1, -24(%rbp)</text:p>
      <text:p text:style-name="P113">.L25:</text:p>
      <text:p text:style-name="P113"><text:s text:c="8"/>movl <text:s text:c="3"/>-24(%rbp), %eax</text:p>
      <text:p text:style-name="P113"><text:s text:c="8"/>cmpl <text:s text:c="3"/>-5108(%rbp), %eax</text:p>
      <text:p text:style-name="P113"><text:s text:c="8"/>jl <text:s text:c="5"/>.L28</text:p>
      <text:p text:style-name="P113"><text:s text:c="8"/>pxor <text:s text:c="3"/>%xmm1, %xmm1</text:p>
      <text:p text:style-name="P113"><text:s text:c="8"/>cvtsi2sdl <text:s text:c="6"/>-20(%rbp), %xmm1</text:p>
      <text:p text:style-name="P113"><text:s text:c="8"/>movsd <text:s text:c="2"/>.LC4(%rip), %xmm0</text:p>
      <text:p text:style-name="P113"><text:s text:c="8"/>mulsd <text:s text:c="2"/>%xmm1, %xmm0</text:p>
      <text:p text:style-name="P113"><text:s text:c="8"/>pxor <text:s text:c="3"/>%xmm1, %xmm1</text:p>
      <text:p text:style-name="P113"><text:s text:c="8"/>cvtsi2sdl <text:s text:c="6"/>-5108(%rbp), %xmm1</text:p>
      <text:p text:style-name="P113"><text:s text:c="8"/>divsd <text:s text:c="2"/>%xmm1, %xmm0</text:p>
      <text:p text:style-name="P113"><text:s text:c="8"/>movsd <text:s text:c="2"/>%xmm0, -32(%rbp)</text:p>
      <text:p text:style-name="P113"><text:s text:c="8"/>movl <text:s text:c="3"/>$.LC5, %esi</text:p>
      <text:p text:style-name="P113"><text:s text:c="8"/>movl <text:s text:c="3"/>$_ZSt4cout, %edi</text:p>
      <text:p text:style-name="P113"><draw:custom-shape text:anchor-type="paragraph" draw:z-index="5" draw:name="Shape 5" draw:style-name="gr5" draw:text-style-name="P112" svg:width="17.283cm" svg:height="25.729cm" svg:x="-0.367cm" svg:y="-0.048cm"><text:p/><draw:enhanced-geometry svg:viewBox="0 0 21600 21600" draw:type="rectangle" draw:enhanced-path="M 0 0 L 21600 0 21600 21600 0 21600 0 0 Z N"/></draw:custom-shape><text:soft-page-break/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q <text:s text:c="3"/>%rax, %rdx</text:p>
      <text:p text:style-name="P113"><text:s text:c="8"/>movq <text:s text:c="3"/>-32(%rbp), %rax</text:p>
      <text:p text:style-name="P113"><text:s text:c="8"/>movq <text:s text:c="3"/>%rax, %xmm0</text:p>
      <text:p text:style-name="P113"><text:s text:c="8"/>movq <text:s text:c="3"/>%rdx, %rdi</text:p>
      <text:p text:style-name="P113"><text:s text:c="8"/>call <text:s text:c="3"/>std::ostream::operator&lt;&lt;(double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text:s text:c="8"/>leaq <text:s text:c="3"/>-80(%rbp), %rax</text:p>
      <text:p text:style-name="P113"><text:s text:c="8"/>movq <text:s text:c="3"/>%rax, %rsi</text:p>
      <text:p text:style-name="P113"><text:s text:c="8"/>movl <text:s text:c="3"/>$4, %edi</text:p>
      <text:p text:style-name="P113"><text:s text:c="8"/>call <text:s text:c="3"/>clock_gettime</text:p>
      <text:p text:style-name="P113"><text:s text:c="8"/>movl <text:s text:c="3"/>$.LC6, %esi</text:p>
      <text:p text:style-name="P113"><text:s text:c="8"/>movl <text:s text:c="3"/>$_ZSt4cout, %e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q <text:s text:c="3"/>%rax, %rdx</text:p>
      <text:p text:style-name="P113"><text:s text:c="8"/>movq <text:s text:c="3"/>-80(%rbp), %rcx</text:p>
      <text:p text:style-name="P113"><text:s text:c="8"/>movq <text:s text:c="3"/>-64(%rbp), %rax</text:p>
      <text:p text:style-name="P113"><text:s text:c="8"/>subq <text:s text:c="3"/>%rax, %rcx</text:p>
      <text:p text:style-name="P113"><text:s text:c="8"/>pxor <text:s text:c="3"/>%xmm1, %xmm1</text:p>
      <text:p text:style-name="P113"><text:s text:c="8"/>cvtsi2sdq <text:s text:c="6"/>%rcx, %xmm1</text:p>
      <text:p text:style-name="P113"><text:s text:c="8"/>movq <text:s text:c="3"/>-72(%rbp), %rcx</text:p>
      <text:p text:style-name="P113"><text:s text:c="8"/>movq <text:s text:c="3"/>-56(%rbp), %rax</text:p>
      <text:p text:style-name="P113"><text:s text:c="8"/>subq <text:s text:c="3"/>%rax, %rcx</text:p>
      <text:p text:style-name="P113"><draw:custom-shape text:anchor-type="paragraph" draw:z-index="6" draw:name="Shape 6" draw:style-name="gr6" draw:text-style-name="P112" svg:width="17.283cm" svg:height="25.725cm" svg:x="-0.367cm" svg:y="-0.023cm"><text:p/><draw:enhanced-geometry svg:viewBox="0 0 21600 21600" draw:type="rectangle" draw:enhanced-path="M 0 0 L 21600 0 21600 21600 0 21600 0 0 Z N"/></draw:custom-shape><text:soft-page-break/><text:s text:c="8"/>pxor <text:s text:c="3"/>%xmm2, %xmm2</text:p>
      <text:p text:style-name="P113"><text:s text:c="8"/>cvtsi2sdq <text:s text:c="6"/>%rcx, %xmm2</text:p>
      <text:p text:style-name="P113"><text:s text:c="8"/>movsd <text:s text:c="2"/>.LC7(%rip), %xmm0</text:p>
      <text:p text:style-name="P113"><text:s text:c="8"/>mulsd <text:s text:c="2"/>%xmm2, %xmm0</text:p>
      <text:p text:style-name="P113"><text:s text:c="8"/>addsd <text:s text:c="2"/>%xmm0, %xmm1</text:p>
      <text:p text:style-name="P113"><text:s text:c="8"/>movq <text:s text:c="3"/>%xmm1, %rax</text:p>
      <text:p text:style-name="P113"><text:s text:c="8"/>movq <text:s text:c="3"/>%rax, %xmm0</text:p>
      <text:p text:style-name="P113"><text:s text:c="8"/>movq <text:s text:c="3"/>%rdx, %rdi</text:p>
      <text:p text:style-name="P113"><text:s text:c="8"/>call <text:s text:c="3"/>std::ostream::operator&lt;&lt;(double)</text:p>
      <text:p text:style-name="P113"><text:s text:c="8"/>movl <text:s text:c="3"/>$.LC8, %esi</text:p>
      <text:p text:style-name="P113"><text:s text:c="8"/>movq <text:s text:c="3"/>%rax, %r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text:s text:c="8"/>pxor <text:s text:c="3"/>%xmm3, %xmm3</text:p>
      <text:p text:style-name="P113"><text:s text:c="8"/>movsd <text:s text:c="2"/>%xmm3, -5120(%rbp)</text:p>
      <text:p text:style-name="P113"><text:s text:c="8"/>leaq <text:s text:c="3"/>-5088(%rbp), %rax</text:p>
      <text:p text:style-name="P113"><text:s text:c="8"/>movq <text:s text:c="3"/>%rax, %rdi</text:p>
      <text:p text:style-name="P113"><text:s text:c="8"/>call <text:s text:c="3"/>std::random_device::~random_device() [complete object destructor]</text:p>
      <text:p text:style-name="P113"><text:s text:c="8"/>movsd <text:s text:c="2"/>-5120(%rbp), %xmm0</text:p>
      <text:p text:style-name="P113"><text:s text:c="8"/>jmp <text:s text:c="4"/>.L33</text:p>
      <text:p text:style-name="P113"><text:s text:c="8"/>movq <text:s text:c="3"/>%rax, %rbx</text:p>
      <text:p text:style-name="P113"><text:s text:c="8"/>leaq <text:s text:c="3"/>-5088(%rbp), %rax</text:p>
      <text:p text:style-name="P113"><text:s text:c="8"/>movq <text:s text:c="3"/>%rax, %rdi</text:p>
      <text:p text:style-name="P113"><text:s text:c="8"/>call <text:s text:c="3"/>std::random_device::~random_device() [complete object destructor]</text:p>
      <text:p text:style-name="P113"><draw:custom-shape text:anchor-type="paragraph" draw:z-index="7" draw:name="Shape 7" draw:style-name="gr7" draw:text-style-name="P112" svg:width="17.283cm" svg:height="25.702cm" svg:x="-0.367cm" svg:y="-0.037cm"><text:p/><draw:enhanced-geometry svg:viewBox="0 0 21600 21600" draw:type="rectangle" draw:enhanced-path="M 0 0 L 21600 0 21600 21600 0 21600 0 0 Z N"/></draw:custom-shape><text:soft-page-break/><text:s text:c="8"/>movq <text:s text:c="3"/>%rbx, %rax</text:p>
      <text:p text:style-name="P113"><text:s text:c="8"/>movq <text:s text:c="3"/>%rax, %rdi</text:p>
      <text:p text:style-name="P113"><text:s text:c="8"/>call <text:s text:c="3"/>_Unwind_Resume</text:p>
      <text:p text:style-name="P113">.L33:</text:p>
      <text:p text:style-name="P113"><text:s text:c="8"/>movq <text:s text:c="3"/>-8(%rbp), %rbx</text:p>
      <text:p text:style-name="P113"><text:s text:c="8"/>leave</text:p>
      <text:p text:style-name="P113"><text:s text:c="8"/>ret</text:p>
      <text:p text:style-name="P113">.LC10:</text:p>
      <text:p text:style-name="P113"><text:s text:c="8"/>.string "Error!"</text:p>
      <text:p text:style-name="P113">.LC11:</text:p>
      <text:p text:style-name="P113"><text:s text:c="8"/>.string "N &gt;0 !!!"</text:p>
      <text:p text:style-name="P113">.LC12:</text:p>
      <text:p text:style-name="P113"><text:s text:c="8"/>.string "\033[32m"</text:p>
      <text:p text:style-name="P113">.LC13:</text:p>
      <text:p text:style-name="P113"><text:s text:c="8"/>.string "----- 0.5*N ----- "</text:p>
      <text:p text:style-name="P113">.LC14:</text:p>
      <text:p text:style-name="P113"><text:s text:c="8"/>.string "\033[0m"</text:p>
      <text:p text:style-name="P113">.LC16:</text:p>
      <text:p text:style-name="P113"><text:s text:c="8"/>.string "-------N -----"</text:p>
      <text:p text:style-name="P113">.LC17:</text:p>
      <text:p text:style-name="P113"><text:s text:c="8"/>.base64 "LS0tLSAxLjUqTiDigJQtLS0A"</text:p>
      <text:p text:style-name="P113">main:</text:p>
      <text:p text:style-name="P113"><text:s text:c="8"/>pushq <text:s text:c="2"/>%rbp</text:p>
      <text:p text:style-name="P113"><text:s text:c="8"/>movq <text:s text:c="3"/>%rsp, %rbp</text:p>
      <text:p text:style-name="P113"><text:s text:c="8"/>subq <text:s text:c="3"/>$32, %rsp</text:p>
      <text:p text:style-name="P113"><text:s text:c="8"/>movl <text:s text:c="3"/>%edi, -20(%rbp)</text:p>
      <text:p text:style-name="P113"><text:s text:c="8"/>movq <text:s text:c="3"/>%rsi, -32(%rbp)</text:p>
      <text:p text:style-name="P113"><text:s text:c="8"/>cmpl <text:s text:c="3"/>$2, -20(%rbp)</text:p>
      <text:p text:style-name="P113"><draw:custom-shape text:anchor-type="paragraph" draw:z-index="8" draw:name="Shape 8" draw:style-name="gr8" draw:text-style-name="P112" svg:width="17.283cm" svg:height="25.782cm" svg:x="-0.367cm" svg:y="-0.044cm"><text:p/><draw:enhanced-geometry svg:viewBox="0 0 21600 21600" draw:type="rectangle" draw:enhanced-path="M 0 0 L 21600 0 21600 21600 0 21600 0 0 Z N"/></draw:custom-shape><text:soft-page-break/><text:s text:c="8"/>je <text:s text:c="5"/>.L35</text:p>
      <text:p text:style-name="P113"><text:s text:c="8"/>movl <text:s text:c="3"/>$.LC10, %esi</text:p>
      <text:p text:style-name="P113"><text:s text:c="8"/>movl <text:s text:c="3"/>$_ZSt4cerr, %e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text:s text:c="8"/>movl <text:s text:c="3"/>$1, %eax</text:p>
      <text:p text:style-name="P113"><text:s text:c="8"/>jmp <text:s text:c="4"/>.L36</text:p>
      <text:p text:style-name="P113">.L35:</text:p>
      <text:p text:style-name="P113"><text:s text:c="8"/>movq <text:s text:c="3"/>-32(%rbp), %rax</text:p>
      <text:p text:style-name="P113"><text:s text:c="8"/>addq <text:s text:c="3"/>$8, %rax</text:p>
      <text:p text:style-name="P113"><text:s text:c="8"/>movq <text:s text:c="3"/>(%rax), %rax</text:p>
      <text:p text:style-name="P113"><text:s text:c="8"/>movq <text:s text:c="3"/>%rax, %rdi</text:p>
      <text:p text:style-name="P113"><text:s text:c="8"/>call <text:s text:c="3"/>atoi</text:p>
      <text:p text:style-name="P113"><text:s text:c="8"/>movl <text:s text:c="3"/>%eax, -4(%rbp)</text:p>
      <text:p text:style-name="P113"><text:s text:c="8"/>cmpl <text:s text:c="3"/>$0, -4(%rbp)</text:p>
      <text:p text:style-name="P113"><text:s text:c="8"/>jg <text:s text:c="5"/>.L37</text:p>
      <text:p text:style-name="P113"><text:s text:c="8"/>movl <text:s text:c="3"/>$.LC11, %esi</text:p>
      <text:p text:style-name="P113"><text:s text:c="8"/>movl <text:s text:c="3"/>$_ZSt4cerr, %e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draw:custom-shape text:anchor-type="paragraph" draw:z-index="9" draw:name="Shape 9" draw:style-name="gr9" draw:text-style-name="P112" svg:width="17.283cm" svg:height="25.849cm" svg:x="-0.367cm" svg:y="-0.067cm"><text:p/><draw:enhanced-geometry svg:viewBox="0 0 21600 21600" draw:type="rectangle" draw:enhanced-path="M 0 0 L 21600 0 21600 21600 0 21600 0 0 Z N"/></draw:custom-shape><text:soft-page-break/><text:s text:c="8"/>movl <text:s text:c="3"/>$1, %eax</text:p>
      <text:p text:style-name="P113"><text:s text:c="8"/>jmp <text:s text:c="4"/>.L36</text:p>
      <text:p text:style-name="P113">.L37:</text:p>
      <text:p text:style-name="P113"><text:s text:c="8"/>movl <text:s text:c="3"/>$.LC12, %esi</text:p>
      <text:p text:style-name="P113"><text:s text:c="8"/>movl <text:s text:c="3"/>$_ZSt4cout, %e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.LC13, %esi</text:p>
      <text:p text:style-name="P113"><text:s text:c="8"/>movq <text:s text:c="3"/>%rax, %r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.LC14, %esi</text:p>
      <text:p text:style-name="P113"><text:s text:c="8"/>movq <text:s text:c="3"/>%rax, %r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text:s text:c="8"/>pxor <text:s text:c="3"/>%xmm1, %xmm1</text:p>
      <text:p text:style-name="P113"><text:s text:c="8"/>cvtsi2sdl <text:s text:c="6"/>-4(%rbp), %xmm1</text:p>
      <text:p text:style-name="P113"><text:s text:c="8"/>movsd <text:s text:c="2"/>.LC15(%rip), %xmm0</text:p>
      <text:p text:style-name="P113"><text:s text:c="8"/>mulsd <text:s text:c="2"/>%xmm1, %xmm0</text:p>
      <text:p text:style-name="P113"><text:s text:c="8"/>cvttsd2sil <text:s text:c="5"/>%xmm0, %eax</text:p>
      <text:p text:style-name="P113"><text:s text:c="8"/>movl <text:s text:c="3"/>%eax, %edi</text:p>
      <text:p text:style-name="P113"><text:s text:c="8"/>call <text:s text:c="3"/>numberPi(int)</text:p>
      <text:p text:style-name="P113"><text:s text:c="8"/>movl <text:s text:c="3"/>$.LC12, %esi</text:p>
      <text:p text:style-name="P113"><text:s text:c="8"/>movl <text:s text:c="3"/>$_ZSt4cout, %edi</text:p>
      <text:p text:style-name="P113"><draw:custom-shape text:anchor-type="paragraph" draw:z-index="10" draw:name="Shape 10" draw:style-name="gr10" draw:text-style-name="P112" svg:width="17.283cm" svg:height="25.78cm" svg:x="-0.367cm" svg:y="-0.056cm"><text:p/><draw:enhanced-geometry svg:viewBox="0 0 21600 21600" draw:type="rectangle" draw:enhanced-path="M 0 0 L 21600 0 21600 21600 0 21600 0 0 Z N"/></draw:custom-shape><text:soft-page-break/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.LC16, %esi</text:p>
      <text:p text:style-name="P113"><text:s text:c="8"/>movq <text:s text:c="3"/>%rax, %r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.LC14, %esi</text:p>
      <text:p text:style-name="P113"><text:s text:c="8"/>movq <text:s text:c="3"/>%rax, %r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text:s text:c="8"/>movl <text:s text:c="3"/>-4(%rbp), %eax</text:p>
      <text:p text:style-name="P113"><text:s text:c="8"/>movl <text:s text:c="3"/>%eax, %edi</text:p>
      <text:p text:style-name="P113"><text:s text:c="8"/>call <text:s text:c="3"/>numberPi(int)</text:p>
      <text:p text:style-name="P113"><text:s text:c="8"/>movl <text:s text:c="3"/>$.LC12, %esi</text:p>
      <text:p text:style-name="P113"><text:s text:c="8"/>movl <text:s text:c="3"/>$_ZSt4cout, %e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.LC17, %esi</text:p>
      <text:p text:style-name="P113"><text:s text:c="8"/>movq <text:s text:c="3"/>%rax, %rdi</text:p>
      <text:p text:style-name="P113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.LC14, %esi</text:p>
      <text:p text:style-name="P113"><text:s text:c="8"/>movq <text:s text:c="3"/>%rax, %rdi</text:p>
      <text:p text:style-name="P113"><draw:custom-shape text:anchor-type="paragraph" draw:z-index="11" draw:name="Shape 11" draw:style-name="gr11" draw:text-style-name="P112" svg:width="17.283cm" svg:height="25.688cm" svg:x="-0.367cm" svg:y="-0.046cm"><text:p/><draw:enhanced-geometry svg:viewBox="0 0 21600 21600" draw:type="rectangle" draw:enhanced-path="M 0 0 L 21600 0 21600 21600 0 21600 0 0 Z N"/></draw:custom-shape><text:soft-page-break/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3"><text:s text:c="8"/>movl <text:s text:c="3"/>$_ZSt4endlIcSt11char_traitsIcEERSt13basic_ostreamIT_T0_ES6_, %esi</text:p>
      <text:p text:style-name="P113"><text:s text:c="8"/>movq <text:s text:c="3"/>%rax, %rdi</text:p>
      <text:p text:style-name="P113"><text:s text:c="8"/>call <text:s text:c="3"/>std::ostream::operator&lt;&lt;(std::ostream&amp; (*)(std::ostream&amp;))</text:p>
      <text:p text:style-name="P113"><text:s text:c="8"/>pxor <text:s text:c="3"/>%xmm1, %xmm1</text:p>
      <text:p text:style-name="P113"><text:s text:c="8"/>cvtsi2sdl <text:s text:c="6"/>-4(%rbp), %xmm1</text:p>
      <text:p text:style-name="P113"><text:s text:c="8"/>movsd <text:s text:c="2"/>.LC18(%rip), %xmm0</text:p>
      <text:p text:style-name="P113"><text:s text:c="8"/>mulsd <text:s text:c="2"/>%xmm1, %xmm0</text:p>
      <text:p text:style-name="P113"><text:s text:c="8"/>cvttsd2sil <text:s text:c="5"/>%xmm0, %eax</text:p>
      <text:p text:style-name="P113"><text:s text:c="8"/>movl <text:s text:c="3"/>%eax, %edi</text:p>
      <text:p text:style-name="P113"><text:s text:c="8"/>call <text:s text:c="3"/>numberPi(int)</text:p>
      <text:p text:style-name="P113"><text:s text:c="8"/>movl <text:s text:c="3"/>$0, %eax</text:p>
      <text:p text:style-name="P113">.L36:</text:p>
      <text:p text:style-name="P113"><text:s text:c="8"/>leave</text:p>
      <text:p text:style-name="P113"><text:s text:c="8"/>ret</text:p>
      <text:p text:style-name="P113"><text:s text:c="8"/>.set <text:s text:c="3"/>std::__cxx11::basic_string&lt;char, std::char_traits&lt;char&gt;, std::allocator&lt;char&gt;&gt;::_Alloc_hider::~_Alloc_hider() [complete object destructor],_ZNSt7__cxx1112basic_stringIcSt11char_traitsIcESaIcEE12_Alloc_hiderD2Ev</text:p>
      <text:p text:style-name="P113"><text:s text:c="8"/>.set <text:s text:c="3"/>std::__cxx11::basic_string&lt;char, std::char_traits&lt;char&gt;, std::allocator&lt;char&gt;&gt;::~basic_string() [complete object destructor],_ZNSt7__cxx1112basic_stringIcSt11char_traitsIcESaIcEED2Ev</text:p>
      <text:p text:style-name="P113">.LC19:</text:p>
      <text:p text:style-name="P113"><text:s text:c="8"/>.string "basic_string: construction from null is not valid"</text:p>
      <text:p text:style-name="P113"><text:s text:c="8"/>.set <text:s text:c="3"/>std::__cxx11::basic_string&lt;char, std::char_traits&lt;char&gt;, std::allocator&lt;char&gt;&gt;::basic_string&lt;std::allocator&lt;char&gt;&gt;(char const*, std::allocator&lt;char&gt; const&amp;),_ZNSt7__cxx1112basic_stringIcSt11char_traitsIcESaIcEEC2IS3_EEPKcRKS3_</text:p>
      <text:p text:style-name="P113"><draw:custom-shape text:anchor-type="paragraph" draw:z-index="12" draw:name="Shape 12" draw:style-name="gr12" draw:text-style-name="P112" svg:width="17.283cm" svg:height="25.792cm" svg:x="-0.367cm" svg:y="-0.026cm"><text:p/><draw:enhanced-geometry svg:viewBox="0 0 21600 21600" draw:type="rectangle" draw:enhanced-path="M 0 0 L 21600 0 21600 21600 0 21600 0 0 Z N"/></draw:custom-shape><text:soft-page-break/><text:s text:c="8"/>.set <text:s text:c="3"/>std::uniform_real_distribution&lt;double&gt;::uniform_real_distribution(double, double) [complete object constructor],_ZNSt25uniform_real_distributionIdEC2Edd</text:p>
      <text:p text:style-name="P113"><text:s text:c="8"/>.set <text:s text:c="3"/>std::__new_allocator&lt;char&gt;::~__new_allocator() [complete object destructor],_ZNSt15__new_allocatorIcED2Ev</text:p>
      <text:p text:style-name="P113"><text:s text:c="8"/>.set <text:s text:c="3"/>std::__cxx11::basic_string&lt;char, std::char_traits&lt;char&gt;, std::allocator&lt;char&gt;&gt;::_Alloc_hider::_Alloc_hider(char*, std::allocator&lt;char&gt; const&amp;) [complete object constructor],_ZNSt7__cxx1112basic_stringIcSt11char_traitsIcESaIcEE12_Alloc_hiderC2EPcRKS3_</text:p>
      <text:p text:style-name="P113"><text:s text:c="8"/>.set <text:s text:c="3"/>void std::__cxx11::basic_string&lt;char, std::char_traits&lt;char&gt;, std::allocator&lt;char&gt;&gt;::_M_construct&lt;char const*&gt;(char const*, char const*, std::forward_iterator_tag)::_Guard::_Guard(std::__cxx11::basic_string&lt;char, std::char_traits&lt;char&gt;, std::allocator&lt;char&gt;&gt;*) [complete object constructor],_ZZNSt7__cxx1112basic_stringIcSt11char_traitsIcESaIcEE12_M_constructIPKcEEvT_S8_St20forward_iterator_tagEN6_GuardC2EPS4_</text:p>
      <text:p text:style-name="P113"><text:s text:c="8"/>.set <text:s text:c="3"/>void std::__cxx11::basic_string&lt;char, std::char_traits&lt;char&gt;, std::allocator&lt;char&gt;&gt;::_M_construct&lt;char const*&gt;(char const*, char const*, std::forward_iterator_tag)::_Guard::~_Guard() [complete object destructor],_ZZNSt7__cxx1112basic_stringIcSt11char_traitsIcESaIcEE12_M_constructIPKcEEvT_S8_St20forward_iterator_tagEN6_GuardD2Ev</text:p>
      <text:p text:style-name="P113">.LC20:</text:p>
      <text:p text:style-name="P113"><text:s text:c="8"/>.string "_M_a &lt;= _M_b"</text:p>
      <text:p text:style-name="P113">.LC21:</text:p>
      <text:p text:style-name="P113"><text:s text:c="8"/>.string "std::uniform_real_distribution&lt;_RealType&gt;::param_type::param_type(_RealType, _RealType) [with _RealType = double]"</text:p>
      <text:p text:style-name="P113">.LC22:</text:p>
      <text:p text:style-name="P113"><text:s text:c="8"/>.string "/cefs/22/22e6cdc013c8541ce3d1548e_consolidated/compilers_c++_x86_gcc_15.2.0/include/c++/15.2.0/bits/random.h"</text:p>
      <text:p text:style-name="P113"><text:s text:c="8"/>.set <text:s text:c="3"/>std::uniform_real_distribution&lt;double&gt;::param_type::param_type(double, double) [complete object constructor],_ZNSt25uniform_real_distributionIdE10param_typeC2Edd</text:p>
      <text:p text:style-name="P113">.LC23:</text:p>
      <text:p text:style-name="P113"><text:s text:c="8"/>.string "basic_string::_M_create"</text:p>
      <text:p text:style-name="P113"><draw:custom-shape text:anchor-type="paragraph" draw:z-index="13" draw:name="Shape 13" draw:style-name="gr13" draw:text-style-name="P112" svg:width="17.283cm" svg:height="25.891cm" svg:x="-0.367cm" svg:y="-0.102cm"><text:p/><draw:enhanced-geometry svg:viewBox="0 0 21600 21600" draw:type="rectangle" draw:enhanced-path="M 0 0 L 21600 0 21600 21600 0 21600 0 0 Z N"/></draw:custom-shape><text:soft-page-break/><text:s text:c="8"/>.set <text:s text:c="3"/>std::__detail::_Adaptor&lt;std::random_device, double&gt;::_Adaptor(std::random_device&amp;) [complete object constructor],_ZNSt8__detail8_AdaptorISt13random_devicedEC2ERS1_</text:p>
      <text:p text:style-name="P113">.LC2:</text:p>
      <text:p text:style-name="P113"><text:s text:c="8"/>.long <text:s text:c="2"/>0</text:p>
      <text:p text:style-name="P113"><text:s text:c="8"/>.long <text:s text:c="2"/>1072693248</text:p>
      <text:p text:style-name="P113">.LC3:</text:p>
      <text:p text:style-name="P113"><text:s text:c="8"/>.long <text:s text:c="2"/>0</text:p>
      <text:p text:style-name="P113"><text:s text:c="8"/>.long <text:s text:c="2"/>-1074790400</text:p>
      <text:p text:style-name="P113">.LC4:</text:p>
      <text:p text:style-name="P113"><text:s text:c="8"/>.long <text:s text:c="2"/>0</text:p>
      <text:p text:style-name="P113"><text:s text:c="8"/>.long <text:s text:c="2"/>1074790400</text:p>
      <text:p text:style-name="P113">.LC7:</text:p>
      <text:p text:style-name="P113"><text:s text:c="8"/>.long <text:s text:c="2"/>-400107883</text:p>
      <text:p text:style-name="P113"><text:s text:c="8"/>.long <text:s text:c="2"/>1041313291</text:p>
      <text:p text:style-name="P113">.LC15:</text:p>
      <text:p text:style-name="P113"><text:s text:c="8"/>.long <text:s text:c="2"/>0</text:p>
      <text:p text:style-name="P113"><text:s text:c="8"/>.long <text:s text:c="2"/>1071644672</text:p>
      <text:p text:style-name="P113">.LC18:</text:p>
      <text:p text:style-name="P113"><text:s text:c="8"/>.long <text:s text:c="2"/>0</text:p>
      <text:p text:style-name="P113"><text:s text:c="8"/>.long <text:s text:c="2"/>1073217536</text:p>
      <text:p text:style-name="P113">.LC24:</text:p>
      <text:p text:style-name="P113"><text:s text:c="8"/>.long <text:s text:c="2"/>0</text:p>
      <text:p text:style-name="P113"><text:s text:c="8"/>.long <text:s text:c="2"/>-2147483648</text:p>
      <text:p text:style-name="P113"><text:s text:c="8"/>.long <text:s text:c="2"/>16415</text:p>
      <text:p text:style-name="P113"><text:s text:c="8"/>.long <text:s text:c="2"/>0</text:p>
      <text:p text:style-name="P113">.LC25:</text:p>
      <text:p text:style-name="P113"><text:s text:c="8"/>.long <text:s text:c="2"/>0</text:p>
      <text:p text:style-name="P113"><text:s text:c="8"/>.long <text:s text:c="2"/>-2147483648</text:p>
      <text:p text:style-name="P113"><draw:custom-shape text:anchor-type="paragraph" draw:z-index="14" draw:name="Shape 14" draw:style-name="gr14" draw:text-style-name="P112" svg:width="17.283cm" svg:height="9.423cm" svg:x="-0.367cm" svg:y="-0.053cm"><text:p/><draw:enhanced-geometry svg:viewBox="0 0 21600 21600" draw:type="rectangle" draw:enhanced-path="M 0 0 L 21600 0 21600 21600 0 21600 0 0 Z N"/></draw:custom-shape><text:soft-page-break/><text:s text:c="8"/>.long <text:s text:c="2"/>16384</text:p>
      <text:p text:style-name="P113"><text:s text:c="8"/>.long <text:s text:c="2"/>0</text:p>
      <text:p text:style-name="P113">.LC26:</text:p>
      <text:p text:style-name="P113"><text:s text:c="8"/>.long <text:s text:c="2"/>0</text:p>
      <text:p text:style-name="P113"><text:s text:c="8"/>.long <text:s text:c="2"/>-2147483648</text:p>
      <text:p text:style-name="P113"><text:s text:c="8"/>.long <text:s text:c="2"/>16446</text:p>
      <text:p text:style-name="P113"><text:s text:c="8"/>.long <text:s text:c="2"/>0</text:p>
      <text:p text:style-name="P113">.LC27:</text:p>
      <text:p text:style-name="P113"><text:s text:c="8"/>.long <text:s text:c="2"/>-1</text:p>
      <text:p text:style-name="P113"><text:s text:c="8"/>.long <text:s text:c="2"/>1072693247</text:p>
      <text:p text:style-name="P114"><text:span text:style-name="T38"/></text:p>
      <text:p text:style-name="P115"/>
      <text:p text:style-name="P115"/>
      <text:p text:style-name="P115"/>
      <text:p text:style-name="P115"/>
      <text:p text:style-name="P115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h text:style-name="P109" text:outline-level="1"><text:bookmark-start text:name="__RefHeading___Toc18443925 Copy 1"/>Приложение№<text:span text:style-name="T35">2</text:span><text:bookmark-end text:name="__RefHeading___Toc18443925 Copy 1"/></text:h>
      <text:h text:style-name="P110" text:outline-level="1" text:is-list-header="true"><text:bookmark-start text:name="__RefHeading___Toc20588_323823121"/><text:span text:style-name="T36">Листинг</text:span><text:span text:style-name="T39"> </text:span><text:span text:style-name="T36">компиляции программы уровн</text:span><text:span text:style-name="T12">я </text:span><text:span text:style-name="T36">-</text:span><text:span text:style-name="T12">O3 </text:span><text:span text:style-name="T36">на архитектуре </text:span><text:span text:style-name="T12">x86-64 </text:span><text:bookmark-end text:name="__RefHeading___Toc20588_323823121"/></text:h>
      <text:p text:style-name="P117"><draw:custom-shape text:anchor-type="paragraph" draw:z-index="15" draw:name="Shape 15" draw:style-name="gr15" draw:text-style-name="P118" svg:width="17.305cm" svg:height="22.494cm" svg:x="-0.367cm" svg:y="0.363cm"><text:p/><draw:enhanced-geometry svg:viewBox="0 0 21600 21600" draw:type="rectangle" draw:enhanced-path="M 0 0 L 21600 0 21600 21600 0 21600 0 0 Z N"/></draw:custom-shape></text:p>
      <text:p text:style-name="P117">std::basic_ostream&lt;char, std::char_traits&lt;char&gt;&gt;&amp; std::endl&lt;char, std::char_traits&lt;char&gt;&gt;(std::basic_ostream&lt;char, std::char_traits&lt;char&gt;&gt;&amp;) (.isra.0.cold):</text:p>
      <text:p text:style-name="P117">.LC7:</text:p>
      <text:p text:style-name="P117"><text:s text:c="8"/>.string "Number Pi: "</text:p>
      <text:p text:style-name="P117">.LC8:</text:p>
      <text:p text:style-name="P117"><text:s text:c="8"/>.string "Time taken:"</text:p>
      <text:p text:style-name="P117">.LC10:</text:p>
      <text:p text:style-name="P117"><text:s text:c="8"/>.string "sec."</text:p>
      <text:p text:style-name="P117"/>
      <text:p text:style-name="P117">numberPi(int):</text:p>
      <text:p text:style-name="P117"><text:s text:c="8"/>pushq <text:s text:c="2"/>%r13</text:p>
      <text:p text:style-name="P117"><text:s text:c="8"/>pushq <text:s text:c="2"/>%r12</text:p>
      <text:p text:style-name="P117"><text:s text:c="8"/>movl <text:s text:c="3"/>%edi, %r12d</text:p>
      <text:p text:style-name="P117"><text:s text:c="8"/>movl <text:s text:c="3"/>$4, %edi</text:p>
      <text:p text:style-name="P117"><text:s text:c="8"/>pushq <text:s text:c="2"/>%rbp</text:p>
      <text:p text:style-name="P117"><text:s text:c="8"/>pushq <text:s text:c="2"/>%rbx</text:p>
      <text:p text:style-name="P117"><text:s text:c="8"/>subq <text:s text:c="3"/>$5096, %rsp</text:p>
      <text:p text:style-name="P117"><text:s text:c="8"/>leaq <text:s text:c="3"/>32(%rsp), %rsi</text:p>
      <text:p text:style-name="P117"><text:s text:c="8"/>leaq <text:s text:c="3"/>64(%rsp), %rbx</text:p>
      <text:p text:style-name="P117"><text:s text:c="8"/>call <text:s text:c="3"/>clock_gettime</text:p>
      <text:p text:style-name="P117"><text:s text:c="8"/>leaq <text:s text:c="3"/>48(%rsp), %rsi</text:p>
      <text:p text:style-name="P117"><text:s text:c="8"/>leaq <text:s text:c="3"/>80(%rsp), %rdi</text:p>
      <text:p text:style-name="P117"><text:s text:c="8"/>movl <text:s text:c="3"/>$1634100580, 64(%rsp)</text:p>
      <text:p text:style-name="P117"><text:s text:c="8"/>movq <text:s text:c="3"/>%rbx, 48(%rsp)</text:p>
      <text:p text:style-name="P117"><text:s text:c="8"/>movl <text:s text:c="3"/>$1953264993, 67(%rsp)</text:p>
      <text:p text:style-name="P117"><text:s text:c="8"/>movq <text:s text:c="3"/>$7, 56(%rsp)</text:p>
      <text:p text:style-name="P117"><text:s text:c="8"/>movb <text:s text:c="3"/>$0, 71(%rsp)</text:p>
      <text:p text:style-name="P117"><text:s text:c="8"/>call <text:s text:c="3"/>std::random_device::_M_init(std::__cxx11::basic_string&lt;char, std::char_traits&lt;char&gt;, std::allocator&lt;char&gt;&gt; const&amp;)</text:p>
      <text:p text:style-name="P117"><text:s text:c="8"/>movq <text:s text:c="3"/>48(%rsp), %rdi</text:p>
      <text:p text:style-name="P117"><text:s text:c="8"/>cmpq <text:s text:c="3"/>%rbx, %rdi</text:p>
      <text:p text:style-name="P117"><text:s text:c="8"/>je <text:s text:c="5"/>.L12</text:p>
      <text:p text:style-name="P117"><text:s text:c="8"/>movq <text:s text:c="3"/>64(%rsp), %rax</text:p>
      <text:p text:style-name="P117"><text:s text:c="8"/>leaq <text:s text:c="3"/>1(%rax), %rsi</text:p>
      <text:p text:style-name="P117"><text:s text:c="8"/>call <text:s text:c="3"/>operator delete(void*, unsigned long)</text:p>
      <text:p text:style-name="P117">.L12:</text:p>
      <text:p text:style-name="P117"><text:s text:c="8"/>pxor <text:s text:c="3"/>%xmm0, %xmm0</text:p>
      <text:p text:style-name="P117"><text:s text:c="8"/>testl <text:s text:c="2"/>%r12d, %r12d</text:p>
      <text:p text:style-name="P117"><draw:custom-shape text:anchor-type="paragraph" draw:z-index="16" draw:name="Shape 16" draw:style-name="gr16" draw:text-style-name="P112" svg:width="17.283cm" svg:height="25.916cm" svg:x="-0.367cm" svg:y="-0.312cm"><text:p/><draw:enhanced-geometry svg:viewBox="0 0 21600 21600" draw:type="rectangle" draw:enhanced-path="M 0 0 L 21600 0 21600 21600 0 21600 0 0 Z N"/></draw:custom-shape><text:soft-page-break/><text:s text:c="8"/>jle <text:s text:c="4"/>.L14</text:p>
      <text:p text:style-name="P117"><text:s text:c="8"/>xorl <text:s text:c="3"/>%ebx, %ebx</text:p>
      <text:p text:style-name="P117"><text:s text:c="8"/>xorl <text:s text:c="3"/>%ebp, %ebp</text:p>
      <text:p text:style-name="P117"><text:s text:c="8"/>jmp <text:s text:c="4"/>.L13</text:p>
      <text:p text:style-name="P117">.L54:</text:p>
      <text:p text:style-name="P117"><text:s text:c="8"/>divsd <text:s text:c="2"/>8(%rsp), %xmm0</text:p>
      <text:p text:style-name="P117"><text:s text:c="8"/>comisd <text:s/>.LC2(%rip), %xmm0</text:p>
      <text:p text:style-name="P117"><text:s text:c="8"/>jnb <text:s text:c="4"/>.L35</text:p>
      <text:p text:style-name="P117"><text:s text:c="8"/>addsd <text:s text:c="2"/>%xmm0, %xmm0</text:p>
      <text:p text:style-name="P117"><text:s text:c="8"/>subsd <text:s text:c="2"/>.LC2(%rip), %xmm0</text:p>
      <text:p text:style-name="P117"><text:s text:c="8"/>movsd <text:s text:c="2"/>%xmm0, 24(%rsp)</text:p>
      <text:p text:style-name="P117">.L19:</text:p>
      <text:p text:style-name="P117"><text:s text:c="8"/>movq <text:s text:c="3"/>.LC2(%rip), %rax</text:p>
      <text:p text:style-name="P117"><text:s text:c="8"/>movl <text:s text:c="3"/>$2, %r13d</text:p>
      <text:p text:style-name="P117"><text:s text:c="8"/>pxor <text:s text:c="3"/>%xmm0, %xmm0</text:p>
      <text:p text:style-name="P117"><text:s text:c="8"/>movq <text:s text:c="3"/>%rax, 8(%rsp)</text:p>
      <text:p text:style-name="P117">.L22:</text:p>
      <text:p text:style-name="P117"><text:s text:c="8"/>leaq <text:s text:c="3"/>80(%rsp), %rdi</text:p>
      <text:p text:style-name="P117"><text:s text:c="8"/>movsd <text:s text:c="2"/>%xmm0, 16(%rsp)</text:p>
      <text:p text:style-name="P117"><text:s text:c="8"/>call <text:s text:c="3"/>std::random_device::_M_getval()</text:p>
      <text:p text:style-name="P117"><text:s text:c="8"/>movl <text:s text:c="3"/>%eax, %eax</text:p>
      <text:p text:style-name="P117"><text:s text:c="8"/>pxor <text:s text:c="3"/>%xmm1, %xmm1</text:p>
      <text:p text:style-name="P117"><text:s text:c="8"/>flds <text:s text:c="3"/>.LC5(%rip)</text:p>
      <text:p text:style-name="P117"><text:s text:c="8"/>movsd <text:s text:c="2"/>16(%rsp), %xmm0</text:p>
      <text:p text:style-name="P117"><text:s text:c="8"/>cvtsi2sdq <text:s text:c="6"/>%rax, %xmm1</text:p>
      <text:p text:style-name="P117"><text:s text:c="8"/>mulsd <text:s text:c="2"/>8(%rsp), %xmm1</text:p>
      <text:p text:style-name="P117"><text:s text:c="8"/>fmull <text:s text:c="2"/>8(%rsp)</text:p>
      <text:p text:style-name="P117"><text:s text:c="8"/>fstpl <text:s text:c="2"/>8(%rsp)</text:p>
      <text:p text:style-name="P117"><text:s text:c="8"/>addsd <text:s text:c="2"/>%xmm1, %xmm0</text:p>
      <text:p text:style-name="P117"><text:s text:c="8"/>cmpl <text:s text:c="3"/>$1, %r13d</text:p>
      <text:p text:style-name="P117"><text:s text:c="8"/>jne <text:s text:c="4"/>.L36</text:p>
      <text:p text:style-name="P117"><text:s text:c="8"/>divsd <text:s text:c="2"/>8(%rsp), %xmm0</text:p>
      <text:p text:style-name="P117"><text:s text:c="8"/>comisd <text:s/>.LC2(%rip), %xmm0</text:p>
      <text:p text:style-name="P117"><text:s text:c="8"/>jnb <text:s text:c="4"/>.L37</text:p>
      <text:p text:style-name="P117"><text:s text:c="8"/>addsd <text:s text:c="2"/>%xmm0, %xmm0</text:p>
      <text:p text:style-name="P117"><text:s text:c="8"/>subsd <text:s text:c="2"/>.LC2(%rip), %xmm0</text:p>
      <text:p text:style-name="P117"><text:s text:c="8"/>mulsd <text:s text:c="2"/>%xmm0, %xmm0</text:p>
      <text:p text:style-name="P117">.L23:</text:p>
      <text:p text:style-name="P117"><text:s text:c="8"/>movsd <text:s text:c="2"/>24(%rsp), %xmm1</text:p>
      <text:p text:style-name="P117"><text:s text:c="8"/>movsd <text:s text:c="2"/>.LC2(%rip), %xmm6</text:p>
      <text:p text:style-name="P117"><text:s text:c="8"/>mulsd <text:s text:c="2"/>%xmm1, %xmm1</text:p>
      <text:p text:style-name="P117"><text:s text:c="8"/>addsd <text:s text:c="2"/>%xmm1, %xmm0</text:p>
      <text:p text:style-name="P117"><text:s text:c="8"/>comisd <text:s/>%xmm0, %xmm6</text:p>
      <text:p text:style-name="P117"><text:s text:c="8"/>sbbl <text:s text:c="3"/>$-1, %ebp</text:p>
      <text:p text:style-name="P117"><text:s text:c="8"/>addl <text:s text:c="3"/>$1, %ebx</text:p>
      <text:p text:style-name="P117"><draw:custom-shape text:anchor-type="paragraph" draw:z-index="17" draw:name="Shape 17" draw:style-name="gr17" draw:text-style-name="P112" svg:width="17.283cm" svg:height="26.025cm" svg:x="-0.367cm" svg:y="-0.374cm"><text:p/><draw:enhanced-geometry svg:viewBox="0 0 21600 21600" draw:type="rectangle" draw:enhanced-path="M 0 0 L 21600 0 21600 21600 0 21600 0 0 Z N"/></draw:custom-shape><text:soft-page-break/><text:s text:c="8"/>cmpl <text:s text:c="3"/>%ebx, %r12d</text:p>
      <text:p text:style-name="P117"><text:s text:c="8"/>je <text:s text:c="5"/>.L53</text:p>
      <text:p text:style-name="P117">.L13:</text:p>
      <text:p text:style-name="P117"><text:s text:c="8"/>movq <text:s text:c="3"/>.LC2(%rip), %rax</text:p>
      <text:p text:style-name="P117"><text:s text:c="8"/>movl <text:s text:c="3"/>$2, %r13d</text:p>
      <text:p text:style-name="P117"><text:s text:c="8"/>pxor <text:s text:c="3"/>%xmm0, %xmm0</text:p>
      <text:p text:style-name="P117"><text:s text:c="8"/>movq <text:s text:c="3"/>%rax, 8(%rsp)</text:p>
      <text:p text:style-name="P117">.L18:</text:p>
      <text:p text:style-name="P117"><text:s text:c="8"/>leaq <text:s text:c="3"/>80(%rsp), %rdi</text:p>
      <text:p text:style-name="P117"><text:s text:c="8"/>movsd <text:s text:c="2"/>%xmm0, 16(%rsp)</text:p>
      <text:p text:style-name="P117"><text:s text:c="8"/>call <text:s text:c="3"/>std::random_device::_M_getval()</text:p>
      <text:p text:style-name="P117"><text:s text:c="8"/>movl <text:s text:c="3"/>%eax, %eax</text:p>
      <text:p text:style-name="P117"><text:s text:c="8"/>pxor <text:s text:c="3"/>%xmm1, %xmm1</text:p>
      <text:p text:style-name="P117"><text:s text:c="8"/>flds <text:s text:c="3"/>.LC5(%rip)</text:p>
      <text:p text:style-name="P117"><text:s text:c="8"/>movsd <text:s text:c="2"/>16(%rsp), %xmm0</text:p>
      <text:p text:style-name="P117"><text:s text:c="8"/>cvtsi2sdq <text:s text:c="6"/>%rax, %xmm1</text:p>
      <text:p text:style-name="P117"><text:s text:c="8"/>mulsd <text:s text:c="2"/>8(%rsp), %xmm1</text:p>
      <text:p text:style-name="P117"><text:s text:c="8"/>fmull <text:s text:c="2"/>8(%rsp)</text:p>
      <text:p text:style-name="P117"><text:s text:c="8"/>fstpl <text:s text:c="2"/>8(%rsp)</text:p>
      <text:p text:style-name="P117"><text:s text:c="8"/>addsd <text:s text:c="2"/>%xmm1, %xmm0</text:p>
      <text:p text:style-name="P117"><text:s text:c="8"/>cmpl <text:s text:c="3"/>$1, %r13d</text:p>
      <text:p text:style-name="P117"><text:s text:c="8"/>je <text:s text:c="5"/>.L54</text:p>
      <text:p text:style-name="P117"><text:s text:c="8"/>movl <text:s text:c="3"/>$1, %r13d</text:p>
      <text:p text:style-name="P117"><text:s text:c="8"/>jmp <text:s text:c="4"/>.L18</text:p>
      <text:p text:style-name="P117">.L36:</text:p>
      <text:p text:style-name="P117"><text:s text:c="8"/>movl <text:s text:c="3"/>$1, %r13d</text:p>
      <text:p text:style-name="P117"><text:s text:c="8"/>jmp <text:s text:c="4"/>.L22</text:p>
      <text:p text:style-name="P117">.L53:</text:p>
      <text:p text:style-name="P117"><text:s text:c="8"/>pxor <text:s text:c="3"/>%xmm0, %xmm0</text:p>
      <text:p text:style-name="P117"><text:s text:c="8"/>cvtsi2sdl <text:s text:c="6"/>%ebp, %xmm0</text:p>
      <text:p text:style-name="P117"><text:s text:c="8"/>mulsd <text:s text:c="2"/>.LC6(%rip), %xmm0</text:p>
      <text:p text:style-name="P117">.L14:</text:p>
      <text:p text:style-name="P117"><text:s text:c="8"/>pxor <text:s text:c="3"/>%xmm1, %xmm1</text:p>
      <text:p text:style-name="P117"><text:s text:c="8"/>movl <text:s text:c="3"/>$11, %edx</text:p>
      <text:p text:style-name="P117"><text:s text:c="8"/>movl <text:s text:c="3"/>$.LC7, %esi</text:p>
      <text:p text:style-name="P117"><text:s text:c="8"/>movl <text:s text:c="3"/>$_ZSt4cout, %edi</text:p>
      <text:p text:style-name="P117"><text:s text:c="8"/>cvtsi2sdl <text:s text:c="6"/>%r12d, %xmm1</text:p>
      <text:p text:style-name="P117"><text:s text:c="8"/>divsd <text:s text:c="2"/>%xmm1, %xmm0</text:p>
      <text:p text:style-name="P117"><text:s text:c="8"/>movsd <text:s text:c="2"/>%xmm0, 8(%rsp)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sd <text:s text:c="2"/>8(%rsp), %xmm0</text:p>
      <text:p text:style-name="P117"><text:s text:c="8"/>movl <text:s text:c="3"/>$_ZSt4cout, %edi</text:p>
      <text:p text:style-name="P117"><text:s text:c="8"/>call <text:s text:c="3"/>std::ostream&amp; std::ostream::_M_insert&lt;double&gt;(double)</text:p>
      <text:p text:style-name="P117"><draw:custom-shape text:anchor-type="paragraph" draw:z-index="18" draw:name="Shape 18" draw:style-name="gr18" draw:text-style-name="P112" svg:width="17.283cm" svg:height="25.963cm" svg:x="-0.367cm" svg:y="-0.415cm"><text:p/><draw:enhanced-geometry svg:viewBox="0 0 21600 21600" draw:type="rectangle" draw:enhanced-path="M 0 0 L 21600 0 21600 21600 0 21600 0 0 Z N"/></draw:custom-shape><text:soft-page-break/><text:s text:c="8"/>movq <text:s text:c="3"/>%rax, %rbp</text:p>
      <text:p text:style-name="P117"><text:s text:c="8"/>movq <text:s text:c="3"/>(%rax), %rax</text:p>
      <text:p text:style-name="P117"><text:s text:c="8"/>movq <text:s text:c="3"/>-24(%rax), %rax</text:p>
      <text:p text:style-name="P117"><text:s text:c="8"/>movq <text:s text:c="3"/>240(%rbp,%rax), %rbx</text:p>
      <text:p text:style-name="P117"><text:s text:c="8"/>testq <text:s text:c="2"/>%rbx, %rbx</text:p>
      <text:p text:style-name="P117"><text:s text:c="8"/>je <text:s text:c="5"/>.L48</text:p>
      <text:p text:style-name="P117"><text:s text:c="8"/>cmpb <text:s text:c="3"/>$0, 56(%rbx)</text:p>
      <text:p text:style-name="P117"><text:s text:c="8"/>je <text:s text:c="5"/>.L27</text:p>
      <text:p text:style-name="P117"><text:s text:c="8"/>movsbl <text:s/>67(%rbx), %esi</text:p>
      <text:p text:style-name="P117">.L28:</text:p>
      <text:p text:style-name="P117"><text:s text:c="8"/>movq <text:s text:c="3"/>%rbp, %rdi</text:p>
      <text:p text:style-name="P117"><text:s text:c="8"/>call <text:s text:c="3"/>std::ostream::put(char)</text:p>
      <text:p text:style-name="P117"><text:s text:c="8"/>movq <text:s text:c="3"/>%rax, %rdi</text:p>
      <text:p text:style-name="P117"><text:s text:c="8"/>call <text:s text:c="3"/>std::ostream::flush()</text:p>
      <text:p text:style-name="P117"><text:s text:c="8"/>leaq <text:s text:c="3"/>48(%rsp), %rsi</text:p>
      <text:p text:style-name="P117"><text:s text:c="8"/>movl <text:s text:c="3"/>$4, %edi</text:p>
      <text:p text:style-name="P117"><text:s text:c="8"/>call <text:s text:c="3"/>clock_gettime</text:p>
      <text:p text:style-name="P117"><text:s text:c="8"/>movl <text:s text:c="3"/>$11, %edx</text:p>
      <text:p text:style-name="P117"><text:s text:c="8"/>movl <text:s text:c="3"/>$.LC8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q <text:s text:c="3"/>56(%rsp), %rax</text:p>
      <text:p text:style-name="P117"><text:s text:c="8"/>pxor <text:s text:c="3"/>%xmm0, %xmm0</text:p>
      <text:p text:style-name="P117"><text:s text:c="8"/>subq <text:s text:c="3"/>40(%rsp), %rax</text:p>
      <text:p text:style-name="P117"><text:s text:c="8"/>pxor <text:s text:c="3"/>%xmm1, %xmm1</text:p>
      <text:p text:style-name="P117"><text:s text:c="8"/>cvtsi2sdq <text:s text:c="6"/>%rax, %xmm0</text:p>
      <text:p text:style-name="P117"><text:s text:c="8"/>movq <text:s text:c="3"/>48(%rsp), %rax</text:p>
      <text:p text:style-name="P117"><text:s text:c="8"/>subq <text:s text:c="3"/>32(%rsp), %rax</text:p>
      <text:p text:style-name="P117"><text:s text:c="8"/>movl <text:s text:c="3"/>$_ZSt4cout, %edi</text:p>
      <text:p text:style-name="P117"><text:s text:c="8"/>mulsd <text:s text:c="2"/>.LC9(%rip), %xmm0</text:p>
      <text:p text:style-name="P117"><text:s text:c="8"/>cvtsi2sdq <text:s text:c="6"/>%rax, %xmm1</text:p>
      <text:p text:style-name="P117"><text:s text:c="8"/>addsd <text:s text:c="2"/>%xmm1, %xmm0</text:p>
      <text:p text:style-name="P117"><text:s text:c="8"/>call <text:s text:c="3"/>std::ostream&amp; std::ostream::_M_insert&lt;double&gt;(double)</text:p>
      <text:p text:style-name="P117"><text:s text:c="8"/>movl <text:s text:c="3"/>$4, %edx</text:p>
      <text:p text:style-name="P117"><text:s text:c="8"/>movl <text:s text:c="3"/>$.LC10, %esi</text:p>
      <text:p text:style-name="P117"><text:s text:c="8"/>movq <text:s text:c="3"/>%rax, %rdi</text:p>
      <text:p text:style-name="P117"><text:s text:c="8"/>movq <text:s text:c="3"/>%rax, %rbx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q <text:s text:c="3"/>(%rbx), %rax</text:p>
      <text:p text:style-name="P117"><text:s text:c="8"/>movq <text:s text:c="3"/>-24(%rax), %rax</text:p>
      <text:p text:style-name="P117"><text:s text:c="8"/>movq <text:s text:c="3"/>240(%rbx,%rax), %rbp</text:p>
      <text:p text:style-name="P117"><draw:custom-shape text:anchor-type="paragraph" draw:z-index="19" draw:name="Shape 19" draw:style-name="gr19" draw:text-style-name="P112" svg:width="17.283cm" svg:height="25.925cm" svg:x="-0.367cm" svg:y="-0.212cm"><text:p/><draw:enhanced-geometry svg:viewBox="0 0 21600 21600" draw:type="rectangle" draw:enhanced-path="M 0 0 L 21600 0 21600 21600 0 21600 0 0 Z N"/></draw:custom-shape><text:soft-page-break/><text:s text:c="8"/>testq <text:s text:c="2"/>%rbp, %rbp</text:p>
      <text:p text:style-name="P117"><text:s text:c="8"/>je <text:s text:c="5"/>.L49</text:p>
      <text:p text:style-name="P117"><text:s text:c="8"/>cmpb <text:s text:c="3"/>$0, 56(%rbp)</text:p>
      <text:p text:style-name="P117"><text:s text:c="8"/>je <text:s text:c="5"/>.L30</text:p>
      <text:p text:style-name="P117"><text:s text:c="8"/>movsbl <text:s/>67(%rbp), %esi</text:p>
      <text:p text:style-name="P117">.L31:</text:p>
      <text:p text:style-name="P117"><text:s text:c="8"/>movq <text:s text:c="3"/>%rbx, %rdi</text:p>
      <text:p text:style-name="P117"><text:s text:c="8"/>call <text:s text:c="3"/>std::ostream::put(char)</text:p>
      <text:p text:style-name="P117"><text:s text:c="8"/>movq <text:s text:c="3"/>%rax, %rdi</text:p>
      <text:p text:style-name="P117"><text:s text:c="8"/>call <text:s text:c="3"/>std::ostream::flush()</text:p>
      <text:p text:style-name="P117"><text:s text:c="8"/>leaq <text:s text:c="3"/>80(%rsp), %rdi</text:p>
      <text:p text:style-name="P117"><text:s text:c="8"/>call <text:s text:c="3"/>std::random_device::_M_fini()</text:p>
      <text:p text:style-name="P117"><text:s text:c="8"/>addq <text:s text:c="3"/>$5096, %rsp</text:p>
      <text:p text:style-name="P117"><text:s text:c="8"/>pxor <text:s text:c="3"/>%xmm0, %xmm0</text:p>
      <text:p text:style-name="P117"><text:s text:c="8"/>popq <text:s text:c="3"/>%rbx</text:p>
      <text:p text:style-name="P117"><text:s text:c="8"/>popq <text:s text:c="3"/>%rbp</text:p>
      <text:p text:style-name="P117"><text:s text:c="8"/>popq <text:s text:c="3"/>%r12</text:p>
      <text:p text:style-name="P117"><text:s text:c="8"/>popq <text:s text:c="3"/>%r13</text:p>
      <text:p text:style-name="P117"><text:s text:c="8"/>ret</text:p>
      <text:p text:style-name="P117">.L35:</text:p>
      <text:p text:style-name="P117"><text:s text:c="8"/>movsd <text:s text:c="2"/>.LC3(%rip), %xmm7</text:p>
      <text:p text:style-name="P117"><text:s text:c="8"/>movsd <text:s text:c="2"/>%xmm7, 24(%rsp)</text:p>
      <text:p text:style-name="P117"><text:s text:c="8"/>jmp <text:s text:c="4"/>.L19</text:p>
      <text:p text:style-name="P117">.L37:</text:p>
      <text:p text:style-name="P117"><text:s text:c="8"/>movsd <text:s text:c="2"/>.LC4(%rip), %xmm0</text:p>
      <text:p text:style-name="P117"><text:s text:c="8"/>jmp <text:s text:c="4"/>.L23</text:p>
      <text:p text:style-name="P117">.L27:</text:p>
      <text:p text:style-name="P117"><text:s text:c="8"/>movq <text:s text:c="3"/>%rbx, %rdi</text:p>
      <text:p text:style-name="P117"><text:s text:c="8"/>call <text:s text:c="3"/>std::ctype&lt;char&gt;::_M_widen_init() const</text:p>
      <text:p text:style-name="P117"><text:s text:c="8"/>movq <text:s text:c="3"/>(%rbx), %rax</text:p>
      <text:p text:style-name="P117"><text:s text:c="8"/>movl <text:s text:c="3"/>$10, %esi</text:p>
      <text:p text:style-name="P117"><text:s text:c="8"/>movq <text:s text:c="3"/>48(%rax), %rax</text:p>
      <text:p text:style-name="P117"><text:s text:c="8"/>cmpq <text:s text:c="3"/>$_ZNKSt5ctypeIcE8do_widenEc, %rax</text:p>
      <text:p text:style-name="P117"><text:s text:c="8"/>je <text:s text:c="5"/>.L28</text:p>
      <text:p text:style-name="P117"><text:s text:c="8"/>movq <text:s text:c="3"/>%rbx, %rdi</text:p>
      <text:p text:style-name="P117"><text:s text:c="8"/>call <text:s text:c="3"/>*%rax</text:p>
      <text:p text:style-name="P117"><text:s text:c="8"/>movsbl <text:s/>%al, %esi</text:p>
      <text:p text:style-name="P117"><text:s text:c="8"/>jmp <text:s text:c="4"/>.L28</text:p>
      <text:p text:style-name="P117">.L30:</text:p>
      <text:p text:style-name="P117"><text:s text:c="8"/>movq <text:s text:c="3"/>%rbp, %rdi</text:p>
      <text:p text:style-name="P117"><text:s text:c="8"/>call <text:s text:c="3"/>std::ctype&lt;char&gt;::_M_widen_init() const</text:p>
      <text:p text:style-name="P117"><text:s text:c="8"/>movq <text:s text:c="3"/>0(%rbp), %rax</text:p>
      <text:p text:style-name="P117"><text:s text:c="8"/>movl <text:s text:c="3"/>$10, %esi</text:p>
      <text:p text:style-name="P117"><text:s text:c="8"/>movq <text:s text:c="3"/>48(%rax), %rax</text:p>
      <text:p text:style-name="P117"><text:s text:c="8"/>cmpq <text:s text:c="3"/>$_ZNKSt5ctypeIcE8do_widenEc, %rax</text:p>
      <text:p text:style-name="P117"><draw:custom-shape text:anchor-type="paragraph" draw:z-index="20" draw:name="Shape 20" draw:style-name="gr20" draw:text-style-name="P112" svg:width="17.283cm" svg:height="25.866cm" svg:x="-0.367cm" svg:y="-0.284cm"><text:p/><draw:enhanced-geometry svg:viewBox="0 0 21600 21600" draw:type="rectangle" draw:enhanced-path="M 0 0 L 21600 0 21600 21600 0 21600 0 0 Z N"/></draw:custom-shape><text:soft-page-break/><text:s text:c="8"/>je <text:s text:c="5"/>.L31</text:p>
      <text:p text:style-name="P117"><text:s text:c="8"/>movq <text:s text:c="3"/>%rbp, %rdi</text:p>
      <text:p text:style-name="P117"><text:s text:c="8"/>call <text:s text:c="3"/>*%rax</text:p>
      <text:p text:style-name="P117"><text:s text:c="8"/>movsbl <text:s/>%al, %esi</text:p>
      <text:p text:style-name="P117"><text:s text:c="8"/>jmp <text:s text:c="4"/>.L31</text:p>
      <text:p text:style-name="P117"><text:s text:c="8"/>movq <text:s text:c="3"/>%rax, %rbx</text:p>
      <text:p text:style-name="P117"><text:s text:c="8"/>jmp <text:s text:c="4"/>.L15</text:p>
      <text:p text:style-name="P117"><text:s text:c="8"/>jmp <text:s text:c="4"/>.L47</text:p>
      <text:p text:style-name="P117">numberPi(int) (.cold):</text:p>
      <text:p text:style-name="P117">.LC13:</text:p>
      <text:p text:style-name="P117"><text:s text:c="8"/>.string "Error!"</text:p>
      <text:p text:style-name="P117">.LC14:</text:p>
      <text:p text:style-name="P117"><text:s text:c="8"/>.string "N &gt;0 !!!"</text:p>
      <text:p text:style-name="P117">.LC15:</text:p>
      <text:p text:style-name="P117"><text:s text:c="8"/>.string "\033[32m"</text:p>
      <text:p text:style-name="P117">.LC16:</text:p>
      <text:p text:style-name="P117"><text:s text:c="8"/>.string "----- 0.5*N ----- "</text:p>
      <text:p text:style-name="P117">.LC17:</text:p>
      <text:p text:style-name="P117"><text:s text:c="8"/>.string "\033[0m"</text:p>
      <text:p text:style-name="P117">.LC19:</text:p>
      <text:p text:style-name="P117"><text:s text:c="8"/>.string "-------N -----"</text:p>
      <text:p text:style-name="P117">.LC20:</text:p>
      <text:p text:style-name="P117"><text:s text:c="8"/>.base64 "LS0tLSAxLjUqTiDigJQtLS0A"</text:p>
      <text:p text:style-name="P117">main:</text:p>
      <text:p text:style-name="P117"><text:s text:c="8"/>subq <text:s text:c="3"/>$24, %rsp</text:p>
      <text:p text:style-name="P117"><text:s text:c="8"/>cmpl <text:s text:c="3"/>$2, %edi</text:p>
      <text:p text:style-name="P117"><text:s text:c="8"/>je <text:s text:c="5"/>.L56</text:p>
      <text:p text:style-name="P117"><text:s text:c="8"/>movl <text:s text:c="3"/>$_ZSt4cerr, %edi</text:p>
      <text:p text:style-name="P117"><text:s text:c="8"/>movl <text:s text:c="3"/>$6, %edx</text:p>
      <text:p text:style-name="P117"><text:s text:c="8"/>movl <text:s text:c="3"/>$.LC13, %es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_ZSt4cerr, %edi</text:p>
      <text:p text:style-name="P117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7">.L57:</text:p>
      <text:p text:style-name="P117"><text:s text:c="8"/>movl <text:s text:c="3"/>$1, %eax</text:p>
      <text:p text:style-name="P117">.L55:</text:p>
      <text:p text:style-name="P117"><text:s text:c="8"/>addq <text:s text:c="3"/>$24, %rsp</text:p>
      <text:p text:style-name="P117"><text:s text:c="8"/>ret</text:p>
      <text:p text:style-name="P117">.L56:</text:p>
      <text:p text:style-name="P117"><text:s text:c="8"/>movq <text:s text:c="3"/>8(%rsi), %rdi</text:p>
      <text:p text:style-name="P117"><text:s text:c="8"/>movl <text:s text:c="3"/>$10, %edx</text:p>
      <text:p text:style-name="P117"><draw:custom-shape text:anchor-type="paragraph" draw:z-index="21" draw:name="Shape 21" draw:style-name="gr21" draw:text-style-name="P112" svg:width="17.283cm" svg:height="25.658cm" svg:x="-0.367cm" svg:y="-0.31cm"><text:p/><draw:enhanced-geometry svg:viewBox="0 0 21600 21600" draw:type="rectangle" draw:enhanced-path="M 0 0 L 21600 0 21600 21600 0 21600 0 0 Z N"/></draw:custom-shape><text:soft-page-break/><text:s text:c="8"/>xorl <text:s text:c="3"/>%esi, %esi</text:p>
      <text:p text:style-name="P117"><text:s text:c="8"/>call <text:s text:c="3"/>strtol</text:p>
      <text:p text:style-name="P117"><text:s text:c="8"/>testl <text:s text:c="2"/>%eax, %eax</text:p>
      <text:p text:style-name="P117"><text:s text:c="8"/>jle <text:s text:c="4"/>.L61</text:p>
      <text:p text:style-name="P117"><text:s text:c="8"/>movl <text:s text:c="3"/>$5, %edx</text:p>
      <text:p text:style-name="P117"><text:s text:c="8"/>movl <text:s text:c="3"/>$.LC15, %esi</text:p>
      <text:p text:style-name="P117"><text:s text:c="8"/>movl <text:s text:c="3"/>$_ZSt4cout, %edi</text:p>
      <text:p text:style-name="P117"><text:s text:c="8"/>movq <text:s text:c="3"/>%rax, (%rsp)</text:p>
      <text:p text:style-name="P117"><text:s text:c="8"/>movl <text:s text:c="3"/>%eax, 12(%rsp)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18, %edx</text:p>
      <text:p text:style-name="P117"><text:s text:c="8"/>movl <text:s text:c="3"/>$.LC16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4, %edx</text:p>
      <text:p text:style-name="P117"><text:s text:c="8"/>movl <text:s text:c="3"/>$.LC17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_ZSt4cout, %edi</text:p>
      <text:p text:style-name="P117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7"><text:s text:c="8"/>pxor <text:s text:c="3"/>%xmm1, %xmm1</text:p>
      <text:p text:style-name="P117"><text:s text:c="8"/>cvtsi2sdl <text:s text:c="6"/>(%rsp), %xmm1</text:p>
      <text:p text:style-name="P117"><text:s text:c="8"/>movapd <text:s/>%xmm1, %xmm0</text:p>
      <text:p text:style-name="P117"><text:s text:c="8"/>mulsd <text:s text:c="2"/>.LC18(%rip), %xmm0</text:p>
      <text:p text:style-name="P117"><text:s text:c="8"/>movsd <text:s text:c="2"/>%xmm1, (%rsp)</text:p>
      <text:p text:style-name="P117"><text:s text:c="8"/>cvttsd2sil <text:s text:c="5"/>%xmm0, %edi</text:p>
      <text:p text:style-name="P117"><text:s text:c="8"/>call <text:s text:c="3"/>numberPi(int)</text:p>
      <text:p text:style-name="P117"><text:s text:c="8"/>movl <text:s text:c="3"/>$5, %edx</text:p>
      <text:p text:style-name="P117"><text:s text:c="8"/>movl <text:s text:c="3"/>$.LC15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14, %edx</text:p>
      <text:p text:style-name="P117"><text:s text:c="8"/>movl <text:s text:c="3"/>$.LC19, %esi</text:p>
      <text:p text:style-name="P117"><text:s text:c="8"/>movl <text:s text:c="3"/>$_ZSt4cout, %edi</text:p>
      <text:p text:style-name="P117"><draw:custom-shape text:anchor-type="paragraph" draw:z-index="22" draw:name="Shape 22" draw:style-name="gr22" draw:text-style-name="P112" svg:width="17.283cm" svg:height="25.768cm" svg:x="-0.367cm" svg:y="-0.335cm"><text:p/><draw:enhanced-geometry svg:viewBox="0 0 21600 21600" draw:type="rectangle" draw:enhanced-path="M 0 0 L 21600 0 21600 21600 0 21600 0 0 Z N"/></draw:custom-shape><text:soft-page-break/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4, %edx</text:p>
      <text:p text:style-name="P117"><text:s text:c="8"/>movl <text:s text:c="3"/>$.LC17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_ZSt4cout, %edi</text:p>
      <text:p text:style-name="P117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7"><text:s text:c="8"/>movl <text:s text:c="3"/>12(%rsp), %edi</text:p>
      <text:p text:style-name="P117"><text:s text:c="8"/>call <text:s text:c="3"/>numberPi(int)</text:p>
      <text:p text:style-name="P117"><text:s text:c="8"/>movl <text:s text:c="3"/>$5, %edx</text:p>
      <text:p text:style-name="P117"><text:s text:c="8"/>movl <text:s text:c="3"/>$.LC15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17, %edx</text:p>
      <text:p text:style-name="P117"><text:s text:c="8"/>movl <text:s text:c="3"/>$.LC20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4, %edx</text:p>
      <text:p text:style-name="P117"><text:s text:c="8"/>movl <text:s text:c="3"/>$.LC17, %esi</text:p>
      <text:p text:style-name="P117"><text:s text:c="8"/>movl <text:s text:c="3"/>$_ZSt4cout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_ZSt4cout, %edi</text:p>
      <text:p text:style-name="P117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7"><text:s text:c="8"/>movsd <text:s text:c="2"/>(%rsp), %xmm1</text:p>
      <text:p text:style-name="P117"><text:s text:c="8"/>mulsd <text:s text:c="2"/>.LC21(%rip), %xmm1</text:p>
      <text:p text:style-name="P117"><text:s text:c="8"/>cvttsd2sil <text:s text:c="5"/>%xmm1, %edi</text:p>
      <text:p text:style-name="P117"><text:s text:c="8"/>call <text:s text:c="3"/>numberPi(int)</text:p>
      <text:p text:style-name="P117"><text:s text:c="8"/>xorl <text:s text:c="3"/>%eax, %eax</text:p>
      <text:p text:style-name="P117"><text:s text:c="8"/>jmp <text:s text:c="4"/>.L55</text:p>
      <text:p text:style-name="P117">.L61:</text:p>
      <text:p text:style-name="P117"><text:s text:c="8"/>movl <text:s text:c="3"/>$8, %edx</text:p>
      <text:p text:style-name="P117"><draw:custom-shape text:anchor-type="paragraph" draw:z-index="23" draw:name="Shape 23" draw:style-name="gr23" draw:text-style-name="P112" svg:width="17.283cm" svg:height="19.756cm" svg:x="-0.367cm" svg:y="-0.379cm"><text:p/><draw:enhanced-geometry svg:viewBox="0 0 21600 21600" draw:type="rectangle" draw:enhanced-path="M 0 0 L 21600 0 21600 21600 0 21600 0 0 Z N"/></draw:custom-shape><text:soft-page-break/><text:s text:c="8"/>movl <text:s text:c="3"/>$.LC14, %esi</text:p>
      <text:p text:style-name="P117"><text:s text:c="8"/>movl <text:s text:c="3"/>$_ZSt4cerr, %edi</text:p>
      <text:p text:style-name="P117"><text:s text:c="8"/>call <text:s text:c="3"/>std::basic_ostream&lt;char, std::char_traits&lt;char&gt;&gt;&amp; std::__ostream_insert&lt;char, std::char_traits&lt;char&gt;&gt;(std::basic_ostream&lt;char, std::char_traits&lt;char&gt;&gt;&amp;, char const*, long)</text:p>
      <text:p text:style-name="P117"><text:s text:c="8"/>movl <text:s text:c="3"/>$_ZSt4cerr, %edi</text:p>
      <text:p text:style-name="P117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7"><text:s text:c="8"/>jmp <text:s text:c="4"/>.L57</text:p>
      <text:p text:style-name="P117">.LC2:</text:p>
      <text:p text:style-name="P117"><text:s text:c="8"/>.long <text:s text:c="2"/>0</text:p>
      <text:p text:style-name="P117"><text:s text:c="8"/>.long <text:s text:c="2"/>1072693248</text:p>
      <text:p text:style-name="P117">.LC3:</text:p>
      <text:p text:style-name="P117"><text:s text:c="8"/>.long <text:s text:c="2"/>-2</text:p>
      <text:p text:style-name="P117"><text:s text:c="8"/>.long <text:s text:c="2"/>1072693247</text:p>
      <text:p text:style-name="P117">.LC4:</text:p>
      <text:p text:style-name="P117"><text:s text:c="8"/>.long <text:s text:c="2"/>-4</text:p>
      <text:p text:style-name="P117"><text:s text:c="8"/>.long <text:s text:c="2"/>1072693247</text:p>
      <text:p text:style-name="P117">.LC5:</text:p>
      <text:p text:style-name="P117"><text:s text:c="8"/>.long <text:s text:c="2"/>1333788672</text:p>
      <text:p text:style-name="P117">.LC6:</text:p>
      <text:p text:style-name="P117"><text:s text:c="8"/>.long <text:s text:c="2"/>0</text:p>
      <text:p text:style-name="P117"><text:s text:c="8"/>.long <text:s text:c="2"/>1074790400</text:p>
      <text:p text:style-name="P117">.LC9:</text:p>
      <text:p text:style-name="P117"><text:s text:c="8"/>.long <text:s text:c="2"/>-400107883</text:p>
      <text:p text:style-name="P117"><text:s text:c="8"/>.long <text:s text:c="2"/>1041313291</text:p>
      <text:p text:style-name="P117">.LC18:</text:p>
      <text:p text:style-name="P117"><text:s text:c="8"/>.long <text:s text:c="2"/>0</text:p>
      <text:p text:style-name="P117"><text:s text:c="8"/>.long <text:s text:c="2"/>1071644672</text:p>
      <text:p text:style-name="P117">.LC21:</text:p>
      <text:p text:style-name="P117"><text:s text:c="8"/>.long <text:s text:c="2"/>0</text:p>
      <text:p text:style-name="P117"><text:s text:c="8"/>.long <text:s text:c="2"/>1073217536</text:p>
      <text:p text:style-name="P119"/>
      <text:p text:style-name="P120"/>
      <text:p text:style-name="P120"/>
      <text:p text:style-name="P121"/>
      <text:p text:style-name="P119"/>
      <text:h text:style-name="P109" text:outline-level="1"><text:bookmark-start text:name="__RefHeading___Toc18443925 Copy 2"/>Приложение№<text:span text:style-name="T35">3</text:span><text:bookmark-end text:name="__RefHeading___Toc18443925 Copy 2"/></text:h>
      <text:h text:style-name="P110" text:outline-level="1"><text:bookmark-start text:name="__RefHeading___Toc20590_323823121"/><text:span text:style-name="T12">Листинг</text:span><text:span text:style-name="T40"> </text:span><text:span text:style-name="T12">компиляции программы уровня -O0 на архитектуре x86</text:span><text:bookmark-end text:name="__RefHeading___Toc20590_323823121"/></text:h>
      <text:p text:style-name="P120"><draw:custom-shape text:anchor-type="paragraph" draw:z-index="24" draw:name="Shape 24" draw:style-name="gr24" draw:text-style-name="P112" svg:width="17.283cm" svg:height="23.085cm" svg:x="-0.367cm" svg:y="0.415cm"><text:p/><draw:enhanced-geometry svg:viewBox="0 0 21600 21600" draw:type="rectangle" draw:enhanced-path="M 0 0 L 21600 0 21600 21600 0 21600 0 0 Z N"/></draw:custom-shape><text:span text:style-name="T12"/></text:p>
      <text:p text:style-name="P122">#Генерация случайных чисел</text:p>
      <text:p text:style-name="P119"/>
      <text:p text:style-name="P119">.LC1:</text:p>
      <text:p text:style-name="P119"><text:s text:c="8"/>.string "default" <text:span text:style-name="T41">#</text:span><text:span text:style-name="T42">= "используй лучший доступный источник случайных чисел в данной системе"</text:span></text:p>
      <text:p text:style-name="P119"><text:s text:c="8"/>.set <text:s text:c="3"/>std::random_device::random_device() [complete object constructor],_ZNSt13random_deviceC2Ev</text:p>
      <text:p text:style-name="P119"><text:s text:c="8"/>.set <text:s text:c="3"/>std::random_device::~random_device() [complete object destructor],_ZNSt13random_deviceD2Ev</text:p>
      <text:p text:style-name="P119">.LC5:</text:p>
      <text:p text:style-name="P119"><text:s text:c="8"/>.string "Number Pi: "</text:p>
      <text:p text:style-name="P119">.LC6:</text:p>
      <text:p text:style-name="P119"><text:s text:c="8"/>.string "Time taken:"</text:p>
      <text:p text:style-name="P119">.LC8:</text:p>
      <text:p text:style-name="P119"><text:s text:c="8"/>.string "sec."</text:p>
      <text:p text:style-name="P119"/>
      <text:p text:style-name="P123">#Функция Пи методом Монте-Карло</text:p>
      <text:p text:style-name="P119">numberPi(int):</text:p>
      <text:p text:style-name="P119"><text:s text:c="8"/>pushl <text:s text:c="2"/>%ebp</text:p>
      <text:p text:style-name="P119"><text:s text:c="8"/>movl <text:s text:c="3"/>%esp, %ebp</text:p>
      <text:p text:style-name="P119"><text:s text:c="8"/>pushl <text:s text:c="2"/>%ebx <text:span text:style-name="T43">#для random_device</text:span></text:p>
      <text:p text:style-name="P119"><text:s text:c="8"/>subl <text:s text:c="3"/>$2596, %esp <text:span text:style-name="T43">#для лок.перем.</text:span></text:p>
      <text:p text:style-name="P124">#Замер времени</text:p>
      <text:p text:style-name="P119"><text:s text:c="8"/>subl <text:s text:c="3"/>$8, %esp</text:p>
      <text:p text:style-name="P119"><text:s text:c="8"/>leal <text:s text:c="3"/>-48(%ebp), %eax</text:p>
      <text:p text:style-name="P119"><text:s text:c="8"/>pushl <text:s text:c="2"/>%eax</text:p>
      <text:p text:style-name="P119"><text:s text:c="8"/>pushl <text:s text:c="2"/>$4</text:p>
      <text:p text:style-name="P119"><text:s text:c="8"/>call <text:s text:c="3"/>clock_gettime</text:p>
      <text:p text:style-name="P119"><text:s text:c="8"/>addl <text:s text:c="3"/>$16, %esp</text:p>
      <text:p text:style-name="P119"><text:s text:c="8"/>movl <text:s text:c="3"/>$0, -12(%ebp) <text:span text:style-name="T44">#m-точки внутри круга</text:span></text:p>
      <text:p text:style-name="P125">#генерация случайных чисел</text:p>
      <text:p text:style-name="P119"><text:s text:c="8"/>subl <text:s text:c="3"/>$12, %esp </text:p>
      <text:p text:style-name="P119"><text:s text:c="8"/>leal <text:s text:c="3"/>-2556(%ebp), %eax</text:p>
      <text:p text:style-name="P119"><text:s text:c="8"/>pushl <text:s text:c="2"/>%eax</text:p>
      <text:p text:style-name="P119"><text:s text:c="8"/>call <text:s text:c="3"/>std::random_device::random_device() [complete object constructor]</text:p>
      <text:p text:style-name="P119"><text:s text:c="8"/>addl <text:s text:c="3"/>$16, %esp</text:p>
      <text:p text:style-name="P119"><text:s text:c="8"/>subl <text:s text:c="3"/>$12, %esp <text:span text:style-name="T45">#начало для </text:span><text:span text:style-name="T46">uniform_real_distribution(-1.0, 1.0)</text:span></text:p>
      <text:p text:style-name="P119"><text:s text:c="8"/>fld1</text:p>
      <text:p text:style-name="P119"><text:s text:c="8"/>leal <text:s text:c="3"/>-8(%esp), %esp</text:p>
      <text:p text:style-name="P119"><draw:custom-shape text:anchor-type="paragraph" draw:z-index="25" draw:name="Shape 25" draw:style-name="gr25" draw:text-style-name="P112" svg:width="17.283cm" svg:height="26.246cm" svg:x="-0.367cm" svg:y="-0.291cm"><text:p/><draw:enhanced-geometry svg:viewBox="0 0 21600 21600" draw:type="rectangle" draw:enhanced-path="M 0 0 L 21600 0 21600 21600 0 21600 0 0 Z N"/></draw:custom-shape><text:soft-page-break/><text:s text:c="8"/>fstpl <text:s text:c="2"/>(%esp)</text:p>
      <text:p text:style-name="P119"><text:s text:c="8"/>fld1</text:p>
      <text:p text:style-name="P119"><text:s text:c="8"/>fchs</text:p>
      <text:p text:style-name="P119"><text:s text:c="8"/>leal <text:s text:c="3"/>-8(%esp), %esp</text:p>
      <text:p text:style-name="P119"><text:s text:c="8"/>fstpl <text:s text:c="2"/>(%esp)</text:p>
      <text:p text:style-name="P119"><text:s text:c="8"/>leal <text:s text:c="3"/>-2572(%ebp), %eax</text:p>
      <text:p text:style-name="P119"><text:s text:c="8"/>pushl <text:s text:c="2"/>%eax</text:p>
      <text:p text:style-name="P119"><text:s text:c="8"/>call <text:s text:c="3"/>std::uniform_real_distribution&lt;double&gt;::uniform_real_distribution(double, double) [complete object constructor]</text:p>
      <text:p text:style-name="P119"><text:s text:c="8"/>addl <text:s text:c="3"/>$32, %esp</text:p>
      <text:p text:style-name="P119"><text:s text:c="8"/>movl <text:s text:c="3"/>$0, -16(%ebp) <text:span text:style-name="T44">#i = 0</text:span></text:p>
      <text:p text:style-name="P119"><text:s text:c="8"/>jmp <text:s text:c="4"/>.L25</text:p>
      <text:p text:style-name="P126"/>
      <text:p text:style-name="P123">#Основной цикл <text:span text:style-name="T47">(Монте-Карло)</text:span></text:p>
      <text:p text:style-name="P119">.L28:</text:p>
      <text:p text:style-name="P127"><text:span text:style-name="T48">#</text:span><text:span text:style-name="T49">Генерация случайной координаты x</text:span></text:p>
      <text:p text:style-name="P119"><text:s text:c="8"/>subl <text:s text:c="3"/>$8, %esp</text:p>
      <text:p text:style-name="P119"><text:s text:c="8"/>leal <text:s text:c="3"/>-2556(%ebp), %eax</text:p>
      <text:p text:style-name="P119"><text:s text:c="8"/>pushl <text:s text:c="2"/>%eax</text:p>
      <text:p text:style-name="P119"><text:s text:c="8"/>leal <text:s text:c="3"/>-2572(%ebp), %eax</text:p>
      <text:p text:style-name="P119"><text:s text:c="8"/>pushl <text:s text:c="2"/>%eax</text:p>
      <text:p text:style-name="P119"><text:s text:c="8"/>call <text:s text:c="3"/>double std::uniform_real_distribution&lt;double&gt;::operator()&lt;std::random_device&gt;(std::random_device&amp;)</text:p>
      <text:p text:style-name="P119"><text:s text:c="8"/>addl <text:s text:c="3"/>$16, %esp</text:p>
      <text:p text:style-name="P119"><text:s text:c="8"/>fstpl <text:s text:c="2"/>-32(%ebp)</text:p>
      <text:p text:style-name="P119"/>
      <text:p text:style-name="P128"><text:span text:style-name="T48">#</text:span><text:span text:style-name="T49">Генерация случайной координаты </text:span><text:span text:style-name="T48">y</text:span></text:p>
      <text:p text:style-name="P119"><text:s text:c="8"/>subl <text:s text:c="3"/>$8, %esp</text:p>
      <text:p text:style-name="P119"><text:s text:c="8"/>leal <text:s text:c="3"/>-2556(%ebp), %eax</text:p>
      <text:p text:style-name="P119"><text:s text:c="8"/>pushl <text:s text:c="2"/>%eax</text:p>
      <text:p text:style-name="P119"><text:s text:c="8"/>leal <text:s text:c="3"/>-2572(%ebp), %eax</text:p>
      <text:p text:style-name="P119"><text:s text:c="8"/>pushl <text:s text:c="2"/>%eax</text:p>
      <text:p text:style-name="P119"><text:s text:c="8"/>call <text:s text:c="3"/>double std::uniform_real_distribution&lt;double&gt;::operator()&lt;std::random_device&gt;(std::random_device&amp;)</text:p>
      <text:p text:style-name="P119"><text:s text:c="8"/>addl <text:s text:c="3"/>$16, %esp</text:p>
      <text:p text:style-name="P119"><text:s text:c="8"/>fstpl <text:s text:c="2"/>-40(%ebp)</text:p>
      <text:p text:style-name="P119"/>
      <text:p text:style-name="P127"><text:span text:style-name="T48">#</text:span><text:span text:style-name="T49">Вычисление x² + y²</text:span></text:p>
      <text:p text:style-name="P119"><text:s text:c="8"/>fldl <text:s text:c="3"/>-32(%ebp)</text:p>
      <text:p text:style-name="P119"><text:s text:c="8"/>fld <text:s text:c="4"/>%st(0)</text:p>
      <text:p text:style-name="P119"><text:s text:c="8"/>fmulp <text:s text:c="2"/>%st, %st(1)</text:p>
      <text:p text:style-name="P119"><text:s text:c="8"/>fldl <text:s text:c="3"/>-40(%ebp)</text:p>
      <text:p text:style-name="P119"><draw:custom-shape text:anchor-type="paragraph" draw:z-index="26" draw:name="Shape 26" draw:style-name="gr26" draw:text-style-name="P112" svg:width="17.283cm" svg:height="25.884cm" svg:x="-0.367cm" svg:y="-0.286cm"><text:p/><draw:enhanced-geometry svg:viewBox="0 0 21600 21600" draw:type="rectangle" draw:enhanced-path="M 0 0 L 21600 0 21600 21600 0 21600 0 0 Z N"/></draw:custom-shape><text:soft-page-break/><text:s text:c="8"/>fmul <text:s text:c="3"/>%st(0), %st</text:p>
      <text:p text:style-name="P119"><text:s text:c="8"/>faddp <text:s text:c="2"/>%st, %st(1)</text:p>
      <text:p text:style-name="P119"/>
      <text:p text:style-name="P127"><text:span text:style-name="T48">#</text:span><text:span text:style-name="T49">Проверка попадания в круг (x² + y² &lt;= 1)</text:span></text:p>
      <text:p text:style-name="P119"><text:s text:c="8"/>fld1</text:p>
      <text:p text:style-name="P119"><text:s text:c="8"/>fcomip <text:s/>%st(1), %st</text:p>
      <text:p text:style-name="P119"><text:s text:c="8"/>fstp <text:s text:c="3"/>%st(0)</text:p>
      <text:p text:style-name="P119"><text:s text:c="8"/>jb <text:s text:c="5"/>.L26</text:p>
      <text:p text:style-name="P119"><text:s text:c="8"/>addl <text:s text:c="3"/>$1, -12(%ebp)</text:p>
      <text:p text:style-name="P119">.L26:</text:p>
      <text:p text:style-name="P119"><text:s text:c="8"/>addl <text:s text:c="3"/>$1, -16(%ebp)</text:p>
      <text:p text:style-name="P119">.L25:</text:p>
      <text:p text:style-name="P119"><text:s text:c="8"/>movl <text:s text:c="3"/>-16(%ebp), %eax</text:p>
      <text:p text:style-name="P119"><text:s text:c="8"/>cmpl <text:s text:c="3"/>8(%ebp), %eax</text:p>
      <text:p text:style-name="P119"><text:s text:c="8"/>jl <text:s text:c="5"/>.L28</text:p>
      <text:p text:style-name="P119"/>
      <text:p text:style-name="P129">#Вычисление Пи</text:p>
      <text:p text:style-name="P119"><text:s text:c="8"/>fildl <text:s text:c="2"/>-12(%ebp)</text:p>
      <text:p text:style-name="P119"><text:s text:c="8"/>fldl <text:s text:c="3"/>.LC4</text:p>
      <text:p text:style-name="P119"><text:s text:c="8"/>fmulp <text:s text:c="2"/>%st, %st(1)</text:p>
      <text:p text:style-name="P119"><text:s text:c="8"/>fildl <text:s text:c="2"/>8(%ebp)</text:p>
      <text:p text:style-name="P119"><text:s text:c="8"/>fdivrp <text:s/>%st, %st(1)</text:p>
      <text:p text:style-name="P119"><text:s text:c="8"/>fstpl <text:s text:c="2"/>-24(%ebp)</text:p>
      <text:p text:style-name="P119"/>
      <text:p text:style-name="P130"><text:span text:style-name="T50">#</text:span><text:span text:style-name="T49">Вывод "Number Pi:</text:span></text:p>
      <text:p text:style-name="P119"><text:s text:c="8"/>subl <text:s text:c="3"/>$8, %esp</text:p>
      <text:p text:style-name="P119"><text:s text:c="8"/>pushl <text:s text:c="2"/>$.LC5</text:p>
      <text:p text:style-name="P119"><text:s text:c="8"/>pushl <text:s text:c="2"/>$_ZSt4cout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/>
      <text:p text:style-name="P131"><text:span text:style-name="T51">#</text:span><text:span text:style-name="T49">Вывод вычисленного значения Пи</text:span></text:p>
      <text:p text:style-name="P132"><text:s text:c="8"/>subl <text:s text:c="3"/>$4, %esp</text:p>
      <text:p text:style-name="P119"><text:s text:c="8"/>pushl <text:s text:c="2"/>-20(%ebp)</text:p>
      <text:p text:style-name="P119"><text:s text:c="8"/>pushl <text:s text:c="2"/>-24(%ebp)</text:p>
      <text:p text:style-name="P119"><text:s text:c="8"/>pushl <text:s text:c="2"/>%eax</text:p>
      <text:p text:style-name="P119"><text:s text:c="8"/>call <text:s text:c="3"/>std::ostream::operator&lt;&lt;(double)</text:p>
      <text:p text:style-name="P119"><text:s text:c="8"/>addl <text:s text:c="3"/>$16, %esp</text:p>
      <text:p text:style-name="P119"/>
      <text:p text:style-name="P133"><text:span text:style-name="T52">#</text:span><text:span text:style-name="T53">Перевод строки</text:span>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draw:custom-shape text:anchor-type="paragraph" draw:z-index="27" draw:name="Shape 27" draw:style-name="gr27" draw:text-style-name="P112" svg:width="17.283cm" svg:height="26.018cm" svg:x="-0.367cm" svg:y="-0.161cm"><text:p/><draw:enhanced-geometry svg:viewBox="0 0 21600 21600" draw:type="rectangle" draw:enhanced-path="M 0 0 L 21600 0 21600 21600 0 21600 0 0 Z N"/></draw:custom-shape><text:soft-page-break/><text:s text:c="8"/>call <text:s text:c="3"/>std::ostream::operator&lt;&lt;(std::ostream&amp; (*)(std::ostream&amp;))</text:p>
      <text:p text:style-name="P119"><text:s text:c="8"/>addl <text:s text:c="3"/>$16, %esp</text:p>
      <text:p text:style-name="P119"/>
      <text:p text:style-name="P134">#Получение конечного времени</text:p>
      <text:p text:style-name="P119"><text:s text:c="8"/>subl <text:s text:c="3"/>$8, %esp</text:p>
      <text:p text:style-name="P119"><text:s text:c="8"/>leal <text:s text:c="3"/>-56(%ebp), %eax</text:p>
      <text:p text:style-name="P119"><text:s text:c="8"/>pushl <text:s text:c="2"/>%eax</text:p>
      <text:p text:style-name="P119"><text:s text:c="8"/>pushl <text:s text:c="2"/>$4 <text:s/><text:span text:style-name="T54">#</text:span><text:span text:style-name="T55">CLOCK_MONOTONIC</text:span></text:p>
      <text:p text:style-name="P119"><text:s text:c="8"/>call <text:s text:c="3"/>clock_gettime</text:p>
      <text:p text:style-name="P119"><text:s text:c="8"/>addl <text:s text:c="3"/>$16, %esp</text:p>
      <text:p text:style-name="P119"/>
      <text:p text:style-name="P135">#Вывод "Time taken:"</text:p>
      <text:p text:style-name="P132"><text:s text:c="8"/>subl <text:s text:c="3"/>$8, %esp</text:p>
      <text:p text:style-name="P119"><text:s text:c="8"/>pushl <text:s text:c="2"/>$.LC6</text:p>
      <text:p text:style-name="P119"><text:s text:c="8"/>pushl <text:s text:c="2"/>$_ZSt4cout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 <text:span text:style-name="T56">#&lt;&lt; то есть вывод С-строк в поток</text:span></text:p>
      <text:p text:style-name="P119"><text:s text:c="8"/>addl <text:s text:c="3"/>$16, %esp</text:p>
      <text:p text:style-name="P119"/>
      <text:p text:style-name="P127"><text:span text:style-name="T50">#</text:span><text:span text:style-name="T49">Вычисление затраченного времени в секундах</text:span></text:p>
      <text:p text:style-name="P119"><text:s text:c="8"/>movl <text:s text:c="3"/>-56(%ebp), %ecx</text:p>
      <text:p text:style-name="P119"><text:s text:c="8"/>movl <text:s text:c="3"/>-48(%ebp), %edx</text:p>
      <text:p text:style-name="P119"><text:s text:c="8"/>subl <text:s text:c="3"/>%edx, %ecx</text:p>
      <text:p text:style-name="P119"><text:s text:c="8"/>movl <text:s text:c="3"/>%ecx, -2592(%ebp)</text:p>
      <text:p text:style-name="P119"><text:s text:c="8"/>fildl <text:s text:c="2"/>-2592(%ebp)</text:p>
      <text:p text:style-name="P119"><text:s text:c="8"/>movl <text:s text:c="3"/>-52(%ebp), %ecx</text:p>
      <text:p text:style-name="P119"><text:s text:c="8"/>movl <text:s text:c="3"/>-44(%ebp), %edx</text:p>
      <text:p text:style-name="P119"><text:s text:c="8"/>subl <text:s text:c="3"/>%edx, %ecx</text:p>
      <text:p text:style-name="P119"><text:s text:c="8"/>movl <text:s text:c="3"/>%ecx, -2592(%ebp)</text:p>
      <text:p text:style-name="P119"><text:s text:c="8"/>fildl <text:s text:c="2"/>-2592(%ebp)</text:p>
      <text:p text:style-name="P119"><text:s text:c="8"/>fldl <text:s text:c="3"/>.LC7</text:p>
      <text:p text:style-name="P119"><text:s text:c="8"/>fmulp <text:s text:c="2"/>%st, %st(1)</text:p>
      <text:p text:style-name="P119"><text:s text:c="8"/>faddp <text:s text:c="2"/>%st, %st(1)</text:p>
      <text:p text:style-name="P119"/>
      <text:p text:style-name="P127"><text:span text:style-name="T50">#</text:span><text:span text:style-name="T49">Вывод времени выполнения</text:span></text:p>
      <text:p text:style-name="P119"><text:s text:c="8"/>subl <text:s text:c="3"/>$4, %esp</text:p>
      <text:p text:style-name="P119"><text:s text:c="8"/>leal <text:s text:c="3"/>-8(%esp), %esp</text:p>
      <text:p text:style-name="P119"><text:s text:c="8"/>fstpl <text:s text:c="2"/>(%esp)</text:p>
      <text:p text:style-name="P119"><text:s text:c="8"/>pushl <text:s text:c="2"/>%eax</text:p>
      <text:p text:style-name="P119"><text:s text:c="8"/>call <text:s text:c="3"/>std::ostream::operator&lt;&lt;(double)</text:p>
      <text:p text:style-name="P119"><text:s text:c="8"/>addl <text:s text:c="3"/>$16, %esp</text:p>
      <text:p text:style-name="P119"/>
      <text:p text:style-name="P127"><text:span text:style-name="T50">#</text:span><text:span text:style-name="T49">Вывод "sec."</text:span></text:p>
      <text:p text:style-name="P119"><text:s text:c="8"/>subl <text:s text:c="3"/>$8, %esp</text:p>
      <text:p text:style-name="P119"><draw:custom-shape text:anchor-type="paragraph" draw:z-index="28" draw:name="Shape 28" draw:style-name="gr28" draw:text-style-name="P112" svg:width="17.283cm" svg:height="26.524cm" svg:x="-0.367cm" svg:y="-0.12cm"><text:p/><draw:enhanced-geometry svg:viewBox="0 0 21600 21600" draw:type="rectangle" draw:enhanced-path="M 0 0 L 21600 0 21600 21600 0 21600 0 0 Z N"/></draw:custom-shape><text:soft-page-break/><text:s text:c="8"/>pushl <text:s text:c="2"/>$.LC8</text:p>
      <text:p text:style-name="P119"><text:s text:c="8"/>pushl <text:s text:c="2"/>%eax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/>
      <text:p text:style-name="P127"><text:span text:style-name="T50">#</text:span><text:span text:style-name="T49">Перевод строки</text:span>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text:s text:c="8"/>call <text:s text:c="3"/>std::ostream::operator&lt;&lt;(std::ostream&amp; (*)(std::ostream&amp;))</text:p>
      <text:p text:style-name="P119"><text:s text:c="8"/>addl <text:s text:c="3"/>$16, %esp</text:p>
      <text:p text:style-name="P119"><text:s text:c="8"/>fldz</text:p>
      <text:p text:style-name="P119"><text:s text:c="8"/>fstpl <text:s text:c="2"/>-2592(%ebp)</text:p>
      <text:p text:style-name="P119"/>
      <text:p text:style-name="P127"><text:span text:style-name="T50">#</text:span><text:span text:style-name="T49">Уничтожение random_device</text:span></text:p>
      <text:p text:style-name="P119"><text:s text:c="8"/>subl <text:s text:c="3"/>$12, %esp</text:p>
      <text:p text:style-name="P119"><text:s text:c="8"/>leal <text:s text:c="3"/>-2556(%ebp), %eax</text:p>
      <text:p text:style-name="P119"><text:s text:c="8"/>pushl <text:s text:c="2"/>%eax</text:p>
      <text:p text:style-name="P119"><text:s text:c="8"/>call <text:s text:c="3"/>std::random_device::~random_device() [complete object destructor]</text:p>
      <text:p text:style-name="P119"><text:s text:c="8"/>addl <text:s text:c="3"/>$16, %esp</text:p>
      <text:p text:style-name="P119"><text:s text:c="8"/>fldl <text:s text:c="3"/>-2592(%ebp)</text:p>
      <text:p text:style-name="P119"><text:s text:c="8"/>jmp <text:s text:c="4"/>.L33</text:p>
      <text:p text:style-name="P119"><text:s text:c="8"/>movl <text:s text:c="3"/>%eax, %ebx</text:p>
      <text:p text:style-name="P119"><text:s text:c="8"/>subl <text:s text:c="3"/>$12, %esp</text:p>
      <text:p text:style-name="P119"><text:s text:c="8"/>leal <text:s text:c="3"/>-2556(%ebp), %eax</text:p>
      <text:p text:style-name="P119"><text:s text:c="8"/>pushl <text:s text:c="2"/>%eax</text:p>
      <text:p text:style-name="P119"><text:s text:c="8"/>call <text:s text:c="3"/>std::random_device::~random_device() [complete object destructor]</text:p>
      <text:p text:style-name="P119"><text:s text:c="8"/>addl <text:s text:c="3"/>$16, %esp</text:p>
      <text:p text:style-name="P119"><text:s text:c="8"/>movl <text:s text:c="3"/>%ebx, %eax</text:p>
      <text:p text:style-name="P119"><text:s text:c="8"/>subl <text:s text:c="3"/>$12, %esp</text:p>
      <text:p text:style-name="P119"><text:s text:c="8"/>pushl <text:s text:c="2"/>%eax</text:p>
      <text:p text:style-name="P119"><text:s text:c="8"/>call <text:s text:c="3"/>_Unwind_Resume</text:p>
      <text:p text:style-name="P119"/>
      <text:p text:style-name="P119">.L33:</text:p>
      <text:p text:style-name="P119"><text:s text:c="8"/>movl <text:s text:c="3"/>-4(%ebp), %ebx</text:p>
      <text:p text:style-name="P119"><text:s text:c="8"/>leave</text:p>
      <text:p text:style-name="P119"><text:s text:c="8"/>ret</text:p>
      <text:p text:style-name="P119"/>
      <text:p text:style-name="P136">#Для Main</text:p>
      <text:p text:style-name="P119">.LC10:</text:p>
      <text:p text:style-name="P119"><text:s text:c="8"/>.string "Error!"</text:p>
      <text:p text:style-name="P119">.LC11:</text:p>
      <text:p text:style-name="P119"><text:s text:c="8"/>.string "N &gt;0 !!!"</text:p>
      <text:p text:style-name="P119"><draw:custom-shape text:anchor-type="paragraph" draw:z-index="29" draw:name="Shape 29" draw:style-name="gr29" draw:text-style-name="P112" svg:width="17.283cm" svg:height="26.36cm" svg:x="-0.367cm" svg:y="-0.215cm"><text:p/><draw:enhanced-geometry svg:viewBox="0 0 21600 21600" draw:type="rectangle" draw:enhanced-path="M 0 0 L 21600 0 21600 21600 0 21600 0 0 Z N"/></draw:custom-shape><text:soft-page-break/>.LC12:</text:p>
      <text:p text:style-name="P119"><text:s text:c="8"/>.string "\033[32m"</text:p>
      <text:p text:style-name="P119">.LC13:</text:p>
      <text:p text:style-name="P119"><text:s text:c="8"/>.string "----- 0.5*N ----- "</text:p>
      <text:p text:style-name="P119">.LC14:</text:p>
      <text:p text:style-name="P119"><text:s text:c="8"/>.string "\033[0m"</text:p>
      <text:p text:style-name="P119">.LC16:</text:p>
      <text:p text:style-name="P119"><text:s text:c="8"/>.string "-------N -----"</text:p>
      <text:p text:style-name="P119">.LC17:</text:p>
      <text:p text:style-name="P119"><text:s text:c="8"/>.base64 "LS0tLSAxLjUqTiDigJQtLS0A"</text:p>
      <text:p text:style-name="P119"/>
      <text:p text:style-name="P136">#Функция main</text:p>
      <text:p text:style-name="P119">main:</text:p>
      <text:p text:style-name="P119"><text:s text:c="8"/>leal <text:s text:c="3"/>4(%esp), %ecx</text:p>
      <text:p text:style-name="P119"><text:s text:c="8"/>andl <text:s text:c="3"/>$-16, %esp</text:p>
      <text:p text:style-name="P119"><text:s text:c="8"/>pushl <text:s text:c="2"/>-4(%ecx)</text:p>
      <text:p text:style-name="P119"><text:s text:c="8"/>pushl <text:s text:c="2"/>%ebp</text:p>
      <text:p text:style-name="P119"><text:s text:c="8"/>movl <text:s text:c="3"/>%esp, %ebp</text:p>
      <text:p text:style-name="P119"><text:s text:c="8"/>pushl <text:s text:c="2"/>%ecx</text:p>
      <text:p text:style-name="P119"><text:s text:c="8"/>subl <text:s text:c="3"/>$36, %esp</text:p>
      <text:p text:style-name="P119"><text:s text:c="8"/>movl <text:s text:c="3"/>%ecx, %eax</text:p>
      <text:p text:style-name="P119"><text:s text:c="8"/>cmpl <text:s text:c="3"/>$2, (%eax)</text:p>
      <text:p text:style-name="P119"><text:s text:c="8"/>je <text:s text:c="5"/>.L35</text:p>
      <text:p text:style-name="P119"/>
      <text:p text:style-name="P127"><text:span text:style-name="T57">#</text:span><text:span text:style-name="T49">Ошибка: неверное количество аргументов</text:span></text:p>
      <text:p text:style-name="P119"><text:s text:c="8"/>subl <text:s text:c="3"/>$8, %esp</text:p>
      <text:p text:style-name="P119"><text:s text:c="8"/>pushl <text:s text:c="2"/>$.LC10</text:p>
      <text:p text:style-name="P119"><text:s text:c="8"/>pushl <text:s text:c="2"/>$_ZSt4cerr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text:s text:c="8"/>call <text:s text:c="3"/>std::ostream::operator&lt;&lt;(std::ostream&amp; (*)(std::ostream&amp;))</text:p>
      <text:p text:style-name="P119"><text:s text:c="8"/>addl <text:s text:c="3"/>$16, %esp</text:p>
      <text:p text:style-name="P119"><text:s text:c="8"/>movl <text:s text:c="3"/>$1, %eax</text:p>
      <text:p text:style-name="P119"><text:s text:c="8"/>jmp <text:s text:c="4"/>.L36</text:p>
      <text:p text:style-name="P137"/>
      <text:p text:style-name="P127"><text:span text:style-name="T57">#</text:span><text:span text:style-name="T49">Получение аргумента командной строки</text:span></text:p>
      <text:p text:style-name="P119">.L35:</text:p>
      <text:p text:style-name="P119"><text:s text:c="8"/>movl <text:s text:c="3"/>4(%eax), %eax</text:p>
      <text:p text:style-name="P119"><text:s text:c="8"/>addl <text:s text:c="3"/>$4, %eax</text:p>
      <text:p text:style-name="P119"><text:s text:c="8"/>movl <text:s text:c="3"/>(%eax), %eax</text:p>
      <text:p text:style-name="P119"><draw:custom-shape text:anchor-type="paragraph" draw:z-index="30" draw:name="Shape 30" draw:style-name="gr30" draw:text-style-name="P112" svg:width="17.283cm" svg:height="26.124cm" svg:x="-0.367cm" svg:y="-0.157cm"><text:p/><draw:enhanced-geometry svg:viewBox="0 0 21600 21600" draw:type="rectangle" draw:enhanced-path="M 0 0 L 21600 0 21600 21600 0 21600 0 0 Z N"/></draw:custom-shape><text:soft-page-break/><text:s text:c="8"/>subl <text:s text:c="3"/>$12, %esp</text:p>
      <text:p text:style-name="P119"><text:s text:c="8"/>pushl <text:s text:c="2"/>%eax</text:p>
      <text:p text:style-name="P119"><text:s text:c="8"/>call <text:s text:c="3"/>atoi</text:p>
      <text:p text:style-name="P119"><text:s text:c="8"/>addl <text:s text:c="3"/>$16, %esp</text:p>
      <text:p text:style-name="P119"><text:s text:c="8"/>movl <text:s text:c="3"/>%eax, -12(%ebp)</text:p>
      <text:p text:style-name="P119"><text:s text:c="8"/>cmpl <text:s text:c="3"/>$0, -12(%ebp)</text:p>
      <text:p text:style-name="P119"><text:s text:c="8"/>jg <text:s text:c="5"/>.L37</text:p>
      <text:p text:style-name="P119"/>
      <text:p text:style-name="P127"><text:span text:style-name="T57">#</text:span><text:span text:style-name="T49">Ошибка: N &lt;</text:span><text:span text:style-name="T58">=0</text:span></text:p>
      <text:p text:style-name="P119"><text:s text:c="8"/>subl <text:s text:c="3"/>$8, %esp</text:p>
      <text:p text:style-name="P119"><text:s text:c="8"/>pushl <text:s text:c="2"/>$.LC11</text:p>
      <text:p text:style-name="P119"><text:s text:c="8"/>pushl <text:s text:c="2"/>$_ZSt4cerr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text:s text:c="8"/>call <text:s text:c="3"/>std::ostream::operator&lt;&lt;(std::ostream&amp; (*)(std::ostream&amp;))</text:p>
      <text:p text:style-name="P119"><text:s text:c="8"/>addl <text:s text:c="3"/>$16, %esp</text:p>
      <text:p text:style-name="P119"><text:s text:c="8"/>movl <text:s text:c="3"/>$1, %eax</text:p>
      <text:p text:style-name="P119"><text:s text:c="8"/>jmp <text:s text:c="4"/>.L36</text:p>
      <text:p text:style-name="P119"/>
      <text:p text:style-name="P127"><text:span text:style-name="T58">#</text:span><text:span text:style-name="T49">Вывод заголовка для 0.5*N (зеленым цветом)</text:span></text:p>
      <text:p text:style-name="P119">.L37:</text:p>
      <text:p text:style-name="P119"><text:s text:c="8"/>subl <text:s text:c="3"/>$8, %esp</text:p>
      <text:p text:style-name="P119"><text:s text:c="8"/>pushl <text:s text:c="2"/>$.LC12 <text:s/><text:span text:style-name="T59"># зеленый цвет</text:span></text:p>
      <text:p text:style-name="P119"><text:s text:c="8"/>pushl <text:s text:c="2"/>$_ZSt4cout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.LC13 <text:span text:style-name="T59">#</text:span><text:span text:style-name="T60"> </text:span><text:span text:style-name="T55">"----- 0.5*N ----- "</text:span></text:p>
      <text:p text:style-name="P119"><text:s text:c="8"/>pushl <text:s text:c="2"/>%eax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.LC14 <text:span text:style-name="T59">#</text:span><text:span text:style-name="T55">Сброс цвета</text:span></text:p>
      <text:p text:style-name="P119"><text:s text:c="8"/>pushl <text:s text:c="2"/>%eax</text:p>
      <text:p text:style-name="P119"><draw:custom-shape text:anchor-type="paragraph" draw:z-index="31" draw:name="Shape 31" draw:style-name="gr31" draw:text-style-name="P112" svg:width="17.283cm" svg:height="26.239cm" svg:x="-0.404cm" svg:y="-0.169cm"><text:p/><draw:enhanced-geometry svg:viewBox="0 0 21600 21600" draw:type="rectangle" draw:enhanced-path="M 0 0 L 21600 0 21600 21600 0 21600 0 0 Z N"/></draw:custom-shape><text:soft-page-break/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text:s text:c="8"/>call <text:s text:c="3"/>std::ostream::operator&lt;&lt;(std::ostream&amp; (*)(std::ostream&amp;))</text:p>
      <text:p text:style-name="P119"><text:s text:c="8"/>addl <text:s text:c="3"/>$16, %esp</text:p>
      <text:p text:style-name="P119"/>
      <text:p text:style-name="P127"><text:span text:style-name="T58">#</text:span><text:span text:style-name="T49">Вычисление 0.5 * N</text:span></text:p>
      <text:p text:style-name="P119"><text:s text:c="8"/>fildl <text:s text:c="2"/>-12(%ebp)</text:p>
      <text:p text:style-name="P119"><text:s text:c="8"/>fldl <text:s text:c="3"/>.LC15</text:p>
      <text:p text:style-name="P119"><text:s text:c="8"/>fmulp <text:s text:c="2"/>%st, %st(1)</text:p>
      <text:p text:style-name="P119"><text:s text:c="8"/>fstpl <text:s text:c="2"/>-32(%ebp)</text:p>
      <text:p text:style-name="P119"><text:s text:c="8"/>cvttsd2sil <text:s text:c="5"/>-32(%ebp), %eax</text:p>
      <text:p text:style-name="P119"/>
      <text:p text:style-name="P127"><text:span text:style-name="T58">#</text:span><text:span text:style-name="T49">Вызов numberPi с 0.5*N</text:span></text:p>
      <text:p text:style-name="P119"><text:s text:c="8"/>subl <text:s text:c="3"/>$12, %esp</text:p>
      <text:p text:style-name="P119"><text:s text:c="8"/>pushl <text:s text:c="2"/>%eax</text:p>
      <text:p text:style-name="P119"><text:s text:c="8"/>call <text:s text:c="3"/>numberPi(int)</text:p>
      <text:p text:style-name="P119"><text:s text:c="8"/>fstp <text:s text:c="3"/>%st(0)</text:p>
      <text:p text:style-name="P119"><text:s text:c="8"/>addl <text:s text:c="3"/>$16, %esp</text:p>
      <text:p text:style-name="P137"/>
      <text:p text:style-name="P127"><text:span text:style-name="T58">#</text:span><text:span text:style-name="T49">Вывод заголовка для N (зеленым цветом)</text:span></text:p>
      <text:p text:style-name="P119"><text:s text:c="8"/>subl <text:s text:c="3"/>$8, %esp</text:p>
      <text:p text:style-name="P119"><text:s text:c="8"/>pushl <text:s text:c="2"/>$.LC12 </text:p>
      <text:p text:style-name="P119"><text:s text:c="8"/>pushl <text:s text:c="2"/>$_ZSt4cout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.LC16 <text:span text:style-name="T59">#</text:span><text:span text:style-name="T55">"-------N -----"</text:span></text:p>
      <text:p text:style-name="P119"><text:s text:c="8"/>pushl <text:s text:c="2"/>%eax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.LC14</text:p>
      <text:p text:style-name="P119"><text:s text:c="8"/>pushl <text:s text:c="2"/>%eax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draw:custom-shape text:anchor-type="paragraph" draw:z-index="32" draw:name="Shape 32" draw:style-name="gr32" draw:text-style-name="P112" svg:width="17.283cm" svg:height="26.392cm" svg:x="-0.402cm" svg:y="-0.261cm"><text:p/><draw:enhanced-geometry svg:viewBox="0 0 21600 21600" draw:type="rectangle" draw:enhanced-path="M 0 0 L 21600 0 21600 21600 0 21600 0 0 Z N"/></draw:custom-shape><text:soft-page-break/><text:s text:c="8"/>addl <text:s text:c="3"/>$16, %esp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text:s text:c="8"/>call <text:s text:c="3"/>std::ostream::operator&lt;&lt;(std::ostream&amp; (*)(std::ostream&amp;))</text:p>
      <text:p text:style-name="P119"><text:s text:c="8"/>addl <text:s text:c="3"/>$16, %esp</text:p>
      <text:p text:style-name="P119"/>
      <text:p text:style-name="P127"><text:span text:style-name="T58">#</text:span><text:span text:style-name="T49">Вызов numberPi с N</text:span></text:p>
      <text:p text:style-name="P119"><text:s text:c="8"/>subl <text:s text:c="3"/>$12, %esp</text:p>
      <text:p text:style-name="P119"><text:s text:c="8"/>pushl <text:s text:c="2"/>-12(%ebp)<text:span text:style-name="T61"> </text:span><text:span text:style-name="T59">#N</text:span></text:p>
      <text:p text:style-name="P119"><text:s text:c="8"/>call <text:s text:c="3"/>numberPi(int)</text:p>
      <text:p text:style-name="P119"><text:s text:c="8"/>fstp <text:s text:c="3"/>%st(0)</text:p>
      <text:p text:style-name="P119"><text:s text:c="8"/>addl <text:s text:c="3"/>$16, %esp</text:p>
      <text:p text:style-name="P138"><text:s text:c="8"/></text:p>
      <text:p text:style-name="P139"><text:span text:style-name="T58">#</text:span><text:span text:style-name="T49">Вывод заголовка для 1.5*N (зеленым цветом)</text:span></text:p>
      <text:p text:style-name="P138"><text:s text:c="8"/>subl <text:s text:c="3"/>$8, %esp</text:p>
      <text:p text:style-name="P119"><text:s text:c="8"/>pushl <text:s text:c="2"/>$.LC12</text:p>
      <text:p text:style-name="P119"><text:s text:c="8"/>pushl <text:s text:c="2"/>$_ZSt4cout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38"><text:s text:c="8"/>subl <text:s text:c="3"/>$8, %esp</text:p>
      <text:p text:style-name="P119"><text:s text:c="8"/>pushl <text:s text:c="2"/>$.LC17 <text:span text:style-name="T62">#</text:span><text:span text:style-name="T63">"----- 1.5*N ---" (в base64)</text:span></text:p>
      <text:p text:style-name="P119"><text:s text:c="8"/>pushl <text:s text:c="2"/>%eax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.LC14</text:p>
      <text:p text:style-name="P119"><text:s text:c="8"/>pushl <text:s text:c="2"/>%eax</text:p>
      <text:p text:style-name="P119"><text:s text:c="8"/>call <text:s text:c="3"/>std::basic_ostream&lt;char, std::char_traits&lt;char&gt;&gt;&amp; std::operator&lt;&lt;&lt;std::char_traits&lt;char&gt;&gt;(std::basic_ostream&lt;char, std::char_traits&lt;char&gt;&gt;&amp;, char const*)</text:p>
      <text:p text:style-name="P119"><text:s text:c="8"/>addl <text:s text:c="3"/>$16, %esp</text:p>
      <text:p text:style-name="P119"><text:s text:c="8"/>subl <text:s text:c="3"/>$8, %esp</text:p>
      <text:p text:style-name="P119"><text:s text:c="8"/>pushl <text:s text:c="2"/>$_ZSt4endlIcSt11char_traitsIcEERSt13basic_ostreamIT_T0_ES6_</text:p>
      <text:p text:style-name="P119"><text:s text:c="8"/>pushl <text:s text:c="2"/>%eax</text:p>
      <text:p text:style-name="P119"><text:s text:c="8"/>call <text:s text:c="3"/>std::ostream::operator&lt;&lt;(std::ostream&amp; (*)(std::ostream&amp;))</text:p>
      <text:p text:style-name="P119"><text:s text:c="8"/>addl <text:s text:c="3"/>$16, %esp</text:p>
      <text:p text:style-name="P138"><text:s text:c="8"/></text:p>
      <text:p text:style-name="P140"><text:span text:style-name="T64">#</text:span><text:span text:style-name="T49">Вычисление 1.5 * N</text:span></text:p>
      <text:p text:style-name="P138"><text:s text:c="8"/>fildl <text:s text:c="2"/>-12(%ebp)</text:p>
      <text:p text:style-name="P119"><text:s text:c="8"/>fldl <text:s text:c="3"/>.LC18</text:p>
      <text:p text:style-name="P119"><draw:custom-shape text:anchor-type="paragraph" draw:z-index="0" draw:name="Shape 46" draw:style-name="gr33" draw:text-style-name="P32" svg:width="17.237cm" svg:height="26.367cm" svg:x="-0.372cm" svg:y="-0.238cm"><text:p/><draw:enhanced-geometry svg:viewBox="0 0 21600 21600" draw:type="rectangle" draw:enhanced-path="M 0 0 L 21600 0 21600 21600 0 21600 0 0 Z N"/></draw:custom-shape><text:soft-page-break/><text:s text:c="8"/>fmulp <text:s text:c="2"/>%st, %st(1)</text:p>
      <text:p text:style-name="P119"><text:s text:c="8"/>fstpl <text:s text:c="2"/>-32(%ebp)</text:p>
      <text:p text:style-name="P119"><text:s text:c="8"/>cvttsd2sil <text:s text:c="5"/>-32(%ebp), %eax</text:p>
      <text:p text:style-name="P119"/>
      <text:p text:style-name="P140"><text:span text:style-name="T64">#</text:span><text:span text:style-name="T49">Вызов numberPi с 1.5*N</text:span></text:p>
      <text:p text:style-name="P119"><text:s text:c="8"/>subl <text:s text:c="3"/>$12, %esp</text:p>
      <text:p text:style-name="P119"><text:s text:c="8"/>pushl <text:s text:c="2"/>%eax</text:p>
      <text:p text:style-name="P119"><text:s text:c="8"/>call <text:s text:c="3"/>numberPi(int)</text:p>
      <text:p text:style-name="P119"><text:s text:c="8"/>fstp <text:s text:c="3"/>%st(0)</text:p>
      <text:p text:style-name="P119"><text:s text:c="8"/>addl <text:s text:c="3"/>$16, %esp</text:p>
      <text:p text:style-name="P119"><text:s text:c="8"/>movl <text:s text:c="3"/>$0, %eax</text:p>
      <text:p text:style-name="P119"/>
      <text:p text:style-name="P119">.L36:</text:p>
      <text:p text:style-name="P119"><text:s text:c="8"/>movl <text:s text:c="3"/>-4(%ebp), %ecx</text:p>
      <text:p text:style-name="P119"><text:s text:c="8"/>leave</text:p>
      <text:p text:style-name="P119"><text:s text:c="8"/>leal <text:s text:c="3"/>-4(%ecx), %esp</text:p>
      <text:p text:style-name="P119"><text:s text:c="8"/>ret</text:p>
      <text:p text:style-name="P141">#Конструкторы и диструкторы</text:p>
      <text:p text:style-name="P119"><text:s text:c="8"/>.set <text:s text:c="3"/>std::__cxx11::basic_string&lt;char, std::char_traits&lt;char&gt;, std::allocator&lt;char&gt;&gt;::_Alloc_hider::~_Alloc_hider() [complete object destructor],_ZNSt7__cxx1112basic_stringIcSt11char_traitsIcESaIcEE12_Alloc_hiderD2Ev</text:p>
      <text:p text:style-name="P119"><text:s text:c="8"/>.set <text:s text:c="3"/>std::__cxx11::basic_string&lt;char, std::char_traits&lt;char&gt;, std::allocator&lt;char&gt;&gt;::~basic_string() [complete object destructor],_ZNSt7__cxx1112basic_stringIcSt11char_traitsIcESaIcEED2Ev</text:p>
      <text:p text:style-name="P119"/>
      <text:p text:style-name="P141">#Проверка на ошибку</text:p>
      <text:p text:style-name="P119">.LC19:</text:p>
      <text:p text:style-name="P119"><text:s text:c="8"/>.string "basic_string: construction from null is not valid"</text:p>
      <text:p text:style-name="P119"><text:s text:c="8"/>.set <text:s text:c="3"/>std::__cxx11::basic_string&lt;char, std::char_traits&lt;char&gt;, std::allocator&lt;char&gt;&gt;::basic_string&lt;std::allocator&lt;char&gt;&gt;(char const*, std::allocator&lt;char&gt; const&amp;),_ZNSt7__cxx1112basic_stringIcSt11char_traitsIcESaIcEEC2IS3_EEPKcRKS3_</text:p>
      <text:p text:style-name="P119"/>
      <text:p text:style-name="P141">#Конструкторы и диструкторы</text:p>
      <text:p text:style-name="P142"><text:s text:c="8"/>.set <text:s text:c="3"/>std::uniform_real_distribution&lt;double&gt;::uniform_real_distribution(double, double) [complete object constructor],_ZNSt25uniform_real_distributionIdEC2Edd</text:p>
      <text:p text:style-name="P119"><text:s text:c="8"/>.set <text:s text:c="3"/>std::__new_allocator&lt;char&gt;::~__new_allocator() [complete object destructor],_ZNSt15__new_allocatorIcED2Ev</text:p>
      <text:p text:style-name="P143"><text:s text:c="8"/>.set <text:s text:c="3"/>std::__cxx11::basic_string&lt;char, std::char_traits&lt;char&gt;, std::allocator&lt;char&gt;&gt;::_Alloc_hider::_Alloc_hider(char*, std::allocator&lt;char&gt; const&amp;) [complete object </text:p>
      <text:p text:style-name="P143"><draw:custom-shape text:anchor-type="paragraph" draw:z-index="33" draw:name="Shape 33" draw:style-name="gr34" draw:text-style-name="P112" svg:width="17.283cm" svg:height="26.203cm" svg:x="-0.367cm" svg:y="-0.134cm"><text:p/><draw:enhanced-geometry svg:viewBox="0 0 21600 21600" draw:type="rectangle" draw:enhanced-path="M 0 0 L 21600 0 21600 21600 0 21600 0 0 Z N"/></draw:custom-shape><text:soft-page-break/>constructor],_ZNSt7__cxx1112basic_stringIcSt11char_traitsIcESaIcEE12_Alloc_hiderC2EPcRKS3_</text:p>
      <text:p text:style-name="P142"><text:s text:c="8"/>.set <text:s text:c="3"/>void std::__cxx11::basic_string&lt;char, std::char_traits&lt;char&gt;, std::allocator&lt;char&gt;&gt;::_M_construct&lt;char const*&gt;(char const*, char const*, std::forward_iterator_tag)::_Guard::_Guard(std::__cxx11::basic_string&lt;char, </text:p>
      <text:p text:style-name="P142"/>
      <text:p text:style-name="P142">std::char_traits&lt;char&gt;, std::allocator&lt;char&gt;&gt;*) [complete object constructor],_ZZNSt7__cxx1112basic_stringIcSt11char_traitsIcESaIcEE12_M_constructIPKcEEvT_S8_St20forward_iterator_tagEN6_GuardC2EPS4_</text:p>
      <text:p text:style-name="P119"><text:s text:c="8"/>.set <text:s text:c="3"/>void std::__cxx11::basic_string&lt;char, std::char_traits&lt;char&gt;, std::allocator&lt;char&gt;&gt;::_M_construct&lt;char const*&gt;(char const*, char const*, std::forward_iterator_tag)::_Guard::~_Guard() [complete object destructor],_ZZNSt7__cxx1112basic_stringIcSt11char_traitsIcESaIcEE12_M_constructIPKcEEvT_S8_St20forward_iterator_tagEN6_GuardD2Ev</text:p>
      <text:p text:style-name="P119"/>
      <text:p text:style-name="P144"><text:span text:style-name="T65">#</text:span><text:span text:style-name="T66">проверка что нижняя граница &lt;= верхней границы распределения</text:span></text:p>
      <text:p text:style-name="P119">.LC20:</text:p>
      <text:p text:style-name="P119"><text:s text:c="8"/>.string "_M_a &lt;= _M_b"</text:p>
      <text:p text:style-name="P119"/>
      <text:p text:style-name="P144"><text:span text:style-name="T65">#</text:span><text:span text:style-name="T66">описание конструктора параметров распределения</text:span></text:p>
      <text:p text:style-name="P119">.LC21:</text:p>
      <text:p text:style-name="P119"><text:s text:c="8"/>.string "std::uniform_real_distribution&lt;_RealType&gt;::param_type::param_type(_RealType, _RealType) [with _RealType = double]"</text:p>
      <text:p text:style-name="P137"/>
      <text:p text:style-name="P144"><text:span text:style-name="T65">#</text:span><text:span text:style-name="T66">путь к исходному файлу GCC для трассировки ошибок</text:span></text:p>
      <text:p text:style-name="P119">.LC22:</text:p>
      <text:p text:style-name="P119"><text:s text:c="8"/>.string "/cefs/22/22e6cdc013c8541ce3d1548e_consolidated/compilers_c++_x86_gcc_15.2.0/include/c++/15.2.0/bits/random.h"</text:p>
      <text:p text:style-name="P119"><text:s text:c="8"/>.set <text:s text:c="3"/>std::uniform_real_distribution&lt;double&gt;::param_type::param_type(double, double) [complete object constructor],_ZNSt25uniform_real_distributionIdE10param_typeC2Edd</text:p>
      <text:p text:style-name="P119"/>
      <text:p text:style-name="P119">.LC23:</text:p>
      <text:p text:style-name="P119"><text:s text:c="8"/>.string "basic_string::_M_create"</text:p>
      <text:p text:style-name="P119"><text:s text:c="8"/>.set <text:s text:c="3"/>std::__detail::_Adaptor&lt;std::random_device, double&gt;::_Adaptor(std::random_device&amp;) [complete object constructor],_ZNSt8__detail8_AdaptorISt13random_devicedEC2ERS1_</text:p>
      <text:p text:style-name="P119"/>
      <text:p text:style-name="P123">#Константы для вычсилений</text:p>
      <text:p text:style-name="P119">.LC4:</text:p>
      <text:p text:style-name="P119"><text:s text:c="8"/>.long <text:s text:c="2"/>0</text:p>
      <text:p text:style-name="P119"><text:s text:c="8"/>.long <text:s text:c="2"/>1074790400</text:p>
      <text:p text:style-name="P119">.LC7:</text:p>
      <text:p text:style-name="P119"><draw:custom-shape text:anchor-type="paragraph" draw:z-index="44" draw:name="Shape 45" draw:style-name="gr35" draw:text-style-name="P32" svg:width="17.237cm" svg:height="12.106cm" svg:x="-0.337cm" svg:y="-0.674cm"><text:p/><draw:enhanced-geometry svg:viewBox="0 0 21600 21600" draw:type="rectangle" draw:enhanced-path="M 0 0 L 21600 0 21600 21600 0 21600 0 0 Z N"/></draw:custom-shape><text:soft-page-break/><text:s text:c="8"/>.long <text:s text:c="2"/>-400107883</text:p>
      <text:p text:style-name="P119"><text:s text:c="8"/>.long <text:s text:c="2"/>1041313291</text:p>
      <text:p text:style-name="P119">.LC15:</text:p>
      <text:p text:style-name="P119"><text:s text:c="8"/>.long <text:s text:c="2"/>0</text:p>
      <text:p text:style-name="P119"><text:s text:c="8"/>.long <text:s text:c="2"/>1071644672</text:p>
      <text:p text:style-name="P119">.LC18:</text:p>
      <text:p text:style-name="P119"><text:s text:c="8"/>.long <text:s text:c="2"/>0</text:p>
      <text:p text:style-name="P119"><text:s text:c="8"/>.long <text:s text:c="2"/>1073217536</text:p>
      <text:p text:style-name="P119">.LC24:</text:p>
      <text:p text:style-name="P119"><text:s text:c="8"/>.long <text:s text:c="2"/>0</text:p>
      <text:p text:style-name="P119"><text:s text:c="8"/>.long <text:s text:c="2"/>-2147483648</text:p>
      <text:p text:style-name="P119"><text:s text:c="8"/>.long <text:s text:c="2"/>16415</text:p>
      <text:p text:style-name="P119">.LC25:</text:p>
      <text:p text:style-name="P119"><text:s text:c="8"/>.long <text:s text:c="2"/>0</text:p>
      <text:p text:style-name="P119"><text:s text:c="8"/>.long <text:s text:c="2"/>-2147483648</text:p>
      <text:p text:style-name="P119"><text:s text:c="8"/>.long <text:s text:c="2"/>16384</text:p>
      <text:p text:style-name="P119">.LC26:</text:p>
      <text:p text:style-name="P119"><text:s text:c="8"/>.long <text:s text:c="2"/>-1</text:p>
      <text:p text:style-name="P119"><text:s text:c="8"/>.long <text:s text:c="2"/>1072693247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><text:span text:style-name="T12"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P145" text:outline-level="1" text:is-list-header="true"><text:bookmark-start text:name="__RefHeading___Toc18443925 Copy 3"/>Приложение№<text:span text:style-name="T35">4</text:span><text:bookmark-end text:name="__RefHeading___Toc18443925 Copy 3"/></text:h>
      <text:h text:style-name="P110" text:outline-level="1"><text:bookmark-start text:name="__RefHeading___Toc20592_323823121"/><text:span text:style-name="T12">Листинг</text:span><text:span text:style-name="T40"> </text:span><text:span text:style-name="T12">компиляции программы уровня -O3 на архитектуре x86</text:span><text:bookmark-end text:name="__RefHeading___Toc20592_323823121"/></text:h>
      <text:p text:style-name="P146"><draw:custom-shape text:anchor-type="paragraph" draw:z-index="34" draw:name="Shape 34" draw:style-name="gr36" draw:text-style-name="P112" svg:width="17.283cm" svg:height="22.552cm" svg:x="-0.367cm" svg:y="0.279cm"><text:p/><draw:enhanced-geometry svg:viewBox="0 0 21600 21600" draw:type="rectangle" draw:enhanced-path="M 0 0 L 21600 0 21600 21600 0 21600 0 0 Z N"/></draw:custom-shape><text:span text:style-name="T12"/></text:p>
      <text:p text:style-name="P119">std::basic_ostream&lt;char, std::char_traits&lt;char&gt;&gt;&amp; std::endl&lt;char, std::char_traits&lt;char&gt;&gt;(std::basic_ostream&lt;char, std::char_traits&lt;char&gt;&gt;&amp;) (.isra.0.cold):<text:span text:style-name="T67"># оптимизация -O3, </text:span><text:span text:style-name="Strong_20_Emphasis"><text:span text:style-name="T68">hot-cold splitting</text:span></text:span><text:span text:style-name="T69"> </text:span><text:span text:style-name="T68">- разделение кода на "горячий" (часто выполняемый) и "холодный" (редко выполняемый)</text:span></text:p>
      <text:p text:style-name="P119"/>
      <text:p text:style-name="P119">.LC7:</text:p>
      <text:p text:style-name="P119"><text:s text:c="8"/>.string "Number Pi: "</text:p>
      <text:p text:style-name="P119">.LC8:</text:p>
      <text:p text:style-name="P119"><text:s text:c="8"/>.string "Time taken:"</text:p>
      <text:p text:style-name="P119">.LC10:</text:p>
      <text:p text:style-name="P119"><text:s text:c="8"/>.string "sec."</text:p>
      <text:p text:style-name="P119"/>
      <text:p text:style-name="P147">#Функция вычисления Пи (Монте -Карло)</text:p>
      <text:p text:style-name="P119">numberPi(int):</text:p>
      <text:p text:style-name="P119"><text:s text:c="8"/>pushl <text:s text:c="2"/>%ebp</text:p>
      <text:p text:style-name="P119"><text:s text:c="8"/>movl <text:s text:c="3"/>%esp, %ebp</text:p>
      <text:p text:style-name="P119"><text:s text:c="8"/>pushl <text:s text:c="2"/>%edi</text:p>
      <text:p text:style-name="P119"><text:s text:c="8"/>pushl <text:s text:c="2"/>%esi</text:p>
      <text:p text:style-name="P119"><text:s text:c="8"/>leal <text:s text:c="3"/>-2556(%ebp), %eax</text:p>
      <text:p text:style-name="P119"><text:s text:c="8"/>leal <text:s text:c="3"/>-2540(%ebp), %esi</text:p>
      <text:p text:style-name="P119"><text:s text:c="8"/>pushl <text:s text:c="2"/>%ebx</text:p>
      <text:p text:style-name="P119"><text:s text:c="8"/>subl <text:s text:c="3"/>$2612, %esp</text:p>
      <text:p text:style-name="P148">#Замер времени(начало)</text:p>
      <text:p text:style-name="P119"><text:s text:c="8"/>pushl <text:s text:c="2"/>%eax</text:p>
      <text:p text:style-name="P119"><text:s text:c="8"/>pushl <text:s text:c="2"/>$4</text:p>
      <text:p text:style-name="P119"><text:s text:c="8"/>call <text:s text:c="3"/>clock_gettime</text:p>
      <text:p text:style-name="P148">#Инициализация random_device и default</text:p>
      <text:p text:style-name="P119"><text:s text:c="8"/>movl <text:s text:c="3"/>%esi, -2548(%ebp)</text:p>
      <text:p text:style-name="P119"><text:s text:c="8"/>leal <text:s text:c="3"/>-2548(%ebp), %eax</text:p>
      <text:p text:style-name="P119"><text:s text:c="8"/>movl <text:s text:c="3"/>$1634100580, -2540(%ebp)</text:p>
      <text:p text:style-name="P119"><text:s text:c="8"/>movl <text:s text:c="3"/>$7, -2544(%ebp)</text:p>
      <text:p text:style-name="P119"><text:s text:c="8"/>movl <text:s text:c="3"/>$1953264993, -2537(%ebp)</text:p>
      <text:p text:style-name="P119"><text:s text:c="8"/>movb <text:s text:c="3"/>$0, -2533(%ebp)</text:p>
      <text:p text:style-name="P119"><text:s text:c="8"/>popl <text:s text:c="3"/>%ebx</text:p>
      <text:p text:style-name="P119"><text:s text:c="8"/>leal <text:s text:c="3"/>-2524(%ebp), %ebx</text:p>
      <text:p text:style-name="P119"><text:s text:c="8"/>popl <text:s text:c="3"/>%edi</text:p>
      <text:p text:style-name="P119"><text:s text:c="8"/>pushl <text:s text:c="2"/>%eax</text:p>
      <text:p text:style-name="P119"><text:s text:c="8"/>pushl <text:s text:c="2"/>%ebx</text:p>
      <text:p text:style-name="P119"><draw:custom-shape text:anchor-type="paragraph" draw:z-index="35" draw:name="Shape 35" draw:style-name="gr37" draw:text-style-name="P112" svg:width="17.283cm" svg:height="26.313cm" svg:x="-0.367cm" svg:y="-0.386cm"><text:p/><draw:enhanced-geometry svg:viewBox="0 0 21600 21600" draw:type="rectangle" draw:enhanced-path="M 0 0 L 21600 0 21600 21600 0 21600 0 0 Z N"/></draw:custom-shape><text:soft-page-break/><text:s text:c="8"/>call <text:s text:c="3"/>std::random_device::_M_init(std::__cxx11::basic_string&lt;char, std::char_traits&lt;char&gt;, std::allocator&lt;char&gt;&gt; const&amp;)</text:p>
      <text:p text:style-name="P148">#Освобождение строкового объекта</text:p>
      <text:p text:style-name="P119"><text:s text:c="8"/>movl <text:s text:c="3"/>-2548(%ebp), %edx</text:p>
      <text:p text:style-name="P119"><text:s text:c="8"/>addl <text:s text:c="3"/>$16, %esp</text:p>
      <text:p text:style-name="P119"><text:s text:c="8"/>cmpl <text:s text:c="3"/>%esi, %edx</text:p>
      <text:p text:style-name="P119"><text:s text:c="8"/>je <text:s text:c="5"/>.L12</text:p>
      <text:p text:style-name="P119"><text:s text:c="8"/>movl <text:s text:c="3"/>-2540(%ebp), %eax</text:p>
      <text:p text:style-name="P119"><text:s text:c="8"/>subl <text:s text:c="3"/>$8, %esp</text:p>
      <text:p text:style-name="P119"><text:s text:c="8"/>addl <text:s text:c="3"/>$1, %eax</text:p>
      <text:p text:style-name="P119"><text:s text:c="8"/>pushl <text:s text:c="2"/>%eax</text:p>
      <text:p text:style-name="P119"><text:s text:c="8"/>pushl <text:s text:c="2"/>%edx</text:p>
      <text:p text:style-name="P119"><text:s text:c="8"/>call <text:s text:c="3"/>operator delete(void*, unsigned int)</text:p>
      <text:p text:style-name="P119"><text:s text:c="8"/>addl <text:s text:c="3"/>$16, %esp</text:p>
      <text:p text:style-name="P119"/>
      <text:p text:style-name="P149">#Инициализация переменных цикла</text:p>
      <text:p text:style-name="P119">.L12:</text:p>
      <text:p text:style-name="P119"><text:s text:c="8"/>movl <text:s text:c="3"/>$0, -2612(%ebp)</text:p>
      <text:p text:style-name="P119"><text:s text:c="8"/>movl <text:s text:c="3"/>8(%ebp), %ecx</text:p>
      <text:p text:style-name="P119"><text:s text:c="8"/>xorl <text:s text:c="3"/>%edi, %edi</text:p>
      <text:p text:style-name="P119"><text:s text:c="8"/>testl <text:s text:c="2"/>%ecx, %ecx</text:p>
      <text:p text:style-name="P119"><text:s text:c="8"/>jg <text:s text:c="5"/>.L13</text:p>
      <text:p text:style-name="P119"><text:s text:c="8"/>jmp <text:s text:c="4"/>.L50</text:p>
      <text:p text:style-name="P119"/>
      <text:p text:style-name="P149">#Основной цикл Монте-Карло</text:p>
      <text:p text:style-name="P149"/>
      <text:p text:style-name="P150">#Н<text:span text:style-name="T70">ормализация случайного числа</text:span></text:p>
      <text:p text:style-name="P119">.L52:</text:p>
      <text:p text:style-name="P119"><text:s text:c="8"/>fdivl <text:s text:c="2"/>-2592(%ebp)</text:p>
      <text:p text:style-name="P119"><text:s text:c="8"/>fld1</text:p>
      <text:p text:style-name="P119"><text:s text:c="8"/>fxch <text:s text:c="3"/>%st(1)</text:p>
      <text:p text:style-name="P119"><text:s text:c="8"/>fcomi <text:s text:c="2"/>%st(1), %st</text:p>
      <text:p text:style-name="P119"><text:s text:c="8"/>jnb <text:s text:c="4"/>.L31</text:p>
      <text:p text:style-name="P119"><text:s text:c="8"/>fadd <text:s text:c="3"/>%st(0), %st</text:p>
      <text:p text:style-name="P119"><text:s text:c="8"/>fsubp <text:s text:c="2"/>%st, %st(1)</text:p>
      <text:p text:style-name="P119"><text:s text:c="8"/>fstpl <text:s text:c="2"/>-2608(%ebp)</text:p>
      <text:p text:style-name="P119"/>
      <text:p text:style-name="P149">#Полготовка к генераци следующей координаты</text:p>
      <text:p text:style-name="P119">.L17:</text:p>
      <text:p text:style-name="P119"><text:s text:c="8"/>fldz</text:p>
      <text:p text:style-name="P119"><text:s text:c="8"/>movl <text:s text:c="3"/>$2, %esi</text:p>
      <text:p text:style-name="P119"><text:s text:c="8"/>fld1</text:p>
      <text:p text:style-name="P119"><text:s text:c="8"/>fstpl <text:s text:c="2"/>-2592(%ebp)</text:p>
      <text:p text:style-name="P119"/>
      <text:p text:style-name="P149">#Генерация случ. Числа <text:span text:style-name="T71">(для y)</text:span></text:p>
      <text:p text:style-name="P119"><draw:custom-shape text:anchor-type="paragraph" draw:z-index="36" draw:name="Shape 36" draw:style-name="gr38" draw:text-style-name="P112" svg:width="17.283cm" svg:height="25.932cm" svg:x="-0.367cm" svg:y="-0.402cm"><text:p/><draw:enhanced-geometry svg:viewBox="0 0 21600 21600" draw:type="rectangle" draw:enhanced-path="M 0 0 L 21600 0 21600 21600 0 21600 0 0 Z N"/></draw:custom-shape><text:soft-page-break/>.L18:</text:p>
      <text:p text:style-name="P119"><text:s text:c="8"/>subl <text:s text:c="3"/>$12, %esp</text:p>
      <text:p text:style-name="P119"><text:s text:c="8"/>fstpl <text:s text:c="2"/>-2600(%ebp)</text:p>
      <text:p text:style-name="P119"><text:s text:c="8"/>pushl <text:s text:c="2"/>%ebx</text:p>
      <text:p text:style-name="P119"><text:s text:c="8"/>call <text:s text:c="3"/>std::random_device::_M_getval()</text:p>
      <text:p text:style-name="P119"><text:s text:c="8"/>movd <text:s text:c="3"/>%eax, %xmm0<text:span text:style-name="T61"> </text:span><text:span text:style-name="T72">#SSE</text:span></text:p>
      <text:p text:style-name="P119"><text:s text:c="8"/>addl <text:s text:c="3"/>$16, %esp</text:p>
      <text:p text:style-name="P119"><text:s text:c="8"/>movq <text:s text:c="3"/>%xmm0, -2584(%ebp)</text:p>
      <text:p text:style-name="P119"><text:s text:c="8"/>fildq <text:s text:c="2"/>-2584(%ebp)</text:p>
      <text:p text:style-name="P119"><text:s text:c="8"/>fldl <text:s text:c="3"/>-2592(%ebp)</text:p>
      <text:p text:style-name="P119"><text:s text:c="8"/>fmul <text:s text:c="3"/>%st, %st(1)</text:p>
      <text:p text:style-name="P119"><text:s text:c="8"/>fldl <text:s text:c="3"/>-2600(%ebp)</text:p>
      <text:p text:style-name="P119"><text:s text:c="8"/>faddp <text:s text:c="2"/>%st, %st(2)</text:p>
      <text:p text:style-name="P119"><text:s text:c="8"/>flds <text:s text:c="3"/>.LC5</text:p>
      <text:p text:style-name="P119"><text:s text:c="8"/>fmulp <text:s text:c="2"/>%st, %st(1)</text:p>
      <text:p text:style-name="P119"><text:s text:c="8"/>fstpl <text:s text:c="2"/>-2592(%ebp)</text:p>
      <text:p text:style-name="P151"><text:s text:c="8"/></text:p>
      <text:p text:style-name="P152">#Проверка: генерируем x или y</text:p>
      <text:p text:style-name="P151"><text:s text:c="7"/>cmpl <text:s text:c="3"/>$1, %esi</text:p>
      <text:p text:style-name="P119"><text:s text:c="8"/>jne <text:s text:c="4"/>.L32</text:p>
      <text:p text:style-name="P119"><text:s text:c="8"/>fdivl <text:s text:c="2"/>-2592(%ebp)</text:p>
      <text:p text:style-name="P119"><text:s text:c="8"/>fld1</text:p>
      <text:p text:style-name="P119"><text:s text:c="8"/>fxch <text:s text:c="3"/>%st(1)</text:p>
      <text:p text:style-name="P119"><text:s text:c="8"/>fcomi <text:s text:c="2"/>%st(1), %st</text:p>
      <text:p text:style-name="P119"><text:s text:c="8"/>jnb <text:s text:c="4"/>.L33</text:p>
      <text:p text:style-name="P119"><text:s text:c="8"/>fadd <text:s text:c="3"/>%st(0), %st</text:p>
      <text:p text:style-name="P119"><text:s text:c="8"/>fsubp <text:s text:c="2"/>%st, %st(1)</text:p>
      <text:p text:style-name="P119"><text:s text:c="8"/>fmul <text:s text:c="3"/>%st(0), %st</text:p>
      <text:p text:style-name="P119"/>
      <text:p text:style-name="P149">#Проверка попадания в круг</text:p>
      <text:p text:style-name="P119">.L19:</text:p>
      <text:p text:style-name="P119"><text:s text:c="8"/>fldl <text:s text:c="3"/>-2608(%ebp)</text:p>
      <text:p text:style-name="P119"><text:s text:c="8"/>fmul <text:s text:c="3"/>%st(0), %st</text:p>
      <text:p text:style-name="P119"><text:s text:c="8"/>faddp <text:s text:c="2"/>%st, %st(1)</text:p>
      <text:p text:style-name="P119"><text:s text:c="8"/>fld1</text:p>
      <text:p text:style-name="P119"><text:s text:c="8"/>fcomip <text:s/>%st(1), %st</text:p>
      <text:p text:style-name="P119"><text:s text:c="8"/>fstp <text:s text:c="3"/>%st(0)</text:p>
      <text:p text:style-name="P119"><text:s text:c="8"/>sbbl <text:s text:c="3"/>$-1, -2612(%ebp)</text:p>
      <text:p text:style-name="P152">#Проверка условия выхода из цикла</text:p>
      <text:p text:style-name="P151"><text:s text:c="8"/>addl <text:s text:c="3"/>$1, %edi</text:p>
      <text:p text:style-name="P119"><text:s text:c="8"/>cmpl <text:s text:c="3"/>%edi, 8(%ebp)</text:p>
      <text:p text:style-name="P119"><text:s text:c="8"/>je <text:s text:c="5"/>.L51</text:p>
      <text:p text:style-name="P146"/>
      <text:p text:style-name="P152">#Начало новой итерации </text:p>
      <text:p text:style-name="P119">.L13:</text:p>
      <text:p text:style-name="P119"><draw:custom-shape text:anchor-type="paragraph" draw:z-index="47" draw:name="Shape 48" draw:style-name="gr39" draw:text-style-name="P32" svg:width="17.354cm" svg:height="26.403cm" svg:x="-0.377cm" svg:y="-0.337cm"><text:p/><draw:enhanced-geometry svg:viewBox="0 0 21600 21600" draw:type="rectangle" draw:enhanced-path="M 0 0 L 21600 0 21600 21600 0 21600 0 0 Z N"/></draw:custom-shape><text:soft-page-break/><text:s text:c="8"/>fldz</text:p>
      <text:p text:style-name="P119"><text:s text:c="8"/>movl <text:s text:c="3"/>$2, %esi</text:p>
      <text:p text:style-name="P119"><text:s text:c="8"/>fld1</text:p>
      <text:p text:style-name="P119"><text:s text:c="8"/>fstpl <text:s text:c="2"/>-2592(%ebp)</text:p>
      <text:p text:style-name="P119"/>
      <text:p text:style-name="P153">#Генерация случ. Числа <text:span text:style-name="T71">(для </text:span><text:span text:style-name="T73">x</text:span><text:span text:style-name="T71">)</text:span></text:p>
      <text:p text:style-name="P119">.L16:</text:p>
      <text:p text:style-name="P119"><text:s text:c="8"/>subl <text:s text:c="3"/>$12, %esp</text:p>
      <text:p text:style-name="P119"><text:s text:c="8"/>fstpl <text:s text:c="2"/>-2600(%ebp)</text:p>
      <text:p text:style-name="P119"><text:s text:c="8"/>pushl <text:s text:c="2"/>%ebx</text:p>
      <text:p text:style-name="P119"><text:s text:c="8"/>call <text:s text:c="3"/>std::random_device::_M_getval()</text:p>
      <text:p text:style-name="P119"><text:s text:c="8"/>movd <text:s text:c="3"/>%eax, %xmm0 <text:span text:style-name="T72">#SSE регистры</text:span></text:p>
      <text:p text:style-name="P119"><text:s text:c="8"/>addl <text:s text:c="3"/>$16, %esp</text:p>
      <text:p text:style-name="P119"><text:s text:c="8"/>movq <text:s text:c="3"/>%xmm0, -2576(%ebp)</text:p>
      <text:p text:style-name="P119"><text:s text:c="8"/>fildq <text:s text:c="2"/>-2576(%ebp)</text:p>
      <text:p text:style-name="P119"><text:s text:c="8"/>fldl <text:s text:c="3"/>-2592(%ebp)</text:p>
      <text:p text:style-name="P119"><text:s text:c="8"/>fmul <text:s text:c="3"/>%st, %st(1)</text:p>
      <text:p text:style-name="P119"><text:s text:c="8"/>fldl <text:s text:c="3"/>-2600(%ebp)</text:p>
      <text:p text:style-name="P119"><text:s text:c="8"/>faddp <text:s text:c="2"/>%st, %st(2)</text:p>
      <text:p text:style-name="P119"><text:s text:c="8"/>flds <text:s text:c="3"/>.LC5</text:p>
      <text:p text:style-name="P119"><text:s text:c="8"/>fmulp <text:s text:c="2"/>%st, %st(1)</text:p>
      <text:p text:style-name="P119"><text:s text:c="8"/>fstpl <text:s text:c="2"/>-2592(%ebp)</text:p>
      <text:p text:style-name="P148">#Проверка завершения генерации x</text:p>
      <text:p text:style-name="P119"><text:s text:c="8"/>cmpl <text:s text:c="3"/>$1, %esi</text:p>
      <text:p text:style-name="P119"><text:s text:c="8"/>je <text:s text:c="5"/>.L52</text:p>
      <text:p text:style-name="P119"><text:s text:c="8"/>movl <text:s text:c="3"/>$1, %esi</text:p>
      <text:p text:style-name="P119"><text:s text:c="8"/>jmp <text:s text:c="4"/>.L16</text:p>
      <text:p text:style-name="P119">.L32:</text:p>
      <text:p text:style-name="P119"><text:s text:c="8"/>movl <text:s text:c="3"/>$1, %esi</text:p>
      <text:p text:style-name="P119"><text:s text:c="8"/>jmp <text:s text:c="4"/>.L18</text:p>
      <text:p text:style-name="P119"/>
      <text:p text:style-name="P149">#Вычисление Пи</text:p>
      <text:p text:style-name="P119">.L51:</text:p>
      <text:p text:style-name="P119"><text:s text:c="8"/>fildl <text:s text:c="2"/>-2612(%ebp)</text:p>
      <text:p text:style-name="P119"><text:s text:c="8"/>fmuls <text:s text:c="2"/>.LC6</text:p>
      <text:p text:style-name="P119"/>
      <text:p text:style-name="P149">#Завершение вычисления и Вывод результата</text:p>
      <text:p text:style-name="P119">.L14:</text:p>
      <text:p text:style-name="P119"><text:s text:c="8"/>fildl <text:s text:c="2"/>8(%ebp)</text:p>
      <text:p text:style-name="P119"><text:s text:c="8"/>subl <text:s text:c="3"/>$4, %esp</text:p>
      <text:p text:style-name="P119"><text:s text:c="8"/>fdivrp <text:s/>%st, %st(1)</text:p>
      <text:p text:style-name="P119"><text:s text:c="8"/>fstpl <text:s text:c="2"/>-2592(%ebp)</text:p>
      <text:p text:style-name="P119"/>
      <text:p text:style-name="P154"><text:span text:style-name="T70">#</text:span><text:span text:style-name="T49">Вывод «Number Pi :»</text:span></text:p>
      <text:p text:style-name="P119"><text:s text:c="8"/>pushl <text:s text:c="2"/>$11</text:p>
      <text:p text:style-name="P119"><draw:custom-shape text:anchor-type="paragraph" draw:z-index="37" draw:name="Shape 38" draw:style-name="gr40" draw:text-style-name="P112" svg:width="17.283cm" svg:height="26.187cm" svg:x="-0.367cm" svg:y="-0.443cm"><text:p/><draw:enhanced-geometry svg:viewBox="0 0 21600 21600" draw:mirror-horizontal="false" draw:mirror-vertical="false" draw:type="rectangle" draw:enhanced-path="M 0 0 L 21600 0 21600 21600 0 21600 0 0 Z N"/></draw:custom-shape><text:soft-page-break/><text:s text:c="8"/>pushl <text:s text:c="2"/>$.LC7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/>
      <text:p text:style-name="P155"/>
      <text:p text:style-name="P155"><text:span text:style-name="T70">#</text:span><text:span text:style-name="T74">Вывод значения Pi</text:span></text:p>
      <text:p text:style-name="P119"><text:s text:c="8"/>fldl <text:s text:c="3"/>-2592(%ebp)</text:p>
      <text:p text:style-name="P119"><text:s text:c="8"/>movl <text:s text:c="3"/>$_ZSt4cout, (%esp)</text:p>
      <text:p text:style-name="P119"><text:s text:c="8"/>fstpl <text:s text:c="2"/>4(%esp)</text:p>
      <text:p text:style-name="P119"><text:s text:c="8"/>call <text:s text:c="3"/>std::ostream&amp; std::ostream::_M_insert&lt;double&gt;(double)</text:p>
      <text:p text:style-name="P119"><text:s text:c="8"/>movl <text:s text:c="3"/>%eax, %esi</text:p>
      <text:p text:style-name="P119"><text:s text:c="8"/>movl <text:s text:c="3"/>(%eax), %eax</text:p>
      <text:p text:style-name="P119"><text:s text:c="8"/>addl <text:s text:c="3"/>$16, %esp</text:p>
      <text:p text:style-name="P119"/>
      <text:p text:style-name="P156"><text:span text:style-name="T75">#</text:span><text:span text:style-name="T49">Перевод строки</text:span></text:p>
      <text:p text:style-name="P119"><text:s text:c="8"/>movl <text:s text:c="3"/>-12(%eax), %eax</text:p>
      <text:p text:style-name="P119"><text:s text:c="8"/>movl <text:s text:c="3"/>124(%esi,%eax), %edi</text:p>
      <text:p text:style-name="P119"><text:s text:c="8"/>testl <text:s text:c="2"/>%edi, %edi</text:p>
      <text:p text:style-name="P119"><text:s text:c="8"/>je <text:s text:c="5"/>.L45</text:p>
      <text:p text:style-name="P119"><text:s text:c="8"/>cmpb <text:s text:c="3"/>$0, 28(%edi)</text:p>
      <text:p text:style-name="P119"><text:s text:c="8"/>je <text:s text:c="5"/>.L23</text:p>
      <text:p text:style-name="P119"><text:s text:c="8"/>movsbl <text:s/>39(%edi), %eax</text:p>
      <text:p text:style-name="P157">#Выполнение перевода строки </text:p>
      <text:p text:style-name="P119">.L24:</text:p>
      <text:p text:style-name="P119"><text:s text:c="8"/>subl <text:s text:c="3"/>$8, %esp</text:p>
      <text:p text:style-name="P119"><text:s text:c="8"/>pushl <text:s text:c="2"/>%eax</text:p>
      <text:p text:style-name="P119"><text:s text:c="8"/>pushl <text:s text:c="2"/>%esi</text:p>
      <text:p text:style-name="P119"><text:s text:c="8"/>call <text:s text:c="3"/>std::ostream::put(char)</text:p>
      <text:p text:style-name="P119"><text:s text:c="8"/>movl <text:s text:c="3"/>%eax, (%esp)</text:p>
      <text:p text:style-name="P119"><text:s text:c="8"/>call <text:s text:c="3"/>std::ostream::flush()</text:p>
      <text:p text:style-name="P119"><text:s text:c="8"/>popl <text:s text:c="3"/>%eax</text:p>
      <text:p text:style-name="P119"/>
      <text:p text:style-name="P158"><text:span text:style-name="T75">#З</text:span><text:span text:style-name="T76">амер конечного времени</text:span></text:p>
      <text:p text:style-name="P119"><text:s text:c="8"/>leal <text:s text:c="3"/>-2548(%ebp), %eax</text:p>
      <text:p text:style-name="P119"><text:s text:c="8"/>popl <text:s text:c="3"/>%edx</text:p>
      <text:p text:style-name="P119"><text:s text:c="8"/>pushl <text:s text:c="2"/>%eax</text:p>
      <text:p text:style-name="P119"><text:s text:c="8"/>pushl <text:s text:c="2"/>$4</text:p>
      <text:p text:style-name="P119"/>
      <text:p text:style-name="P159">#Вывод времени выполения</text:p>
      <text:p text:style-name="P119"><text:s text:c="8"/>call <text:s text:c="3"/>clock_gettime</text:p>
      <text:p text:style-name="P119"><text:s text:c="8"/>addl <text:s text:c="3"/>$12, %esp</text:p>
      <text:p text:style-name="P119"><text:s text:c="8"/>pushl <text:s text:c="2"/>$11</text:p>
      <text:p text:style-name="P119"><text:s text:c="8"/>pushl <text:s text:c="2"/>$.LC8</text:p>
      <text:p text:style-name="P119"><draw:custom-shape text:anchor-type="paragraph" draw:z-index="38" draw:name="Shape 39" draw:style-name="gr41" draw:text-style-name="P112" svg:width="17.283cm" svg:height="26.588cm" svg:x="-0.367cm" svg:y="-0.376cm"><text:p/><draw:enhanced-geometry svg:viewBox="0 0 21600 21600" draw:type="rectangle" draw:enhanced-path="M 0 0 L 21600 0 21600 21600 0 21600 0 0 Z N"/></draw:custom-shape><text:soft-page-break/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/>
      <text:p text:style-name="P160">#Вычисление затраченного времени и его вывод</text:p>
      <text:p text:style-name="P119"><text:s text:c="8"/>movl <text:s text:c="3"/>-2544(%ebp), %eax</text:p>
      <text:p text:style-name="P119"><text:s text:c="8"/>subl <text:s text:c="3"/>-2552(%ebp), %eax</text:p>
      <text:p text:style-name="P119"><text:s text:c="8"/>movl <text:s text:c="3"/>%eax, -2592(%ebp)</text:p>
      <text:p text:style-name="P119"><text:s text:c="8"/>movl <text:s text:c="3"/>-2548(%ebp), %eax</text:p>
      <text:p text:style-name="P119"><text:s text:c="8"/>subl <text:s text:c="3"/>-2556(%ebp), %eax</text:p>
      <text:p text:style-name="P119"><text:s text:c="8"/>fildl <text:s text:c="2"/>-2592(%ebp)</text:p>
      <text:p text:style-name="P119"><text:s text:c="8"/>movl <text:s text:c="3"/>%eax, -2592(%ebp)</text:p>
      <text:p text:style-name="P119"><text:s text:c="8"/>fmull <text:s text:c="2"/>.LC9</text:p>
      <text:p text:style-name="P119"><text:s text:c="8"/>fildl <text:s text:c="2"/>-2592(%ebp)</text:p>
      <text:p text:style-name="P119"><text:s text:c="8"/>movl <text:s text:c="3"/>$_ZSt4cout, (%esp)</text:p>
      <text:p text:style-name="P119"><text:s text:c="8"/>faddp <text:s text:c="2"/>%st, %st(1)</text:p>
      <text:p text:style-name="P119"><text:s text:c="8"/>fstpl <text:s text:c="2"/>4(%esp)</text:p>
      <text:p text:style-name="P119"><text:s text:c="8"/>call <text:s text:c="3"/>std::ostream&amp; std::ostream::_M_insert&lt;double&gt;(double)</text:p>
      <text:p text:style-name="P161"><text:s text:c="8"/></text:p>
      <text:p text:style-name="P160">#Вывод «sec.»</text:p>
      <text:p text:style-name="P161"><text:s text:c="8"/>addl <text:s text:c="3"/>$12, %esp</text:p>
      <text:p text:style-name="P119"><text:s text:c="8"/>movl <text:s text:c="3"/>%eax, %esi</text:p>
      <text:p text:style-name="P119"><text:s text:c="8"/>pushl <text:s text:c="2"/>$4</text:p>
      <text:p text:style-name="P119"><text:s text:c="8"/>pushl <text:s text:c="2"/>$.LC10</text:p>
      <text:p text:style-name="P119"><text:s text:c="8"/>pushl <text:s text:c="2"/>%eax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/>
      <text:p text:style-name="P160">#Перевод строки </text:p>
      <text:p text:style-name="P119"><text:s text:c="8"/>movl <text:s text:c="3"/>(%esi), %eax</text:p>
      <text:p text:style-name="P119"><text:s text:c="8"/>addl <text:s text:c="3"/>$16, %esp</text:p>
      <text:p text:style-name="P119"><text:s text:c="8"/>movl <text:s text:c="3"/>-12(%eax), %eax</text:p>
      <text:p text:style-name="P119"><text:s text:c="8"/>movl <text:s text:c="3"/>124(%esi,%eax), %edi</text:p>
      <text:p text:style-name="P119"><text:s text:c="8"/>testl <text:s text:c="2"/>%edi, %edi</text:p>
      <text:p text:style-name="P119"><text:s text:c="8"/>je <text:s text:c="5"/>.L46</text:p>
      <text:p text:style-name="P119"><text:s text:c="8"/>cmpb <text:s text:c="3"/>$0, 28(%edi)</text:p>
      <text:p text:style-name="P119"><text:s text:c="8"/>je <text:s text:c="5"/>.L26</text:p>
      <text:p text:style-name="P119"><text:s text:c="8"/>movsbl <text:s/>39(%edi), %eax</text:p>
      <text:p text:style-name="P119"/>
      <text:p text:style-name="P157">#Выполнение перевода строки и завершение</text:p>
      <text:p text:style-name="P119">.L27:</text:p>
      <text:p text:style-name="P119"><text:s text:c="8"/>subl <text:s text:c="3"/>$8, %esp</text:p>
      <text:p text:style-name="P119"><text:s text:c="8"/>pushl <text:s text:c="2"/>%eax</text:p>
      <text:p text:style-name="P119"><draw:custom-shape text:anchor-type="paragraph" draw:z-index="45" draw:name="Shape 47" draw:style-name="gr42" draw:text-style-name="P32" svg:width="17.636cm" svg:height="26.551cm" svg:x="-0.482cm" svg:y="-0.429cm"><text:p/><draw:enhanced-geometry svg:viewBox="0 0 21600 21600" draw:type="rectangle" draw:enhanced-path="M 0 0 L 21600 0 21600 21600 0 21600 0 0 Z N"/></draw:custom-shape><text:soft-page-break/><text:s text:c="8"/>pushl <text:s text:c="2"/>%esi</text:p>
      <text:p text:style-name="P119"><text:s text:c="8"/>call <text:s text:c="3"/>std::ostream::put(char)</text:p>
      <text:p text:style-name="P119"><text:s text:c="8"/>movl <text:s text:c="3"/>%eax, (%esp)</text:p>
      <text:p text:style-name="P119"><text:s text:c="8"/>call <text:s text:c="3"/>std::ostream::flush()</text:p>
      <text:p text:style-name="P157">#Заверешние random_device</text:p>
      <text:p text:style-name="P119"><text:s text:c="8"/>movl <text:s text:c="3"/>%ebx, (%esp)</text:p>
      <text:p text:style-name="P119"><text:s text:c="8"/>call <text:s text:c="3"/>std::random_device::_M_fini()</text:p>
      <text:p text:style-name="P119"><text:s text:c="8"/>addl <text:s text:c="3"/>$16, %esp</text:p>
      <text:p text:style-name="P157">#Возврат функции</text:p>
      <text:p text:style-name="P119"><text:s text:c="8"/>leal <text:s text:c="3"/>-12(%ebp), %esp</text:p>
      <text:p text:style-name="P119"><text:s text:c="8"/>popl <text:s text:c="3"/>%ebx</text:p>
      <text:p text:style-name="P119"><text:s text:c="8"/>fldz</text:p>
      <text:p text:style-name="P119"><text:s text:c="8"/>popl <text:s text:c="3"/>%esi</text:p>
      <text:p text:style-name="P119"><text:s text:c="8"/>popl <text:s text:c="3"/>%edi</text:p>
      <text:p text:style-name="P119"><text:s text:c="8"/>popl <text:s text:c="3"/>%ebp</text:p>
      <text:p text:style-name="P119"><text:s text:c="8"/>ret</text:p>
      <text:p text:style-name="P119"/>
      <text:p text:style-name="P160">#Обработка граничных случаев при нормализации</text:p>
      <text:p text:style-name="P119">.L31:</text:p>
      <text:p text:style-name="P119"><text:s text:c="8"/>fstp <text:s text:c="3"/>%st(0)</text:p>
      <text:p text:style-name="P119"><text:s text:c="8"/>fstp <text:s text:c="3"/>%st(0)</text:p>
      <text:p text:style-name="P119"><text:s text:c="8"/>fldl <text:s text:c="3"/>.LC3</text:p>
      <text:p text:style-name="P119"><text:s text:c="8"/>fstpl <text:s text:c="2"/>-2608(%ebp)</text:p>
      <text:p text:style-name="P119"><text:s text:c="8"/>jmp <text:s text:c="4"/>.L17</text:p>
      <text:p text:style-name="P119">.L33:</text:p>
      <text:p text:style-name="P119"><text:s text:c="8"/>fstp <text:s text:c="3"/>%st(0)</text:p>
      <text:p text:style-name="P119"><text:s text:c="8"/>fstp <text:s text:c="3"/>%st(0)</text:p>
      <text:p text:style-name="P119"><text:s text:c="8"/>fldl <text:s text:c="3"/>.LC4</text:p>
      <text:p text:style-name="P119"><text:s text:c="8"/>jmp <text:s text:c="4"/>.L19</text:p>
      <text:p text:style-name="P119"/>
      <text:p text:style-name="P160">#Обработка перевода строки <text:span text:style-name="T77">(widen)</text:span></text:p>
      <text:p text:style-name="P119">.L23:</text:p>
      <text:p text:style-name="P119"><text:s text:c="8"/>subl <text:s text:c="3"/>$12, %esp</text:p>
      <text:p text:style-name="P119"><text:s text:c="8"/>pushl <text:s text:c="2"/>%edi</text:p>
      <text:p text:style-name="P119"><text:s text:c="8"/>call <text:s text:c="3"/>std::ctype&lt;char&gt;::_M_widen_init() const</text:p>
      <text:p text:style-name="P119"><text:s text:c="8"/>movl <text:s text:c="3"/>(%edi), %eax</text:p>
      <text:p text:style-name="P119"><text:s text:c="8"/>addl <text:s text:c="3"/>$16, %esp</text:p>
      <text:p text:style-name="P119"><text:s text:c="8"/>movl <text:s text:c="3"/>24(%eax), %edx</text:p>
      <text:p text:style-name="P119"><text:s text:c="8"/>movl <text:s text:c="3"/>$10, %eax</text:p>
      <text:p text:style-name="P119"><text:s text:c="8"/>cmpl <text:s text:c="3"/>$_ZNKSt5ctypeIcE8do_widenEc, %edx</text:p>
      <text:p text:style-name="P119"><text:s text:c="8"/>je <text:s text:c="5"/>.L24</text:p>
      <text:p text:style-name="P119"><text:s text:c="8"/>subl <text:s text:c="3"/>$8, %esp</text:p>
      <text:p text:style-name="P119"><text:s text:c="8"/>pushl <text:s text:c="2"/>$10</text:p>
      <text:p text:style-name="P119"><text:s text:c="8"/>pushl <text:s text:c="2"/>%edi</text:p>
      <text:p text:style-name="P119"><text:s text:c="8"/>call <text:s text:c="3"/>*%edx</text:p>
      <text:p text:style-name="P119"><draw:custom-shape text:anchor-type="paragraph" draw:z-index="39" draw:name="Shape 40" draw:style-name="gr43" draw:text-style-name="P112" svg:width="17.283cm" svg:height="26.173cm" svg:x="-0.367cm" svg:y="-0.466cm"><text:p/><draw:enhanced-geometry svg:viewBox="0 0 21600 21600" draw:type="rectangle" draw:enhanced-path="M 0 0 L 21600 0 21600 21600 0 21600 0 0 Z N"/></draw:custom-shape><text:soft-page-break/><text:s text:c="8"/>addl <text:s text:c="3"/>$16, %esp</text:p>
      <text:p text:style-name="P119"><text:s text:c="8"/>movsbl <text:s/>%al, %eax</text:p>
      <text:p text:style-name="P119"><text:s text:c="8"/>jmp <text:s text:c="4"/>.L24</text:p>
      <text:p text:style-name="P160">#Для второго перевода строки</text:p>
      <text:p text:style-name="P119">.L26:</text:p>
      <text:p text:style-name="P119"><text:s text:c="8"/>subl <text:s text:c="3"/>$12, %esp</text:p>
      <text:p text:style-name="P119"><text:s text:c="8"/>pushl <text:s text:c="2"/>%edi</text:p>
      <text:p text:style-name="P119"><text:s text:c="8"/>call <text:s text:c="3"/>std::ctype&lt;char&gt;::_M_widen_init() const</text:p>
      <text:p text:style-name="P119"><text:s text:c="8"/>movl <text:s text:c="3"/>(%edi), %eax</text:p>
      <text:p text:style-name="P119"><text:s text:c="8"/>addl <text:s text:c="3"/>$16, %esp</text:p>
      <text:p text:style-name="P119"><text:s text:c="8"/>movl <text:s text:c="3"/>24(%eax), %edx</text:p>
      <text:p text:style-name="P119"><text:s text:c="8"/>movl <text:s text:c="3"/>$10, %eax</text:p>
      <text:p text:style-name="P119"><text:s text:c="8"/>cmpl <text:s text:c="3"/>$_ZNKSt5ctypeIcE8do_widenEc, %edx</text:p>
      <text:p text:style-name="P119"><text:s text:c="8"/>je <text:s text:c="5"/>.L27</text:p>
      <text:p text:style-name="P119"><text:s text:c="8"/>subl <text:s text:c="3"/>$8, %esp</text:p>
      <text:p text:style-name="P119"><text:s text:c="8"/>pushl <text:s text:c="2"/>$10</text:p>
      <text:p text:style-name="P119"><text:s text:c="8"/>pushl <text:s text:c="2"/>%edi</text:p>
      <text:p text:style-name="P119"><text:s text:c="8"/>call <text:s text:c="3"/>*%edx</text:p>
      <text:p text:style-name="P119"><text:s text:c="8"/>addl <text:s text:c="3"/>$16, %esp</text:p>
      <text:p text:style-name="P119"><text:s text:c="8"/>movsbl <text:s/>%al, %eax</text:p>
      <text:p text:style-name="P119"><text:s text:c="8"/>jmp <text:s text:c="4"/>.L27</text:p>
      <text:p text:style-name="P119">.L50:</text:p>
      <text:p text:style-name="P119"><text:s text:c="8"/>fldz</text:p>
      <text:p text:style-name="P119"><text:s text:c="8"/>jmp <text:s text:c="4"/>.L14</text:p>
      <text:p text:style-name="P119"><text:s text:c="8"/>jmp <text:s text:c="4"/>.L44</text:p>
      <text:p text:style-name="P119"><text:s text:c="8"/>movl <text:s text:c="3"/>%eax, %ebx</text:p>
      <text:p text:style-name="P119"><text:s text:c="8"/>jmp <text:s text:c="4"/>.L15</text:p>
      <text:p text:style-name="P119">numberPi(int) (.cold):</text:p>
      <text:p text:style-name="P119"><text:s text:c="8"/>nop</text:p>
      <text:p text:style-name="P119"/>
      <text:p text:style-name="P119">.LC13:</text:p>
      <text:p text:style-name="P119"><text:s text:c="8"/>.string "Error!"</text:p>
      <text:p text:style-name="P119">.LC14:</text:p>
      <text:p text:style-name="P119"><text:s text:c="8"/>.string "N &gt;0 !!!"</text:p>
      <text:p text:style-name="P119">.LC15:</text:p>
      <text:p text:style-name="P119"><text:s text:c="8"/>.string "\033[32m"</text:p>
      <text:p text:style-name="P119">.LC16:</text:p>
      <text:p text:style-name="P119"><text:s text:c="8"/>.string "----- 0.5*N ----- "</text:p>
      <text:p text:style-name="P119">.LC17:</text:p>
      <text:p text:style-name="P119"><text:s text:c="8"/>.string "\033[0m"</text:p>
      <text:p text:style-name="P119">.LC19:</text:p>
      <text:p text:style-name="P119"><text:s text:c="8"/>.string "-------N -----"</text:p>
      <text:p text:style-name="P119">.LC20:</text:p>
      <text:p text:style-name="P119"><text:s text:c="8"/>.base64 "LS0tLSAxLjUqTiDigJQtLS0A"</text:p>
      <text:p text:style-name="P160"/>
      <text:p text:style-name="P160"><draw:custom-shape text:anchor-type="paragraph" draw:z-index="40" draw:name="Shape 41" draw:style-name="gr44" draw:text-style-name="P112" svg:width="17.283cm" svg:height="26.085cm" svg:x="-0.367cm" svg:y="-0.466cm"><text:p/><draw:enhanced-geometry svg:viewBox="0 0 21600 21600" draw:type="rectangle" draw:enhanced-path="M 0 0 L 21600 0 21600 21600 0 21600 0 0 Z N"/></draw:custom-shape><text:soft-page-break/>#Функция main</text:p>
      <text:p text:style-name="P119">main:</text:p>
      <text:p text:style-name="P119"><text:s text:c="8"/>leal <text:s text:c="3"/>4(%esp), %ecx</text:p>
      <text:p text:style-name="P119"><text:s text:c="8"/>andl <text:s text:c="3"/>$-16, %esp</text:p>
      <text:p text:style-name="P119"><text:s text:c="8"/>pushl <text:s text:c="2"/>-4(%ecx)</text:p>
      <text:p text:style-name="P119"><text:s text:c="8"/>pushl <text:s text:c="2"/>%ebp</text:p>
      <text:p text:style-name="P119"><text:s text:c="8"/>movl <text:s text:c="3"/>%esp, %ebp</text:p>
      <text:p text:style-name="P119"><text:s text:c="8"/>pushl <text:s text:c="2"/>%ebx</text:p>
      <text:p text:style-name="P119"><text:s text:c="8"/>pushl <text:s text:c="2"/>%ecx</text:p>
      <text:p text:style-name="P119"><text:s text:c="8"/>subl <text:s text:c="3"/>$16, %esp <text:span text:style-name="T78"># меньше стековой памяти <text:s/>(на 20 байт)</text:span></text:p>
      <text:p text:style-name="P157">#Оптимизирована проврерка аргументов</text:p>
      <text:p text:style-name="P119"><text:s text:c="8"/>movl <text:s text:c="3"/>4(%ecx), %eax</text:p>
      <text:p text:style-name="P119"><text:s text:c="8"/>cmpl <text:s text:c="3"/>$2, (%ecx)</text:p>
      <text:p text:style-name="P119"><text:s text:c="8"/>je <text:s text:c="5"/>.L54</text:p>
      <text:p text:style-name="P157">#Оптимизирован вывод ошибки(было operator&lt;&lt;, стало std::_ostream_insert)</text:p>
      <text:p text:style-name="P119"><text:s text:c="8"/>pushl <text:s text:c="2"/>%ebx</text:p>
      <text:p text:style-name="P119"><text:s text:c="8"/>pushl <text:s text:c="2"/>$6</text:p>
      <text:p text:style-name="P119"><text:s text:c="8"/>pushl <text:s text:c="2"/>$.LC13</text:p>
      <text:p text:style-name="P119">.L59:<text:span text:style-name="T61"> </text:span><text:span text:style-name="T79"># Общий блок для вывода ошибок</text:span></text:p>
      <text:p text:style-name="P119"><text:s text:c="8"/>pushl <text:s text:c="2"/>$_ZSt4cerr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movl <text:s text:c="3"/>$_ZSt4cerr, %eax</text:p>
      <text:p text:style-name="P119"><text:s text:c="8"/>addl <text:s text:c="3"/>$16, %esp</text:p>
      <text:p text:style-name="P119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9"><text:s text:c="8"/>movl <text:s text:c="3"/>$1, %eax</text:p>
      <text:p text:style-name="P119">.L53:</text:p>
      <text:p text:style-name="P119"><text:s text:c="8"/>leal <text:s text:c="3"/>-8(%ebp), %esp</text:p>
      <text:p text:style-name="P119"><text:s text:c="8"/>popl <text:s text:c="3"/>%ecx</text:p>
      <text:p text:style-name="P119"><text:s text:c="8"/>popl <text:s text:c="3"/>%ebx</text:p>
      <text:p text:style-name="P119"><text:s text:c="8"/>popl <text:s text:c="3"/>%ebp</text:p>
      <text:p text:style-name="P119"><text:s text:c="8"/>leal <text:s text:c="3"/>-4(%ecx), %esp</text:p>
      <text:p text:style-name="P119"><text:s text:c="8"/>ret</text:p>
      <text:p text:style-name="P162"/>
      <text:p text:style-name="P162">#Обработка аргументов командной строки</text:p>
      <text:p text:style-name="P119">.L54:</text:p>
      <text:p text:style-name="P119"><text:s text:c="8"/>pushl <text:s text:c="2"/>%ecx</text:p>
      <text:p text:style-name="P119"><text:s text:c="8"/>pushl <text:s text:c="2"/>$10</text:p>
      <text:p text:style-name="P119"><text:s text:c="8"/>pushl <text:s text:c="2"/>$0</text:p>
      <text:p text:style-name="P119"><text:s text:c="8"/>pushl <text:s text:c="2"/>4(%eax)</text:p>
      <text:p text:style-name="P119"><text:s text:c="8"/>call <text:s text:c="3"/>strtol</text:p>
      <text:p text:style-name="P119"><text:s text:c="8"/>addl <text:s text:c="3"/>$16, %esp</text:p>
      <text:p text:style-name="P119"><draw:custom-shape text:anchor-type="paragraph" draw:z-index="41" draw:name="Shape 42" draw:style-name="gr45" draw:text-style-name="P112" svg:width="17.283cm" svg:height="26.217cm" svg:x="-0.367cm" svg:y="-0.399cm"><text:p/><draw:enhanced-geometry svg:viewBox="0 0 21600 21600" draw:mirror-horizontal="false" draw:mirror-vertical="false" draw:type="rectangle" draw:enhanced-path="M 0 0 L 21600 0 21600 21600 0 21600 0 0 Z N"/></draw:custom-shape><text:soft-page-break/><text:s text:c="8"/>movl <text:s text:c="3"/>%eax, %ebx</text:p>
      <text:p text:style-name="P119"><text:s text:c="8"/>testl <text:s text:c="2"/>%eax, %eax</text:p>
      <text:p text:style-name="P119"><text:s text:c="8"/>jle <text:s text:c="4"/>.L60</text:p>
      <text:p text:style-name="P162">#Вывод заголовка для 0.5*N (зеленым цветом)</text:p>
      <text:p text:style-name="P119"><text:s text:c="8"/>pushl <text:s text:c="2"/>%eax</text:p>
      <text:p text:style-name="P119"><text:s text:c="8"/>pushl <text:s text:c="2"/>$5</text:p>
      <text:p text:style-name="P119"><text:s text:c="8"/>pushl <text:s text:c="2"/>$.LC15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2, %esp</text:p>
      <text:p text:style-name="P163"><text:span text:style-name="T80">#Вывод текста «</text:span><text:span text:style-name="T66">----- 0.5*N -----</text:span><text:span text:style-name="T80">»</text:span></text:p>
      <text:p text:style-name="P119"><text:s text:c="8"/>pushl <text:s text:c="2"/>$18</text:p>
      <text:p text:style-name="P119"><text:s text:c="8"/>pushl <text:s text:c="2"/>$.LC16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2, %esp</text:p>
      <text:p text:style-name="P119"><text:s text:c="8"/>pushl <text:s text:c="2"/>$4 </text:p>
      <text:p text:style-name="P164"><text:s text:c="8"/>pushl <text:s text:c="2"/>$.LC17 <text:span text:style-name="T79">#сброс цвета</text:span>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6, %esp</text:p>
      <text:p text:style-name="P119"/>
      <text:p text:style-name="P119"><text:s text:c="8"/>movl <text:s text:c="3"/>$_ZSt4cout, %eax <text:span text:style-name="T79">#перевод строки</text:span></text:p>
      <text:p text:style-name="P119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9"/>
      <text:p text:style-name="P165">#Вычисление 0.5*N</text:p>
      <text:p text:style-name="P119"><text:s text:c="8"/>movl <text:s text:c="3"/>%ebx, -16(%ebp)</text:p>
      <text:p text:style-name="P119"><text:s text:c="8"/>fildl <text:s text:c="2"/>-16(%ebp)</text:p>
      <text:p text:style-name="P119"><text:s text:c="8"/>subl <text:s text:c="3"/>$12, %esp</text:p>
      <text:p text:style-name="P119"><text:s text:c="8"/>fld <text:s text:c="4"/>%st(0)</text:p>
      <text:p text:style-name="P119"><text:s text:c="8"/>fstpl <text:s text:c="2"/>-24(%ebp)</text:p>
      <text:p text:style-name="P119"><text:s text:c="8"/>fmuls <text:s text:c="2"/>.LC18</text:p>
      <text:p text:style-name="P119"><text:s text:c="8"/>fstpl <text:s text:c="2"/>-16(%ebp)</text:p>
      <text:p text:style-name="P119"><text:s text:c="8"/>cvttsd2sil <text:s text:c="5"/>-16(%ebp), %eax</text:p>
      <text:p text:style-name="P119"/>
      <text:p text:style-name="P165">#Вывод numberPi с 0.5*N </text:p>
      <text:p text:style-name="P119"><text:s text:c="8"/>pushl <text:s text:c="2"/>%eax</text:p>
      <text:p text:style-name="P119"><draw:custom-shape text:anchor-type="paragraph" draw:z-index="42" draw:name="Shape 43" draw:style-name="gr46" draw:text-style-name="P112" svg:width="17.283cm" svg:height="26.311cm" svg:x="-0.367cm" svg:y="-0.42cm"><text:p/><draw:enhanced-geometry svg:viewBox="0 0 21600 21600" draw:type="rectangle" draw:enhanced-path="M 0 0 L 21600 0 21600 21600 0 21600 0 0 Z N"/></draw:custom-shape><text:soft-page-break/><text:s text:c="8"/>call <text:s text:c="3"/>numberPi(int)</text:p>
      <text:p text:style-name="P119"><text:s text:c="8"/>fstp <text:s text:c="3"/>%st(0)</text:p>
      <text:p text:style-name="P119"><text:s text:c="8"/>addl <text:s text:c="3"/>$12, %esp</text:p>
      <text:p text:style-name="P119"/>
      <text:p text:style-name="P165">#Вывод заголовка для Т (зеленым цветом)</text:p>
      <text:p text:style-name="P119"><text:s text:c="8"/>pushl <text:s text:c="2"/>$5</text:p>
      <text:p text:style-name="P119"><text:s text:c="8"/>pushl <text:s text:c="2"/>$.LC15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2, %esp</text:p>
      <text:p text:style-name="P166"><text:span text:style-name="T81">#Вывод текста «</text:span><text:span text:style-name="T82">-------N -----</text:span><text:span text:style-name="T81">»</text:span></text:p>
      <text:p text:style-name="P119"><text:s text:c="8"/>pushl <text:s text:c="2"/>$14</text:p>
      <text:p text:style-name="P167"><text:s text:c="8"/>pushl <text:s text:c="2"/>$.LC19 <text:span text:style-name="T83">#</text:span><text:span text:style-name="T84">«</text:span><text:span text:style-name="T85">-------N -----</text:span><text:span text:style-name="T84">»</text:span>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2, %esp</text:p>
      <text:p text:style-name="P119"><text:s text:c="8"/>pushl <text:s text:c="2"/>$4</text:p>
      <text:p text:style-name="P119"><text:s text:c="8"/>pushl <text:s text:c="2"/>$.LC17 <text:span text:style-name="T83">#сброс цвета</text:span>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65">#Перевод строки</text:p>
      <text:p text:style-name="P119"><text:s text:c="8"/>movl <text:s text:c="3"/>$_ZSt4cout, %eax</text:p>
      <text:p text:style-name="P119"><text:s text:c="8"/>addl <text:s text:c="3"/>$16, %esp</text:p>
      <text:p text:style-name="P119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65">#Вызов nmberPi c N</text:p>
      <text:p text:style-name="P119"><text:s text:c="8"/>subl <text:s text:c="3"/>$12, %esp</text:p>
      <text:p text:style-name="P119"><text:s text:c="8"/>pushl <text:s text:c="2"/>%ebx</text:p>
      <text:p text:style-name="P119"><text:s text:c="8"/>call <text:s text:c="3"/>numberPi(int)</text:p>
      <text:p text:style-name="P119"><text:s text:c="8"/>fstp <text:s text:c="3"/>%st(0)</text:p>
      <text:p text:style-name="P119"><text:s text:c="8"/>addl <text:s text:c="3"/>$12, %esp</text:p>
      <text:p text:style-name="P119"/>
      <text:p text:style-name="P165">#Вывод заголовка для 1.5*N (зеленым цветом)</text:p>
      <text:p text:style-name="P119"><text:s text:c="8"/>pushl <text:s text:c="2"/>$5</text:p>
      <text:p text:style-name="P119"><text:s text:c="8"/>pushl <text:s text:c="2"/>$.LC15</text:p>
      <text:p text:style-name="P119"><text:s text:c="8"/>pushl <text:s text:c="2"/>$_ZSt4cout</text:p>
      <text:p text:style-name="P119"><draw:custom-shape text:anchor-type="paragraph" draw:z-index="43" draw:name="Shape 44" draw:style-name="gr47" draw:text-style-name="P112" svg:width="17.283cm" svg:height="26.247cm" svg:x="-0.342cm" svg:y="-0.379cm"><text:p/><draw:enhanced-geometry svg:viewBox="0 0 21600 21600" draw:type="rectangle" draw:enhanced-path="M 0 0 L 21600 0 21600 21600 0 21600 0 0 Z N"/></draw:custom-shape><text:soft-page-break/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2, %esp</text:p>
      <text:p text:style-name="P168"><text:span text:style-name="T86">#Вывод текста «</text:span><text:span text:style-name="T66">----- 1.5*N ----</text:span><text:span text:style-name="T86">» (base64)</text:span></text:p>
      <text:p text:style-name="P119"><text:s text:c="8"/>pushl <text:s text:c="2"/>$17</text:p>
      <text:p text:style-name="P169"><text:s text:c="8"/>pushl <text:s text:c="2"/>$.LC20 <text:span text:style-name="T87">#</text:span><text:span text:style-name="T88">«</text:span><text:span text:style-name="T89">----- 1.5*N ----</text:span><text:span text:style-name="T88">» </text:span>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2, %esp</text:p>
      <text:p text:style-name="P119"><text:s text:c="8"/>pushl <text:s text:c="2"/>$4</text:p>
      <text:p text:style-name="P119"><text:s text:c="8"/>pushl <text:s text:c="2"/>$.LC17 <text:span text:style-name="T87">#сброс цвета</text:span></text:p>
      <text:p text:style-name="P119"><text:s text:c="8"/>pushl <text:s text:c="2"/>$_ZSt4cout</text:p>
      <text:p text:style-name="P119"><text:s text:c="8"/>call <text:s text:c="3"/>std::basic_ostream&lt;char, std::char_traits&lt;char&gt;&gt;&amp; std::__ostream_insert&lt;char, std::char_traits&lt;char&gt;&gt;(std::basic_ostream&lt;char, std::char_traits&lt;char&gt;&gt;&amp;, char const*, int)</text:p>
      <text:p text:style-name="P119"><text:s text:c="8"/>addl <text:s text:c="3"/>$16, %esp</text:p>
      <text:p text:style-name="P170">#Перевод строки</text:p>
      <text:p text:style-name="P119"><text:s text:c="8"/>movl <text:s text:c="3"/>$_ZSt4cout, %eax</text:p>
      <text:p text:style-name="P119"><text:s text:c="8"/>call <text:s text:c="3"/>std::basic_ostream&lt;char, std::char_traits&lt;char&gt;&gt;&amp; std::endl&lt;char, std::char_traits&lt;char&gt;&gt;(std::basic_ostream&lt;char, std::char_traits&lt;char&gt;&gt;&amp;) (.isra.0)</text:p>
      <text:p text:style-name="P119"/>
      <text:p text:style-name="P171">#Вычсиление 1.5*N</text:p>
      <text:p text:style-name="P119"><text:s text:c="8"/>fldl <text:s text:c="3"/>-24(%ebp)</text:p>
      <text:p text:style-name="P119"><text:s text:c="8"/>fmuls <text:s text:c="2"/>.LC21</text:p>
      <text:p text:style-name="P119"><text:s text:c="8"/>subl <text:s text:c="3"/>$12, %esp</text:p>
      <text:p text:style-name="P119"><text:s text:c="8"/>fstpl <text:s text:c="2"/>-16(%ebp)</text:p>
      <text:p text:style-name="P119"><text:s text:c="8"/>cvttsd2sil <text:s text:c="5"/>-16(%ebp), %eax</text:p>
      <text:p text:style-name="P119"/>
      <text:p text:style-name="P172">#Вызов nmberPi c 1.5*N </text:p>
      <text:p text:style-name="P119"><text:s text:c="8"/>pushl <text:s text:c="2"/>%eax</text:p>
      <text:p text:style-name="P119"><text:s text:c="8"/>call <text:s text:c="3"/>numberPi(int)</text:p>
      <text:p text:style-name="P119"><text:s text:c="8"/>fstp <text:s text:c="3"/>%st(0)</text:p>
      <text:p text:style-name="P119"><text:s text:c="8"/>addl <text:s text:c="3"/>$16, %esp</text:p>
      <text:p text:style-name="P119"/>
      <text:p text:style-name="P173">#Успешное завершение программы</text:p>
      <text:p text:style-name="P119"><text:s text:c="8"/>xorl <text:s text:c="3"/>%eax, %eax</text:p>
      <text:p text:style-name="P119"><text:s text:c="8"/>jmp <text:s text:c="4"/>.L53</text:p>
      <text:p text:style-name="P119"/>
      <text:p text:style-name="P173">#Обработка ошибки: N&lt;=0</text:p>
      <text:p text:style-name="P119">.L60:</text:p>
      <text:p text:style-name="P119"><text:s text:c="8"/>pushl <text:s text:c="2"/>%edx</text:p>
      <text:p text:style-name="P119"><draw:custom-shape text:anchor-type="paragraph" draw:z-index="46" draw:name="Shape 37" draw:style-name="gr48" draw:text-style-name="P32" svg:width="17.294cm" svg:height="13.308cm" svg:x="-0.347cm" svg:y="-0.349cm"><text:p/><draw:enhanced-geometry svg:viewBox="0 0 21600 21600" draw:type="rectangle" draw:enhanced-path="M 0 0 L 21600 0 21600 21600 0 21600 0 0 Z N"/></draw:custom-shape><text:soft-page-break/><text:s text:c="8"/>pushl <text:s text:c="2"/>$8</text:p>
      <text:p text:style-name="P119"><text:s text:c="8"/>pushl <text:s text:c="2"/>$.LC14</text:p>
      <text:p text:style-name="P119"><text:s text:c="8"/>jmp <text:s text:c="4"/>.L59</text:p>
      <text:p text:style-name="P119"/>
      <text:p text:style-name="P160">#Константы для вычилсений</text:p>
      <text:p text:style-name="P119">.LC3:</text:p>
      <text:p text:style-name="P119"><text:s text:c="8"/>.long <text:s text:c="2"/>-2</text:p>
      <text:p text:style-name="P119"><text:s text:c="8"/>.long <text:s text:c="2"/>1072693247</text:p>
      <text:p text:style-name="P119">.LC4:</text:p>
      <text:p text:style-name="P119"><text:s text:c="8"/>.long <text:s text:c="2"/>-4</text:p>
      <text:p text:style-name="P119"><text:s text:c="8"/>.long <text:s text:c="2"/>1072693247</text:p>
      <text:p text:style-name="P119">.LC5:</text:p>
      <text:p text:style-name="P119"><text:s text:c="8"/>.long <text:s text:c="2"/>1333788672</text:p>
      <text:p text:style-name="P119">.LC6:</text:p>
      <text:p text:style-name="P119"><text:s text:c="8"/>.long <text:s text:c="2"/>1082130432</text:p>
      <text:p text:style-name="P119">.LC9:</text:p>
      <text:p text:style-name="P119"><text:s text:c="8"/>.long <text:s text:c="2"/>-400107883</text:p>
      <text:p text:style-name="P119"><text:s text:c="8"/>.long <text:s text:c="2"/>1041313291</text:p>
      <text:p text:style-name="P119">.LC18:</text:p>
      <text:p text:style-name="P119"><text:s text:c="8"/>.long <text:s text:c="2"/>1056964608</text:p>
      <text:p text:style-name="P119">.LC21:</text:p>
      <text:p text:style-name="P119"><text:s text:c="8"/>.long <text:s text:c="2"/>10695475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Helvetica" svg:font-family="Helvetic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Wingdings" svg:font-family="Wingdings" style:font-pitch="variable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imes_20_New_20_Roman" style:display-name="Times New Roman" style:family="paragraph" style:parent-style-name="Standard">
      <style:paragraph-properties fo:text-align="justify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5:38:00</meta:creation-date>
    <dc:date>2025-11-28T20:54:25.028490779</dc:date>
    <meta:editing-cycles>48</meta:editing-cycles>
    <meta:editing-duration>P3DT19H52M38S</meta:editing-duration>
    <meta:generator>LibreOffice/24.8.2.1$MacOSX_AARCH64 LibreOffice_project/0f794b6e29741098670a3b95d60478a65d05ef13</meta:generator>
    <meta:document-statistic meta:table-count="11" meta:image-count="0" meta:object-count="0" meta:page-count="58" meta:paragraph-count="1761" meta:word-count="5581" meta:character-count="63397" meta:non-whitespace-character-count="45779"/>
  </office:meta>
</office:document-meta>
</file>